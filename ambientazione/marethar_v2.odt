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5">
      <text:list-level-style-number text:level="1" text:style-name="Numbering_20_Symbols" style:num-format="1" text:start-value="2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left="0.5in" fo:margin-right="0in" fo:text-indent="0in" style:auto-text-indent="false"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paragraph-properties fo:margin-top="0in" fo:margin-bottom="0in"/>
    </style:style>
    <style:style style:name="P28" style:family="paragraph" style:parent-style-name="Text_20_body" style:list-style-name="L15">
      <style:paragraph-properties fo:margin-top="0in" fo:margin-bottom="0in"/>
    </style:style>
    <style:style style:name="P29" style:family="paragraph" style:parent-style-name="Text_20_body" style:list-style-name="L16">
      <style:paragraph-properties fo:margin-top="0in" fo:margin-bottom="0in"/>
    </style:style>
    <style:style style:name="P30" style:family="paragraph" style:parent-style-name="Text_20_body" style:list-style-name="L17">
      <style:paragraph-properties fo:margin-top="0in" fo:margin-bottom="0in"/>
    </style:style>
    <style:style style:name="P31" style:family="paragraph" style:parent-style-name="Text_20_body" style:list-style-name="L18">
      <style:paragraph-properties fo:margin-top="0in" fo:margin-bottom="0in"/>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style:style style:name="P34" style:family="paragraph" style:parent-style-name="Text_20_body" style:list-style-name="L21">
      <style:paragraph-properties fo:margin-top="0in" fo:margin-bottom="0in"/>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24">
      <style:paragraph-properties fo:margin-top="0in" fo:margin-bottom="0in"/>
    </style:style>
    <style:style style:name="P39" style:family="paragraph" style:parent-style-name="Text_20_body" style:list-style-name="L25">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26">
      <style:paragraph-properties fo:margin-top="0in" fo:margin-bottom="0in"/>
    </style:style>
    <style:style style:name="P42" style:family="paragraph" style:parent-style-name="Text_20_body" style:list-style-name="L27">
      <style:paragraph-properties fo:margin-top="0in" fo:margin-bottom="0in"/>
    </style:style>
    <style:style style:name="P43" style:family="paragraph" style:parent-style-name="Quotations">
      <style:paragraph-properties fo:margin-left="0.5in" fo:margin-right="0in" fo:text-indent="0in" style:auto-text-indent="false"/>
    </style:style>
    <style:style style:name="P44" style:family="paragraph" style:parent-style-name="Text_20_body" style:list-style-name="L28">
      <style:paragraph-properties fo:margin-top="0in" fo:margin-bottom="0in"/>
    </style:style>
    <style:style style:name="P45" style:family="paragraph" style:parent-style-name="Text_20_body" style:list-style-name="L29">
      <style:paragraph-properties fo:margin-top="0in" fo:margin-bottom="0in"/>
    </style:style>
    <style:style style:name="P46" style:family="paragraph" style:parent-style-name="Quotations">
      <style:paragraph-properties fo:margin-left="0.5in" fo:margin-right="0in" fo:text-indent="0in" style:auto-text-indent="false"/>
    </style:style>
    <style:style style:name="P47" style:family="paragraph" style:parent-style-name="Text_20_body" style:list-style-name="L30">
      <style:paragraph-properties fo:margin-top="0in" fo:margin-bottom="0in"/>
    </style:style>
    <style:style style:name="P48" style:family="paragraph" style:parent-style-name="Text_20_body" style:list-style-name="L31">
      <style:paragraph-properties fo:margin-top="0in" fo:margin-bottom="0in"/>
    </style:style>
    <style:style style:name="P49" style:family="paragraph" style:parent-style-name="Text_20_body" style:list-style-name="L32">
      <style:paragraph-properties fo:margin-top="0in" fo:margin-bottom="0in"/>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Text_20_body" style:list-style-name="L33">
      <style:paragraph-properties fo:margin-top="0in" fo:margin-bottom="0in"/>
    </style:style>
    <style:style style:name="P54" style:family="paragraph" style:parent-style-name="Text_20_body" style:list-style-name="L34">
      <style:paragraph-properties fo:margin-top="0in" fo:margin-bottom="0in"/>
    </style:style>
    <style:style style:name="P55" style:family="paragraph" style:parent-style-name="Text_20_body" style:list-style-name="L35">
      <style:paragraph-properties fo:margin-top="0in" fo:margin-bottom="0in"/>
    </style:style>
    <style:style style:name="P56" style:family="paragraph" style:parent-style-name="Text_20_body" style:list-style-name="L36">
      <style:paragraph-properties fo:margin-top="0in" fo:margin-bottom="0in"/>
    </style:style>
    <style:style style:name="P57" style:family="paragraph" style:parent-style-name="Text_20_body" style:list-style-name="L37">
      <style:paragraph-properties fo:margin-top="0in" fo:margin-bottom="0in"/>
    </style:style>
    <style:style style:name="P58" style:family="paragraph" style:parent-style-name="Quotations">
      <style:paragraph-properties fo:margin-left="0.5in" fo:margin-right="0in" fo:text-indent="0in" style:auto-text-indent="false"/>
    </style:style>
    <style:style style:name="P59" style:family="paragraph" style:parent-style-name="Text_20_body" style:list-style-name="L38">
      <style:paragraph-properties fo:margin-top="0in" fo:margin-bottom="0in"/>
    </style:style>
    <style:style style:name="P60" style:family="paragraph" style:parent-style-name="Text_20_body" style:list-style-name="L39">
      <style:paragraph-properties fo:margin-top="0in" fo:margin-bottom="0in"/>
    </style:style>
    <style:style style:name="P61" style:family="paragraph" style:parent-style-name="Text_20_body" style:list-style-name="L40">
      <style:paragraph-properties fo:margin-top="0in" fo:margin-bottom="0in"/>
    </style:style>
    <style:style style:name="P62" style:family="paragraph" style:parent-style-name="Text_20_body" style:list-style-name="L41">
      <style:paragraph-properties fo:margin-top="0in" fo:margin-bottom="0in"/>
    </style:style>
    <style:style style:name="P63" style:family="paragraph" style:parent-style-name="Text_20_body" style:list-style-name="L42">
      <style:paragraph-properties fo:margin-top="0in" fo:margin-bottom="0in"/>
    </style:style>
    <style:style style:name="P64" style:family="paragraph" style:parent-style-name="Text_20_body" style:list-style-name="L43">
      <style:paragraph-properties fo:margin-top="0in" fo:margin-bottom="0in"/>
    </style:style>
    <style:style style:name="P65" style:family="paragraph" style:parent-style-name="Text_20_body" style:list-style-name="L44">
      <style:paragraph-properties fo:margin-top="0in" fo:margin-bottom="0in"/>
    </style:style>
    <style:style style:name="P66" style:family="paragraph" style:parent-style-name="Text_20_body" style:list-style-name="L45">
      <style:paragraph-properties fo:margin-top="0in" fo:margin-bottom="0in"/>
    </style:style>
    <style:style style:name="P67" style:family="paragraph" style:parent-style-name="Text_20_body" style:list-style-name="L46">
      <style:paragraph-properties fo:margin-top="0in" fo:margin-bottom="0in"/>
    </style:style>
    <style:style style:name="P68" style:family="paragraph" style:parent-style-name="Text_20_body" style:list-style-name="L47">
      <style:paragraph-properties fo:margin-top="0in" fo:margin-bottom="0in"/>
    </style:style>
    <style:style style:name="P69" style:family="paragraph" style:parent-style-name="Text_20_body" style:list-style-name="L48">
      <style:paragraph-properties fo:margin-top="0in" fo:margin-bottom="0in"/>
    </style:style>
    <style:style style:name="P70" style:family="paragraph" style:parent-style-name="Text_20_body" style:list-style-name="L49">
      <style:paragraph-properties fo:margin-top="0in" fo:margin-bottom="0in"/>
    </style:style>
    <style:style style:name="P71" style:family="paragraph" style:parent-style-name="Text_20_body" style:list-style-name="L50">
      <style:paragraph-properties fo:margin-top="0in" fo:margin-bottom="0in"/>
    </style:style>
    <style:style style:name="P72" style:family="paragraph" style:parent-style-name="Text_20_body" style:list-style-name="L51">
      <style:paragraph-properties fo:margin-top="0in" fo:margin-bottom="0in"/>
    </style:style>
    <style:style style:name="P73" style:family="paragraph" style:parent-style-name="Text_20_body" style:list-style-name="L52">
      <style:paragraph-properties fo:margin-top="0in" fo:margin-bottom="0in"/>
    </style:style>
    <style:style style:name="P74" style:family="paragraph" style:parent-style-name="Text_20_body" style:list-style-name="L53">
      <style:paragraph-properties fo:margin-top="0in" fo:margin-bottom="0in"/>
    </style:style>
    <style:style style:name="P75" style:family="paragraph" style:parent-style-name="Text_20_body" style:list-style-name="L54">
      <style:paragraph-properties fo:margin-top="0in" fo:margin-bottom="0in"/>
    </style:style>
    <style:style style:name="P76" style:family="paragraph" style:parent-style-name="Text_20_body" style:list-style-name="L55">
      <style:paragraph-properties fo:margin-top="0in" fo:margin-bottom="0in"/>
    </style:style>
    <style:style style:name="P77" style:family="paragraph" style:parent-style-name="Quotations">
      <style:paragraph-properties fo:margin-left="0.5in" fo:margin-right="0in" fo:text-indent="0in" style:auto-text-indent="false"/>
    </style:style>
    <style:style style:name="P78" style:family="paragraph" style:parent-style-name="Quotations">
      <style:paragraph-properties fo:margin-left="0.5in" fo:margin-right="0in" fo:text-indent="0in" style:auto-text-indent="false"/>
    </style:style>
    <style:style style:name="P79" style:family="paragraph" style:parent-style-name="Quotations">
      <style:paragraph-properties fo:margin-left="0.5in" fo:margin-right="0in" fo:text-indent="0in" style:auto-text-indent="false"/>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Quotations">
      <style:paragraph-properties fo:margin-left="0.5in" fo:margin-right="0in" fo:text-indent="0in" style:auto-text-indent="false"/>
    </style:style>
    <style:style style:name="P83" style:family="paragraph" style:parent-style-name="Quotations">
      <style:paragraph-properties fo:margin-left="0.5in" fo:margin-right="0in" fo:text-indent="0in" style:auto-text-indent="false"/>
    </style:style>
    <style:style style:name="P84" style:family="paragraph" style:parent-style-name="Quotations">
      <style:paragraph-properties fo:margin-left="0.5in" fo:margin-right="0in" fo:text-indent="0in" style:auto-text-indent="false"/>
    </style:style>
    <style:style style:name="P85" style:family="paragraph" style:parent-style-name="Text_20_body" style:list-style-name="L56">
      <style:paragraph-properties fo:margin-top="0in" fo:margin-bottom="0in"/>
    </style:style>
    <style:style style:name="P86" style:family="paragraph" style:parent-style-name="Quotations">
      <style:paragraph-properties fo:margin-left="0.5in" fo:margin-right="0in" fo:text-indent="0in" style:auto-text-indent="false"/>
    </style:style>
    <style:style style:name="P87" style:family="paragraph" style:parent-style-name="Quotations">
      <style:paragraph-properties fo:margin-left="0.5in" fo:margin-right="0in" fo:text-indent="0in" style:auto-text-indent="false"/>
    </style:style>
    <style:style style:name="P88" style:family="paragraph" style:parent-style-name="Quotations">
      <style:paragraph-properties fo:margin-left="0.5in" fo:margin-right="0in" fo:text-indent="0in" style:auto-text-indent="false"/>
    </style:style>
    <style:style style:name="P89" style:family="paragraph" style:parent-style-name="Text_20_body" style:list-style-name="L57">
      <style:paragraph-properties fo:margin-top="0in" fo:margin-bottom="0in"/>
    </style:style>
    <style:style style:name="P90" style:family="paragraph" style:parent-style-name="Quotations">
      <style:paragraph-properties fo:margin-left="0.5in" fo:margin-right="0in" fo:text-indent="0in" style:auto-text-indent="false"/>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58">
      <style:paragraph-properties fo:margin-top="0in" fo:margin-bottom="0in"/>
    </style:style>
    <style:style style:name="P93" style:family="paragraph" style:parent-style-name="Quotations">
      <style:paragraph-properties fo:margin-left="0.5in" fo:margin-right="0in" fo:text-indent="0in" style:auto-text-indent="false"/>
    </style:style>
    <style:style style:name="P94" style:family="paragraph" style:parent-style-name="Text_20_body" style:list-style-name="L59">
      <style:paragraph-properties fo:margin-top="0in" fo:margin-bottom="0in"/>
    </style:style>
    <style:style style:name="P95" style:family="paragraph" style:parent-style-name="Quotations">
      <style:paragraph-properties fo:margin-left="0.5in" fo:margin-right="0in" fo:text-indent="0in" style:auto-text-indent="false"/>
    </style:style>
    <style:style style:name="P96" style:family="paragraph" style:parent-style-name="Text_20_body" style:list-style-name="L60">
      <style:paragraph-properties fo:margin-top="0in" fo:margin-bottom="0in"/>
    </style:style>
    <style:style style:name="P97" style:family="paragraph" style:parent-style-name="Quotations">
      <style:paragraph-properties fo:margin-left="0.5in" fo:margin-right="0in" fo:text-indent="0in" style:auto-text-indent="false"/>
    </style:style>
    <style:style style:name="P98" style:family="paragraph" style:parent-style-name="Text_20_body" style:list-style-name="L61">
      <style:paragraph-properties fo:margin-top="0in" fo:margin-bottom="0in"/>
    </style:style>
    <style:style style:name="P99" style:family="paragraph" style:parent-style-name="Quotations">
      <style:paragraph-properties fo:margin-left="0.5in" fo:margin-right="0in" fo:text-indent="0in" style:auto-text-indent="false"/>
    </style:style>
    <style:style style:name="P100" style:family="paragraph" style:parent-style-name="Text_20_body" style:list-style-name="L62">
      <style:paragraph-properties fo:margin-top="0in" fo:margin-bottom="0in"/>
    </style:style>
    <style:style style:name="P101" style:family="paragraph" style:parent-style-name="Quotations">
      <style:paragraph-properties fo:margin-left="0.5in" fo:margin-right="0in" fo:text-indent="0in" style:auto-text-indent="false"/>
    </style:style>
    <style:style style:name="P102" style:family="paragraph" style:parent-style-name="Text_20_body" style:list-style-name="L63">
      <style:paragraph-properties fo:margin-top="0in" fo:margin-bottom="0in"/>
    </style:style>
    <style:style style:name="P103" style:family="paragraph" style:parent-style-name="Quotations">
      <style:paragraph-properties fo:margin-left="0.5in" fo:margin-right="0in" fo:text-indent="0in" style:auto-text-indent="false"/>
    </style:style>
    <style:style style:name="P104" style:family="paragraph" style:parent-style-name="Text_20_body" style:list-style-name="L64">
      <style:paragraph-properties fo:margin-top="0in" fo:margin-bottom="0in"/>
    </style:style>
    <style:style style:name="P105" style:family="paragraph" style:parent-style-name="Quotations">
      <style:paragraph-properties fo:margin-left="0.5in" fo:margin-right="0in" fo:text-indent="0in" style:auto-text-indent="false"/>
    </style:style>
    <style:style style:name="P106" style:family="paragraph" style:parent-style-name="Text_20_body" style:list-style-name="L65">
      <style:paragraph-properties fo:margin-top="0in" fo:margin-bottom="0in"/>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66">
      <style:paragraph-properties fo:margin-top="0in" fo:margin-bottom="0in"/>
    </style:style>
    <style:style style:name="P109" style:family="paragraph" style:parent-style-name="Quotations">
      <style:paragraph-properties fo:margin-left="0.5in" fo:margin-right="0in" fo:text-indent="0in" style:auto-text-indent="false"/>
    </style:style>
    <style:style style:name="P110" style:family="paragraph" style:parent-style-name="Text_20_body" style:list-style-name="L67">
      <style:paragraph-properties fo:margin-top="0in" fo:margin-bottom="0in"/>
    </style:style>
    <style:style style:name="P111" style:family="paragraph" style:parent-style-name="Quotations">
      <style:paragraph-properties fo:margin-left="0.5in" fo:margin-right="0in" fo:text-indent="0in" style:auto-text-indent="false"/>
    </style:style>
    <style:style style:name="P112" style:family="paragraph" style:parent-style-name="Text_20_body" style:list-style-name="L68">
      <style:paragraph-properties fo:margin-top="0in" fo:margin-bottom="0in"/>
    </style:style>
    <style:style style:name="P113" style:family="paragraph" style:parent-style-name="Quotations">
      <style:paragraph-properties fo:margin-left="0.5in" fo:margin-right="0in" fo:text-indent="0in" style:auto-text-indent="false"/>
    </style:style>
    <style:style style:name="P114" style:family="paragraph" style:parent-style-name="Text_20_body" style:list-style-name="L69">
      <style:paragraph-properties fo:margin-top="0in" fo:margin-bottom="0in"/>
    </style:style>
    <style:style style:name="P115" style:family="paragraph" style:parent-style-name="Quotations">
      <style:paragraph-properties fo:margin-left="0.5in" fo:margin-right="0in" fo:text-indent="0in" style:auto-text-indent="false"/>
    </style:style>
    <style:style style:name="P116" style:family="paragraph" style:parent-style-name="Text_20_body" style:list-style-name="L70">
      <style:paragraph-properties fo:margin-top="0in" fo:margin-bottom="0in"/>
    </style:style>
    <style:style style:name="P117" style:family="paragraph" style:parent-style-name="Text_20_body" style:list-style-name="L71">
      <style:paragraph-properties fo:margin-top="0in" fo:margin-bottom="0in"/>
    </style:style>
    <style:style style:name="P118" style:family="paragraph" style:parent-style-name="Quotations">
      <style:paragraph-properties fo:margin-left="0.5in" fo:margin-right="0in" fo:text-indent="0in" style:auto-text-indent="false"/>
    </style:style>
    <style:style style:name="P119" style:family="paragraph" style:parent-style-name="Quotations">
      <style:paragraph-properties fo:margin-left="0.5in" fo:margin-right="0in" fo:text-indent="0in" style:auto-text-indent="false"/>
    </style:style>
    <style:style style:name="P120" style:family="paragraph" style:parent-style-name="Text_20_body" style:list-style-name="L72">
      <style:paragraph-properties fo:margin-top="0in" fo:margin-bottom="0in"/>
    </style:style>
    <style:style style:name="P121" style:family="paragraph" style:parent-style-name="Quotations">
      <style:paragraph-properties fo:margin-left="0.5in" fo:margin-right="0in" fo:text-indent="0in" style:auto-text-indent="false"/>
    </style:style>
    <style:style style:name="P122" style:family="paragraph" style:parent-style-name="Text_20_body" style:list-style-name="L73">
      <style:paragraph-properties fo:margin-top="0in" fo:margin-bottom="0in"/>
    </style:style>
    <style:style style:name="P123" style:family="paragraph" style:parent-style-name="Quotations">
      <style:paragraph-properties fo:margin-left="0.5in" fo:margin-right="0in" fo:text-indent="0in" style:auto-text-indent="false"/>
    </style:style>
    <style:style style:name="P124" style:family="paragraph" style:parent-style-name="Text_20_body" style:list-style-name="L74">
      <style:paragraph-properties fo:margin-top="0in" fo:margin-bottom="0in"/>
    </style:style>
    <style:style style:name="P125" style:family="paragraph" style:parent-style-name="Quotations">
      <style:paragraph-properties fo:margin-left="0.5in" fo:margin-right="0in" fo:text-indent="0in" style:auto-text-indent="false"/>
    </style:style>
    <style:style style:name="P126" style:family="paragraph" style:parent-style-name="Text_20_body" style:list-style-name="L75">
      <style:paragraph-properties fo:margin-top="0in" fo:margin-bottom="0in"/>
    </style:style>
    <style:style style:name="P127" style:family="paragraph" style:parent-style-name="Quotations">
      <style:paragraph-properties fo:margin-left="0.5in" fo:margin-right="0in" fo:text-indent="0in" style:auto-text-indent="false"/>
    </style:style>
    <style:style style:name="P128" style:family="paragraph" style:parent-style-name="Text_20_body" style:list-style-name="L76">
      <style:paragraph-properties fo:margin-top="0in" fo:margin-bottom="0in"/>
    </style:style>
    <style:style style:name="P129" style:family="paragraph" style:parent-style-name="Quotations">
      <style:paragraph-properties fo:margin-left="0.5in" fo:margin-right="0in" fo:text-indent="0in" style:auto-text-indent="false"/>
    </style:style>
    <style:style style:name="P130" style:family="paragraph" style:parent-style-name="Text_20_body" style:list-style-name="L77">
      <style:paragraph-properties fo:margin-top="0in" fo:margin-bottom="0in"/>
    </style:style>
    <style:style style:name="P131" style:family="paragraph" style:parent-style-name="Quotations">
      <style:paragraph-properties fo:margin-left="0.5in" fo:margin-right="0in" fo:text-indent="0in" style:auto-text-indent="false"/>
    </style:style>
    <style:style style:name="P132" style:family="paragraph" style:parent-style-name="Text_20_body" style:list-style-name="L78">
      <style:paragraph-properties fo:margin-top="0in" fo:margin-bottom="0in"/>
    </style:style>
    <style:style style:name="P133" style:family="paragraph" style:parent-style-name="Quotations">
      <style:paragraph-properties fo:margin-left="0.5in" fo:margin-right="0in" fo:text-indent="0in" style:auto-text-indent="false"/>
    </style:style>
    <style:style style:name="P134" style:family="paragraph" style:parent-style-name="Text_20_body" style:list-style-name="L79">
      <style:paragraph-properties fo:margin-top="0in" fo:margin-bottom="0in"/>
    </style:style>
    <style:style style:name="P135" style:family="paragraph" style:parent-style-name="Quotations">
      <style:paragraph-properties fo:margin-left="0.5in" fo:margin-right="0in" fo:text-indent="0in" style:auto-text-indent="false"/>
    </style:style>
    <style:style style:name="P136" style:family="paragraph" style:parent-style-name="Text_20_body" style:list-style-name="L80">
      <style:paragraph-properties fo:margin-top="0in" fo:margin-bottom="0in"/>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81">
      <style:paragraph-properties fo:margin-top="0in" fo:margin-bottom="0in"/>
    </style:style>
    <style:style style:name="P139" style:family="paragraph" style:parent-style-name="Quotations">
      <style:paragraph-properties fo:margin-left="0.5in" fo:margin-right="0in" fo:text-indent="0in" style:auto-text-indent="false"/>
    </style:style>
    <style:style style:name="P140" style:family="paragraph" style:parent-style-name="Text_20_body" style:list-style-name="L82">
      <style:paragraph-properties fo:margin-top="0in" fo:margin-bottom="0in"/>
    </style:style>
    <style:style style:name="P141" style:family="paragraph" style:parent-style-name="Quotations">
      <style:paragraph-properties fo:margin-left="0.5in" fo:margin-right="0in" fo:text-indent="0in" style:auto-text-indent="false"/>
    </style:style>
    <style:style style:name="P142" style:family="paragraph" style:parent-style-name="Quotations">
      <style:paragraph-properties fo:margin-left="0.5in" fo:margin-right="0in" fo:text-indent="0in" style:auto-text-indent="false"/>
    </style:style>
    <style:style style:name="P143" style:family="paragraph" style:parent-style-name="Text_20_body" style:list-style-name="L83">
      <style:paragraph-properties fo:margin-top="0in" fo:margin-bottom="0in"/>
    </style:style>
    <style:style style:name="P144" style:family="paragraph" style:parent-style-name="Quotations">
      <style:paragraph-properties fo:margin-left="0.5in" fo:margin-right="0in" fo:text-indent="0in" style:auto-text-indent="false"/>
    </style:style>
    <style:style style:name="P145" style:family="paragraph" style:parent-style-name="Text_20_body" style:list-style-name="L84">
      <style:paragraph-properties fo:margin-top="0in" fo:margin-bottom="0in"/>
    </style:style>
    <style:style style:name="P146" style:family="paragraph" style:parent-style-name="Text_20_body" style:list-style-name="L85">
      <style:paragraph-properties fo:margin-top="0in" fo:margin-bottom="0in"/>
    </style:style>
    <style:style style:name="P147" style:family="paragraph" style:parent-style-name="Quotations">
      <style:paragraph-properties fo:margin-left="0.5in" fo:margin-right="0in" fo:text-indent="0in" style:auto-text-indent="false"/>
    </style:style>
    <style:style style:name="P148" style:family="paragraph" style:parent-style-name="Text_20_body" style:list-style-name="L86">
      <style:paragraph-properties fo:margin-top="0in" fo:margin-bottom="0in"/>
    </style:style>
    <style:style style:name="P149" style:family="paragraph" style:parent-style-name="Text_20_body" style:list-style-name="L87">
      <style:paragraph-properties fo:margin-top="0in" fo:margin-bottom="0in"/>
    </style:style>
    <style:style style:name="P150" style:family="paragraph" style:parent-style-name="Text_20_body" style:list-style-name="L88">
      <style:paragraph-properties fo:margin-top="0in" fo:margin-bottom="0in"/>
    </style:style>
    <style:style style:name="P151" style:family="paragraph" style:parent-style-name="Text_20_body" style:list-style-name="L89">
      <style:paragraph-properties fo:margin-top="0in" fo:margin-bottom="0in"/>
    </style:style>
    <style:style style:name="P152" style:family="paragraph" style:parent-style-name="Quotations">
      <style:paragraph-properties fo:margin-left="0.5in" fo:margin-right="0in" fo:text-indent="0in" style:auto-text-indent="false"/>
    </style:style>
    <style:style style:name="P153" style:family="paragraph" style:parent-style-name="Text_20_body" style:list-style-name="L90">
      <style:paragraph-properties fo:margin-top="0in" fo:margin-bottom="0in"/>
    </style:style>
    <style:style style:name="P154" style:family="paragraph" style:parent-style-name="Text_20_body" style:list-style-name="L91">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92">
      <style:paragraph-properties fo:margin-top="0in" fo:margin-bottom="0in"/>
    </style:style>
    <style:style style:name="P157" style:family="paragraph" style:parent-style-name="Text_20_body" style:list-style-name="L93">
      <style:paragraph-properties fo:margin-top="0in" fo:margin-bottom="0in"/>
    </style:style>
    <style:style style:name="P158" style:family="paragraph" style:parent-style-name="Text_20_body" style:list-style-name="L94">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Quotations">
      <style:paragraph-properties fo:margin-left="0.5in" fo:margin-right="0in" fo:text-indent="0in" style:auto-text-indent="false"/>
    </style:style>
    <style:style style:name="P161" style:family="paragraph" style:parent-style-name="Quotations">
      <style:paragraph-properties fo:margin-left="0.5in" fo:margin-right="0in" fo:text-indent="0in" style:auto-text-indent="false"/>
    </style:style>
    <style:style style:name="P162" style:family="paragraph" style:parent-style-name="Quotations">
      <style:paragraph-properties fo:margin-left="0.5in" fo:margin-right="0in" fo:text-indent="0in" style:auto-text-indent="false"/>
    </style:style>
    <style:style style:name="P163" style:family="paragraph" style:parent-style-name="Quotations">
      <style:paragraph-properties fo:margin-left="0.5in" fo:margin-right="0in" fo:text-indent="0in" style:auto-text-indent="false"/>
    </style:style>
    <style:style style:name="P164" style:family="paragraph" style:parent-style-name="Quotations">
      <style:paragraph-properties fo:margin-left="0.5in" fo:margin-right="0in" fo:text-indent="0in" style:auto-text-indent="false"/>
    </style:style>
    <style:style style:name="P165" style:family="paragraph" style:parent-style-name="Quotations">
      <style:paragraph-properties fo:margin-left="0.5in" fo:margin-right="0in" fo:text-indent="0in" style:auto-text-indent="false"/>
    </style:style>
    <style:style style:name="P166" style:family="paragraph" style:parent-style-name="Quotations">
      <style:paragraph-properties fo:margin-left="0.5in" fo:margin-right="0in" fo:text-indent="0in" style:auto-text-indent="false"/>
    </style:style>
    <style:style style:name="P167" style:family="paragraph" style:parent-style-name="Quotations">
      <style:paragraph-properties fo:margin-left="0.5in" fo:margin-right="0in" fo:text-indent="0in" style:auto-text-indent="false"/>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Quotations">
      <style:paragraph-properties fo:margin-left="0.5in" fo:margin-right="0in" fo:text-indent="0in" style:auto-text-indent="false"/>
    </style:style>
    <style:style style:name="P171" style:family="paragraph" style:parent-style-name="Quotations">
      <style:paragraph-properties fo:margin-left="0.5in" fo:margin-right="0in" fo:text-indent="0in" style:auto-text-indent="false"/>
    </style:style>
    <style:style style:name="P172" style:family="paragraph" style:parent-style-name="Quotations">
      <style:paragraph-properties fo:margin-left="0.5in" fo:margin-right="0in" fo:text-indent="0in" style:auto-text-indent="false"/>
    </style:style>
    <style:style style:name="P173" style:family="paragraph" style:parent-style-name="Text_20_body" style:list-style-name="L95">
      <style:paragraph-properties fo:margin-top="0in" fo:margin-bottom="0in"/>
    </style:style>
    <style:style style:name="P174" style:family="paragraph" style:parent-style-name="Quotations">
      <style:paragraph-properties fo:margin-left="0.5in" fo:margin-right="0in" fo:text-indent="0in" style:auto-text-indent="false"/>
    </style:style>
    <style:style style:name="P175" style:family="paragraph" style:parent-style-name="Quotations">
      <style:paragraph-properties fo:margin-left="0.5in" fo:margin-right="0in" fo:text-indent="0in" style:auto-text-indent="false"/>
    </style:style>
    <style:style style:name="P176" style:family="paragraph" style:parent-style-name="Text_20_body" style:list-style-name="L96">
      <style:paragraph-properties fo:margin-top="0in" fo:margin-bottom="0in"/>
    </style:style>
    <style:style style:name="P177" style:family="paragraph" style:parent-style-name="Quotations">
      <style:paragraph-properties fo:margin-left="0.5in" fo:margin-right="0in" fo:text-indent="0in" style:auto-text-indent="false"/>
    </style:style>
    <style:style style:name="P178" style:family="paragraph" style:parent-style-name="Quotations">
      <style:paragraph-properties fo:margin-left="0.5in" fo:margin-right="0in" fo:text-indent="0in" style:auto-text-indent="false"/>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Quotations">
      <style:paragraph-properties fo:margin-left="0.5in" fo:margin-right="0in" fo:text-indent="0in" style:auto-text-indent="false"/>
    </style:style>
    <style:style style:name="P183" style:family="paragraph" style:parent-style-name="Quotations">
      <style:paragraph-properties fo:margin-left="0.5in" fo:margin-right="0in" fo:text-indent="0in" style:auto-text-indent="false"/>
    </style:style>
    <style:style style:name="P184" style:family="paragraph" style:parent-style-name="Quotations">
      <style:paragraph-properties fo:margin-left="0.5in" fo:margin-right="0in" fo:text-indent="0in" style:auto-text-indent="false"/>
    </style:style>
    <style:style style:name="P185" style:family="paragraph" style:parent-style-name="Quotations">
      <style:paragraph-properties fo:margin-left="0.5in" fo:margin-right="0in" fo:text-indent="0in" style:auto-text-indent="false"/>
    </style:style>
    <style:style style:name="P186" style:family="paragraph" style:parent-style-name="Quotations">
      <style:paragraph-properties fo:margin-left="0.5in" fo:margin-right="0in" fo:text-indent="0in" style:auto-text-indent="false"/>
    </style:style>
    <style:style style:name="P187" style:family="paragraph" style:parent-style-name="Quotations">
      <style:paragraph-properties fo:margin-left="0.5in" fo:margin-right="0in" fo:text-indent="0in" style:auto-text-indent="false"/>
    </style:style>
    <style:style style:name="P188" style:family="paragraph" style:parent-style-name="Text_20_body" style:list-style-name="L97">
      <style:paragraph-properties fo:margin-top="0in" fo:margin-bottom="0in"/>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paragraph-properties fo:margin-top="0in" fo:margin-bottom="0in"/>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paragraph-properties fo:margin-top="0in" fo:margin-bottom="0in"/>
    </style:style>
    <style:style style:name="P196" style:family="paragraph" style:parent-style-name="Text_20_body" style:list-style-name="L103">
      <style:paragraph-properties fo:margin-top="0in" fo:margin-bottom="0in"/>
    </style:style>
    <style:style style:name="P197" style:family="paragraph" style:parent-style-name="Quotations">
      <style:paragraph-properties fo:margin-left="0.5in" fo:margin-right="0in" fo:text-indent="0in" style:auto-text-indent="false"/>
    </style:style>
    <style:style style:name="P198" style:family="paragraph" style:parent-style-name="Quotations">
      <style:paragraph-properties fo:margin-left="0.5in" fo:margin-right="0in" fo:text-indent="0in" style:auto-text-indent="false"/>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paragraph-properties fo:margin-top="0in" fo:margin-bottom="0in"/>
    </style:style>
    <style:style style:name="P202" style:family="paragraph" style:parent-style-name="Text_20_body" style:list-style-name="L107">
      <style:paragraph-properties fo:margin-top="0in" fo:margin-bottom="0in"/>
    </style:style>
    <style:style style:name="P203" style:family="paragraph" style:parent-style-name="Quotations">
      <style:paragraph-properties fo:margin-left="0.5in" fo:margin-right="0in" fo:text-indent="0in" style:auto-text-indent="false"/>
    </style:style>
    <style:style style:name="P204" style:family="paragraph" style:parent-style-name="Text_20_body" style:list-style-name="L108">
      <style:paragraph-properties fo:margin-top="0in" fo:margin-bottom="0in"/>
    </style:style>
    <style:style style:name="P205" style:family="paragraph" style:parent-style-name="Text_20_body" style:list-style-name="L109">
      <style:paragraph-properties fo:margin-top="0in" fo:margin-bottom="0in"/>
    </style:style>
    <style:style style:name="P206" style:family="paragraph" style:parent-style-name="Text_20_body" style:list-style-name="L110">
      <style:paragraph-properties fo:margin-top="0in" fo:margin-bottom="0in"/>
    </style:style>
    <style:style style:name="P207" style:family="paragraph" style:parent-style-name="Text_20_body" style:list-style-name="L111">
      <style:paragraph-properties fo:margin-top="0in" fo:margin-bottom="0in"/>
    </style:style>
    <style:style style:name="P208" style:family="paragraph" style:parent-style-name="Text_20_body" style:list-style-name="L112">
      <style:paragraph-properties fo:margin-top="0in" fo:margin-bottom="0in"/>
    </style:style>
    <style:style style:name="P209" style:family="paragraph" style:parent-style-name="Text_20_body" style:list-style-name="L113">
      <style:paragraph-properties fo:margin-top="0in" fo:margin-bottom="0in"/>
    </style:style>
    <style:style style:name="P210" style:family="paragraph" style:parent-style-name="Text_20_body" style:list-style-name="L114">
      <style:paragraph-properties fo:margin-top="0in" fo:margin-bottom="0in"/>
    </style:style>
    <style:style style:name="P211" style:family="paragraph" style:parent-style-name="Text_20_body" style:list-style-name="L115">
      <style:paragraph-properties fo:margin-top="0in" fo:margin-bottom="0in"/>
    </style:style>
    <style:style style:name="P212" style:family="paragraph" style:parent-style-name="Text_20_body" style:list-style-name="L116">
      <style:paragraph-properties fo:margin-top="0in" fo:margin-bottom="0in"/>
    </style:style>
    <style:style style:name="P213" style:family="paragraph" style:parent-style-name="Text_20_body" style:list-style-name="L117">
      <style:paragraph-properties fo:margin-top="0in" fo:margin-bottom="0in"/>
    </style:style>
    <style:style style:name="P214" style:family="paragraph" style:parent-style-name="Quotations">
      <style:paragraph-properties fo:margin-left="0.5in" fo:margin-right="0in" fo:text-indent="0in" style:auto-text-indent="false"/>
    </style:style>
    <style:style style:name="P215" style:family="paragraph" style:parent-style-name="Text_20_body" style:list-style-name="L118">
      <style:paragraph-properties fo:margin-top="0in" fo:margin-bottom="0in"/>
    </style:style>
    <style:style style:name="P216" style:family="paragraph" style:parent-style-name="Text_20_body" style:list-style-name="L119">
      <style:paragraph-properties fo:margin-top="0in" fo:margin-bottom="0in"/>
    </style:style>
    <style:style style:name="P217" style:family="paragraph" style:parent-style-name="Text_20_body" style:list-style-name="L120">
      <style:paragraph-properties fo:margin-top="0in" fo:margin-bottom="0in"/>
    </style:style>
    <style:style style:name="P218" style:family="paragraph" style:parent-style-name="Text_20_body" style:list-style-name="L121">
      <style:paragraph-properties fo:margin-top="0in" fo:margin-bottom="0in"/>
    </style:style>
    <style:style style:name="P219" style:family="paragraph" style:parent-style-name="Text_20_body" style:list-style-name="L122">
      <style:paragraph-properties fo:margin-top="0in" fo:margin-bottom="0in"/>
    </style:style>
    <style:style style:name="P220" style:family="paragraph" style:parent-style-name="Text_20_body" style:list-style-name="L123">
      <style:paragraph-properties fo:margin-top="0in" fo:margin-bottom="0in"/>
    </style:style>
    <style:style style:name="P221" style:family="paragraph" style:parent-style-name="Text_20_body" style:list-style-name="L124">
      <style:paragraph-properties fo:margin-top="0in" fo:margin-bottom="0in"/>
    </style:style>
    <style:style style:name="P222" style:family="paragraph" style:parent-style-name="Text_20_body" style:list-style-name="L125">
      <style:paragraph-properties fo:margin-top="0in" fo:margin-bottom="0in"/>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126">
      <style:paragraph-properties fo:margin-top="0in" fo:margin-bottom="0in"/>
    </style:style>
    <style:style style:name="P225" style:family="paragraph" style:parent-style-name="Quotations">
      <style:paragraph-properties fo:margin-left="0.5in" fo:margin-right="0in" fo:text-indent="0in" style:auto-text-indent="false"/>
    </style:style>
    <style:style style:name="P226" style:family="paragraph" style:parent-style-name="Text_20_body" style:list-style-name="L127">
      <style:paragraph-properties fo:margin-top="0in" fo:margin-bottom="0in"/>
    </style:style>
    <style:style style:name="P227" style:family="paragraph" style:parent-style-name="Quotations">
      <style:paragraph-properties fo:margin-left="0.5in" fo:margin-right="0in" fo:text-indent="0in" style:auto-text-indent="false"/>
    </style:style>
    <style:style style:name="P228" style:family="paragraph" style:parent-style-name="Text_20_body" style:list-style-name="L128">
      <style:paragraph-properties fo:margin-top="0in" fo:margin-bottom="0in"/>
    </style:style>
    <style:style style:name="P229" style:family="paragraph" style:parent-style-name="Quotations">
      <style:paragraph-properties fo:margin-left="0.5in" fo:margin-right="0in" fo:text-indent="0in" style:auto-text-indent="false"/>
    </style:style>
    <style:style style:name="P230" style:family="paragraph" style:parent-style-name="Text_20_body" style:list-style-name="L129">
      <style:paragraph-properties fo:margin-top="0in" fo:margin-bottom="0in"/>
    </style:style>
    <style:style style:name="P231" style:family="paragraph" style:parent-style-name="Quotations">
      <style:paragraph-properties fo:margin-left="0.5in" fo:margin-right="0in" fo:text-indent="0in" style:auto-text-indent="false"/>
    </style:style>
    <style:style style:name="P232" style:family="paragraph" style:parent-style-name="Text_20_body" style:list-style-name="L130">
      <style:paragraph-properties fo:margin-top="0in" fo:margin-bottom="0in"/>
    </style:style>
    <style:style style:name="P233" style:family="paragraph" style:parent-style-name="Text_20_body" style:list-style-name="L131">
      <style:paragraph-properties fo:margin-top="0in" fo:margin-bottom="0in"/>
    </style:style>
    <style:style style:name="P234" style:family="paragraph" style:parent-style-name="Text_20_body" style:list-style-name="L132">
      <style:paragraph-properties fo:margin-top="0in" fo:margin-bottom="0in"/>
    </style:style>
    <style:style style:name="P235" style:family="paragraph" style:parent-style-name="Text_20_body" style:list-style-name="L133">
      <style:paragraph-properties fo:margin-top="0in" fo:margin-bottom="0in"/>
    </style:style>
    <style:style style:name="P236" style:family="paragraph" style:parent-style-name="Text_20_body" style:list-style-name="L134">
      <style:paragraph-properties fo:margin-top="0in" fo:margin-bottom="0in"/>
    </style:style>
    <style:style style:name="P237" style:family="paragraph" style:parent-style-name="Text_20_body" style:list-style-name="L135">
      <style:paragraph-properties fo:margin-top="0in" fo:margin-bottom="0in"/>
    </style:style>
    <style:style style:name="P238" style:family="paragraph" style:parent-style-name="Text_20_body" style:list-style-name="L136">
      <style:paragraph-properties fo:margin-top="0in" fo:margin-bottom="0in"/>
    </style:style>
    <style:style style:name="P239" style:family="paragraph" style:parent-style-name="Text_20_body" style:list-style-name="L137">
      <style:paragraph-properties fo:margin-top="0in" fo:margin-bottom="0in"/>
    </style:style>
    <style:style style:name="P240" style:family="paragraph" style:parent-style-name="Text_20_body" style:list-style-name="L138">
      <style:paragraph-properties fo:margin-top="0in" fo:margin-bottom="0in"/>
    </style:style>
    <style:style style:name="P241" style:family="paragraph" style:parent-style-name="Text_20_body" style:list-style-name="L139">
      <style:paragraph-properties fo:margin-top="0in" fo:margin-bottom="0in"/>
    </style:style>
    <style:style style:name="P242" style:family="paragraph" style:parent-style-name="Text_20_body" style:list-style-name="L140">
      <style:paragraph-properties fo:margin-top="0in" fo:margin-bottom="0in"/>
    </style:style>
    <style:style style:name="P243" style:family="paragraph" style:parent-style-name="Text_20_body" style:list-style-name="L141">
      <style:paragraph-properties fo:margin-top="0in" fo:margin-bottom="0in"/>
    </style:style>
    <style:style style:name="P244" style:family="paragraph" style:parent-style-name="Text_20_body" style:list-style-name="L142">
      <style:paragraph-properties fo:margin-top="0in" fo:margin-bottom="0in"/>
    </style:style>
    <style:style style:name="P245" style:family="paragraph" style:parent-style-name="Quotations">
      <style:paragraph-properties fo:margin-left="0.5in" fo:margin-right="0in" fo:text-indent="0in" style:auto-text-indent="false"/>
    </style:style>
    <style:style style:name="P246" style:family="paragraph" style:parent-style-name="Text_20_body" style:list-style-name="L143">
      <style:paragraph-properties fo:margin-top="0in" fo:margin-bottom="0in"/>
    </style:style>
    <style:style style:name="P247" style:family="paragraph" style:parent-style-name="Text_20_body" style:list-style-name="L144">
      <style:paragraph-properties fo:margin-top="0in" fo:margin-bottom="0in"/>
    </style:style>
    <style:style style:name="P248" style:family="paragraph" style:parent-style-name="Text_20_body" style:list-style-name="L145">
    </style:style>
    <style:style style:name="P249" style:family="paragraph" style:parent-style-name="Text_20_body" style:list-style-name="L146">
      <style:paragraph-properties fo:margin-top="0in" fo:margin-bottom="0in"/>
    </style:style>
    <style:style style:name="P250" style:family="paragraph" style:parent-style-name="Text_20_body" style:list-style-name="L147">
      <style:paragraph-properties fo:margin-top="0in" fo:margin-bottom="0in"/>
    </style:style>
    <style:style style:name="P251" style:family="paragraph" style:parent-style-name="Text_20_body" style:list-style-name="L148">
      <style:paragraph-properties fo:margin-top="0in" fo:margin-bottom="0in"/>
    </style:style>
    <style:style style:name="P252" style:family="paragraph" style:parent-style-name="Text_20_body" style:list-style-name="L149">
      <style:paragraph-properties fo:margin-top="0in" fo:margin-bottom="0in"/>
    </style:style>
    <style:style style:name="P253" style:family="paragraph" style:parent-style-name="Text_20_body" style:list-style-name="L150">
      <style:paragraph-properties fo:margin-top="0in" fo:margin-bottom="0in"/>
    </style:style>
    <style:style style:name="P254" style:family="paragraph" style:parent-style-name="Text_20_body" style:list-style-name="L151">
      <style:paragraph-properties fo:margin-top="0in" fo:margin-bottom="0in"/>
    </style:style>
    <style:style style:name="P255" style:family="paragraph" style:parent-style-name="Text_20_body" style:list-style-name="L152">
      <style:paragraph-properties fo:margin-top="0in" fo:margin-bottom="0in"/>
    </style:style>
    <style:style style:name="P256" style:family="paragraph" style:parent-style-name="Text_20_body" style:list-style-name="L153">
      <style:paragraph-properties fo:margin-top="0in" fo:margin-bottom="0in"/>
    </style:style>
    <style:style style:name="P257" style:family="paragraph" style:parent-style-name="Text_20_body" style:list-style-name="L154">
      <style:paragraph-properties fo:margin-top="0in" fo:margin-bottom="0in"/>
    </style:style>
    <style:style style:name="P258" style:family="paragraph" style:parent-style-name="Text_20_body" style:list-style-name="L155">
      <style:paragraph-properties fo:margin-top="0in" fo:margin-bottom="0in"/>
    </style:style>
    <style:style style:name="P259" style:family="paragraph" style:parent-style-name="Text_20_body" style:list-style-name="L156">
      <style:paragraph-properties fo:margin-top="0in" fo:margin-bottom="0in"/>
    </style:style>
    <style:style style:name="P260" style:family="paragraph" style:parent-style-name="Text_20_body" style:list-style-name="L157">
      <style:paragraph-properties fo:margin-top="0in" fo:margin-bottom="0in"/>
    </style:style>
    <style:style style:name="P261" style:family="paragraph" style:parent-style-name="Text_20_body" style:list-style-name="L158">
      <style:paragraph-properties fo:margin-top="0in" fo:margin-bottom="0in"/>
    </style:style>
    <style:style style:name="P262" style:family="paragraph" style:parent-style-name="Text_20_body" style:list-style-name="L159">
      <style:paragraph-properties fo:margin-top="0in" fo:margin-bottom="0in"/>
    </style:style>
    <style:style style:name="P263" style:family="paragraph" style:parent-style-name="Text_20_body" style:list-style-name="L160">
      <style:paragraph-properties fo:margin-top="0in" fo:margin-bottom="0in"/>
    </style:style>
    <style:style style:name="P264" style:family="paragraph" style:parent-style-name="Text_20_body" style:list-style-name="L161">
      <style:paragraph-properties fo:margin-top="0in" fo:margin-bottom="0in"/>
    </style:style>
    <style:style style:name="P265" style:family="paragraph" style:parent-style-name="Text_20_body" style:list-style-name="L162">
      <style:paragraph-properties fo:margin-top="0in" fo:margin-bottom="0in"/>
    </style:style>
    <style:style style:name="P266" style:family="paragraph" style:parent-style-name="Text_20_body" style:list-style-name="L163">
    </style:style>
    <style:style style:name="P267" style:family="paragraph" style:parent-style-name="Text_20_body" style:list-style-name="L164">
      <style:paragraph-properties fo:margin-top="0in" fo:margin-bottom="0in"/>
    </style:style>
    <style:style style:name="P268" style:family="paragraph" style:parent-style-name="Text_20_body" style:list-style-name="L165">
      <style:paragraph-properties fo:margin-top="0in" fo:margin-bottom="0in"/>
    </style:style>
    <style:style style:name="P269" style:family="paragraph" style:parent-style-name="Text_20_body" style:list-style-name="L166">
      <style:paragraph-properties fo:margin-top="0in" fo:margin-bottom="0in"/>
    </style:style>
    <style:style style:name="P270" style:family="paragraph" style:parent-style-name="Text_20_body" style:list-style-name="L167">
      <style:paragraph-properties fo:margin-top="0in" fo:margin-bottom="0in"/>
    </style:style>
    <style:style style:name="P271" style:family="paragraph" style:parent-style-name="Text_20_body" style:list-style-name="L168">
      <style:paragraph-properties fo:margin-top="0in" fo:margin-bottom="0in"/>
    </style:style>
    <style:style style:name="P272" style:family="paragraph" style:parent-style-name="Text_20_body" style:list-style-name="L169">
      <style:paragraph-properties fo:margin-top="0in" fo:margin-bottom="0in"/>
    </style:style>
    <style:style style:name="P273" style:family="paragraph" style:parent-style-name="Text_20_body" style:list-style-name="L170">
      <style:paragraph-properties fo:margin-top="0in" fo:margin-bottom="0in"/>
    </style:style>
    <style:style style:name="P274" style:family="paragraph" style:parent-style-name="Text_20_body" style:list-style-name="L171">
      <style:paragraph-properties fo:margin-top="0in" fo:margin-bottom="0in"/>
    </style:style>
    <style:style style:name="P275" style:family="paragraph" style:parent-style-name="Text_20_body" style:list-style-name="L172">
      <style:paragraph-properties fo:margin-top="0in" fo:margin-bottom="0in"/>
    </style:style>
    <style:style style:name="P276" style:family="paragraph" style:parent-style-name="Text_20_body" style:list-style-name="L173">
      <style:paragraph-properties fo:margin-top="0in" fo:margin-bottom="0in"/>
    </style:style>
    <style:style style:name="P277" style:family="paragraph" style:parent-style-name="Text_20_body" style:list-style-name="L174">
      <style:paragraph-properties fo:margin-top="0in" fo:margin-bottom="0in"/>
    </style:style>
    <style:style style:name="P278" style:family="paragraph" style:parent-style-name="Text_20_body" style:list-style-name="L175">
      <style:paragraph-properties fo:margin-top="0in" fo:margin-bottom="0in"/>
    </style:style>
    <style:style style:name="P279" style:family="paragraph" style:parent-style-name="Text_20_body" style:list-style-name="L176">
      <style:paragraph-properties fo:margin-top="0in" fo:margin-bottom="0in"/>
    </style:style>
    <style:style style:name="P280" style:family="paragraph" style:parent-style-name="Text_20_body" style:list-style-name="L177">
      <style:paragraph-properties fo:margin-top="0in" fo:margin-bottom="0in"/>
    </style:style>
    <style:style style:name="P281" style:family="paragraph" style:parent-style-name="Text_20_body" style:list-style-name="L178">
      <style:paragraph-properties fo:margin-top="0in" fo:margin-bottom="0in"/>
    </style:style>
    <style:style style:name="P282" style:family="paragraph" style:parent-style-name="Text_20_body" style:list-style-name="L179">
      <style:paragraph-properties fo:margin-top="0in" fo:margin-bottom="0in"/>
    </style:style>
    <style:style style:name="P283" style:family="paragraph" style:parent-style-name="Text_20_body" style:list-style-name="L180">
      <style:paragraph-properties fo:margin-top="0in" fo:margin-bottom="0in"/>
    </style:style>
    <style:style style:name="P284" style:family="paragraph" style:parent-style-name="Text_20_body" style:list-style-name="L181">
      <style:paragraph-properties fo:margin-top="0in" fo:margin-bottom="0in"/>
    </style:style>
    <style:style style:name="P285" style:family="paragraph" style:parent-style-name="Text_20_body" style:list-style-name="L182">
      <style:paragraph-properties fo:margin-top="0in" fo:margin-bottom="0in"/>
    </style:style>
    <style:style style:name="P286" style:family="paragraph" style:parent-style-name="Text_20_body" style:list-style-name="L183">
      <style:paragraph-properties fo:margin-top="0in" fo:margin-bottom="0in"/>
    </style:style>
    <style:style style:name="P287" style:family="paragraph" style:parent-style-name="Text_20_body" style:list-style-name="L184">
      <style:paragraph-properties fo:margin-top="0in" fo:margin-bottom="0in"/>
    </style:style>
    <style:style style:name="P288" style:family="paragraph" style:parent-style-name="Text_20_body" style:list-style-name="L185">
      <style:paragraph-properties fo:margin-top="0in" fo:margin-bottom="0in"/>
    </style:style>
    <style:style style:name="P289" style:family="paragraph" style:parent-style-name="Text_20_body" style:list-style-name="L186">
      <style:paragraph-properties fo:margin-top="0in" fo:margin-bottom="0in"/>
    </style:style>
    <style:style style:name="P290" style:family="paragraph" style:parent-style-name="Text_20_body" style:list-style-name="L187">
      <style:paragraph-properties fo:margin-top="0in" fo:margin-bottom="0in"/>
    </style:style>
    <style:style style:name="P291" style:family="paragraph" style:parent-style-name="Text_20_body" style:list-style-name="L188">
      <style:paragraph-properties fo:margin-top="0in" fo:margin-bottom="0in"/>
    </style:style>
    <style:style style:name="P292" style:family="paragraph" style:parent-style-name="Text_20_body" style:list-style-name="L189">
      <style:paragraph-properties fo:margin-top="0in" fo:margin-bottom="0in"/>
    </style:style>
    <style:style style:name="P293" style:family="paragraph" style:parent-style-name="Text_20_body" style:list-style-name="L190">
      <style:paragraph-properties fo:margin-top="0in" fo:margin-bottom="0in"/>
    </style:style>
    <style:style style:name="P294" style:family="paragraph" style:parent-style-name="Text_20_body" style:list-style-name="L191">
      <style:paragraph-properties fo:margin-top="0in" fo:margin-bottom="0in"/>
    </style:style>
    <style:style style:name="P295" style:family="paragraph" style:parent-style-name="Text_20_body" style:list-style-name="L192">
      <style:paragraph-properties fo:margin-top="0in" fo:margin-bottom="0in"/>
    </style:style>
    <style:style style:name="P296" style:family="paragraph" style:parent-style-name="Text_20_body" style:list-style-name="L193">
      <style:paragraph-properties fo:margin-top="0in" fo:margin-bottom="0in"/>
    </style:style>
    <style:style style:name="P297" style:family="paragraph" style:parent-style-name="Text_20_body" style:list-style-name="L194">
      <style:paragraph-properties fo:margin-top="0in" fo:margin-bottom="0in"/>
    </style:style>
    <style:style style:name="P298" style:family="paragraph" style:parent-style-name="Text_20_body" style:list-style-name="L195">
      <style:paragraph-properties fo:margin-top="0in" fo:margin-bottom="0in"/>
    </style:style>
    <style:style style:name="P299" style:family="paragraph" style:parent-style-name="Text_20_body" style:list-style-name="L196">
      <style:paragraph-properties fo:margin-top="0in" fo:margin-bottom="0in"/>
    </style:style>
    <style:style style:name="P300" style:family="paragraph" style:parent-style-name="Text_20_body" style:list-style-name="L197">
      <style:paragraph-properties fo:margin-top="0in" fo:margin-bottom="0in"/>
    </style:style>
    <style:style style:name="P301" style:family="paragraph" style:parent-style-name="Text_20_body" style:list-style-name="L198">
      <style:paragraph-properties fo:margin-top="0in" fo:margin-bottom="0in"/>
    </style:style>
    <style:style style:name="P302" style:family="paragraph" style:parent-style-name="Text_20_body" style:list-style-name="L199">
      <style:paragraph-properties fo:margin-top="0in" fo:margin-bottom="0in"/>
    </style:style>
    <style:style style:name="P303" style:family="paragraph" style:parent-style-name="Text_20_body" style:list-style-name="L200">
      <style:paragraph-properties fo:margin-top="0in" fo:margin-bottom="0in"/>
    </style:style>
    <style:style style:name="P304" style:family="paragraph" style:parent-style-name="Text_20_body" style:list-style-name="L201">
      <style:paragraph-properties fo:margin-top="0in" fo:margin-bottom="0in"/>
    </style:style>
    <style:style style:name="P305" style:family="paragraph" style:parent-style-name="Text_20_body" style:list-style-name="L202">
      <style:paragraph-properties fo:margin-top="0in" fo:margin-bottom="0in"/>
    </style:style>
    <style:style style:name="P306" style:family="paragraph" style:parent-style-name="Text_20_body" style:list-style-name="L203">
      <style:paragraph-properties fo:margin-top="0in" fo:margin-bottom="0in"/>
    </style:style>
    <style:style style:name="P307" style:family="paragraph" style:parent-style-name="Text_20_body" style:list-style-name="L204">
      <style:paragraph-properties fo:margin-top="0in" fo:margin-bottom="0in"/>
    </style:style>
    <style:style style:name="P308" style:family="paragraph" style:parent-style-name="Text_20_body" style:list-style-name="L205">
      <style:paragraph-properties fo:margin-top="0in" fo:margin-bottom="0in"/>
    </style:style>
    <style:style style:name="P309" style:family="paragraph" style:parent-style-name="Text_20_body" style:list-style-name="L206">
      <style:paragraph-properties fo:margin-top="0in" fo:margin-bottom="0in"/>
    </style:style>
    <style:style style:name="P310" style:family="paragraph" style:parent-style-name="Text_20_body" style:list-style-name="L207">
      <style:paragraph-properties fo:margin-top="0in" fo:margin-bottom="0in"/>
    </style:style>
    <style:style style:name="P311" style:family="paragraph" style:parent-style-name="Text_20_body" style:list-style-name="L208">
      <style:paragraph-properties fo:margin-top="0in" fo:margin-bottom="0in"/>
    </style:style>
    <style:style style:name="P312" style:family="paragraph" style:parent-style-name="Text_20_body" style:list-style-name="L209">
      <style:paragraph-properties fo:margin-top="0in" fo:margin-bottom="0in"/>
    </style:style>
    <style:style style:name="P313" style:family="paragraph" style:parent-style-name="Text_20_body" style:list-style-name="L210">
      <style:paragraph-properties fo:margin-top="0in" fo:margin-bottom="0in"/>
    </style:style>
    <style:style style:name="P314" style:family="paragraph" style:parent-style-name="Text_20_body" style:list-style-name="L211">
      <style:paragraph-properties fo:margin-top="0in" fo:margin-bottom="0in"/>
    </style:style>
    <style:style style:name="P315" style:family="paragraph" style:parent-style-name="Text_20_body" style:list-style-name="L212">
      <style:paragraph-properties fo:margin-top="0in" fo:margin-bottom="0in"/>
    </style:style>
    <style:style style:name="P316" style:family="paragraph" style:parent-style-name="Text_20_body" style:list-style-name="L213">
      <style:paragraph-properties fo:margin-top="0in" fo:margin-bottom="0in"/>
    </style:style>
    <style:style style:name="P317" style:family="paragraph" style:parent-style-name="Text_20_body" style:list-style-name="L214">
      <style:paragraph-properties fo:margin-top="0in" fo:margin-bottom="0in"/>
    </style:style>
    <style:style style:name="P318" style:family="paragraph" style:parent-style-name="Text_20_body" style:list-style-name="L215">
      <style:paragraph-properties fo:margin-top="0in" fo:margin-bottom="0in"/>
    </style:style>
    <style:style style:name="P319" style:family="paragraph" style:parent-style-name="Text_20_body" style:list-style-name="L216">
      <style:paragraph-properties fo:margin-top="0in" fo:margin-bottom="0in"/>
    </style:style>
    <style:style style:name="P320" style:family="paragraph" style:parent-style-name="Text_20_body" style:list-style-name="L217">
      <style:paragraph-properties fo:margin-top="0in" fo:margin-bottom="0in"/>
    </style:style>
    <style:style style:name="P321" style:family="paragraph" style:parent-style-name="Text_20_body" style:list-style-name="L218">
      <style:paragraph-properties fo:margin-top="0in" fo:margin-bottom="0in"/>
    </style:style>
    <style:style style:name="P322" style:family="paragraph" style:parent-style-name="Text_20_body" style:list-style-name="L219">
      <style:paragraph-properties fo:margin-top="0in" fo:margin-bottom="0in"/>
    </style:style>
    <style:style style:name="P323" style:family="paragraph" style:parent-style-name="Text_20_body" style:list-style-name="L220">
      <style:paragraph-properties fo:margin-top="0in" fo:margin-bottom="0in"/>
    </style:style>
    <style:style style:name="P324" style:family="paragraph" style:parent-style-name="Text_20_body" style:list-style-name="L221">
      <style:paragraph-properties fo:margin-top="0in" fo:margin-bottom="0in"/>
    </style:style>
    <style:style style:name="P325" style:family="paragraph" style:parent-style-name="Text_20_body" style:list-style-name="L222">
      <style:paragraph-properties fo:margin-top="0in" fo:margin-bottom="0in"/>
    </style:style>
    <style:style style:name="P326" style:family="paragraph" style:parent-style-name="Text_20_body" style:list-style-name="L223">
      <style:paragraph-properties fo:margin-top="0in" fo:margin-bottom="0in"/>
    </style:style>
    <style:style style:name="P327" style:family="paragraph" style:parent-style-name="Text_20_body" style:list-style-name="L224">
      <style:paragraph-properties fo:margin-top="0in" fo:margin-bottom="0in"/>
    </style:style>
    <style:style style:name="P328" style:family="paragraph" style:parent-style-name="Text_20_body" style:list-style-name="L225">
      <style:paragraph-properties fo:margin-top="0in" fo:margin-bottom="0in"/>
    </style:style>
    <style:style style:name="P329" style:family="paragraph" style:parent-style-name="Text_20_body" style:list-style-name="L226">
      <style:paragraph-properties fo:margin-top="0in" fo:margin-bottom="0in"/>
    </style:style>
    <style:style style:name="P330" style:family="paragraph" style:parent-style-name="Text_20_body" style:list-style-name="L227">
      <style:paragraph-properties fo:margin-top="0in" fo:margin-bottom="0in"/>
    </style:style>
    <style:style style:name="P331" style:family="paragraph" style:parent-style-name="Text_20_body" style:list-style-name="L228">
      <style:paragraph-properties fo:margin-top="0in" fo:margin-bottom="0in"/>
    </style:style>
    <style:style style:name="P332" style:family="paragraph" style:parent-style-name="Text_20_body" style:list-style-name="L229">
      <style:paragraph-properties fo:margin-top="0in" fo:margin-bottom="0in"/>
    </style:style>
    <style:style style:name="P333" style:family="paragraph" style:parent-style-name="Text_20_body" style:list-style-name="L230">
      <style:paragraph-properties fo:margin-top="0in" fo:margin-bottom="0in"/>
    </style:style>
    <style:style style:name="P334" style:family="paragraph" style:parent-style-name="Text_20_body" style:list-style-name="L231">
      <style:paragraph-properties fo:margin-top="0in" fo:margin-bottom="0in"/>
    </style:style>
    <style:style style:name="P335" style:family="paragraph" style:parent-style-name="Text_20_body" style:list-style-name="L232">
      <style:paragraph-properties fo:margin-top="0in" fo:margin-bottom="0in"/>
    </style:style>
    <style:style style:name="P336" style:family="paragraph" style:parent-style-name="Text_20_body" style:list-style-name="L233">
      <style:paragraph-properties fo:margin-top="0in" fo:margin-bottom="0in"/>
    </style:style>
    <style:style style:name="P337" style:family="paragraph" style:parent-style-name="Text_20_body" style:list-style-name="L234">
      <style:paragraph-properties fo:margin-top="0in" fo:margin-bottom="0in"/>
    </style:style>
    <style:style style:name="P338" style:family="paragraph" style:parent-style-name="Text_20_body" style:list-style-name="L235">
      <style:paragraph-properties fo:margin-top="0in" fo:margin-bottom="0in"/>
    </style:style>
    <style:style style:name="P339" style:family="paragraph" style:parent-style-name="Text_20_body" style:list-style-name="L236">
      <style:paragraph-properties fo:margin-top="0in" fo:margin-bottom="0in"/>
    </style:style>
    <style:style style:name="P340" style:family="paragraph" style:parent-style-name="Text_20_body" style:list-style-name="L237">
      <style:paragraph-properties fo:margin-top="0in" fo:margin-bottom="0in"/>
    </style:style>
    <style:style style:name="P341" style:family="paragraph" style:parent-style-name="Text_20_body" style:list-style-name="L238">
      <style:paragraph-properties fo:margin-top="0in" fo:margin-bottom="0in"/>
    </style:style>
    <style:style style:name="P342" style:family="paragraph" style:parent-style-name="Text_20_body" style:list-style-name="L239">
      <style:paragraph-properties fo:margin-top="0in" fo:margin-bottom="0in"/>
    </style:style>
    <style:style style:name="P343" style:family="paragraph" style:parent-style-name="Text_20_body" style:list-style-name="L240">
      <style:paragraph-properties fo:margin-top="0in" fo:margin-bottom="0in"/>
    </style:style>
    <style:style style:name="P344" style:family="paragraph" style:parent-style-name="Text_20_body" style:list-style-name="L241">
      <style:paragraph-properties fo:margin-top="0in" fo:margin-bottom="0in"/>
    </style:style>
    <style:style style:name="P345" style:family="paragraph" style:parent-style-name="Text_20_body" style:list-style-name="L242">
      <style:paragraph-properties fo:margin-top="0in" fo:margin-bottom="0in"/>
    </style:style>
    <style:style style:name="P346" style:family="paragraph" style:parent-style-name="Text_20_body" style:list-style-name="L243">
      <style:paragraph-properties fo:margin-top="0in" fo:margin-bottom="0in"/>
    </style:style>
    <style:style style:name="P347" style:family="paragraph" style:parent-style-name="Text_20_body" style:list-style-name="L244">
      <style:paragraph-properties fo:margin-top="0in" fo:margin-bottom="0in"/>
    </style:style>
    <style:style style:name="P348" style:family="paragraph" style:parent-style-name="Text_20_body" style:list-style-name="L245">
      <style:paragraph-properties fo:margin-top="0in" fo:margin-bottom="0in"/>
    </style:style>
    <style:style style:name="P349" style:family="paragraph" style:parent-style-name="Text_20_body" style:list-style-name="L246">
      <style:paragraph-properties fo:margin-top="0in" fo:margin-bottom="0in"/>
    </style:style>
    <style:style style:name="P350" style:family="paragraph" style:parent-style-name="Text_20_body" style:list-style-name="L247">
      <style:paragraph-properties fo:margin-top="0in" fo:margin-bottom="0in"/>
    </style:style>
    <style:style style:name="P351" style:family="paragraph" style:parent-style-name="Text_20_body" style:list-style-name="L248">
      <style:paragraph-properties fo:margin-top="0in" fo:margin-bottom="0in"/>
    </style:style>
    <style:style style:name="P352" style:family="paragraph" style:parent-style-name="Text_20_body" style:list-style-name="L249">
      <style:paragraph-properties fo:margin-top="0in" fo:margin-bottom="0in"/>
    </style:style>
    <style:style style:name="P353" style:family="paragraph" style:parent-style-name="Text_20_body" style:list-style-name="L250">
      <style:paragraph-properties fo:margin-top="0in" fo:margin-bottom="0in"/>
    </style:style>
    <style:style style:name="P354" style:family="paragraph" style:parent-style-name="Text_20_body" style:list-style-name="L251">
      <style:paragraph-properties fo:margin-top="0in" fo:margin-bottom="0in"/>
    </style:style>
    <style:style style:name="P355" style:family="paragraph" style:parent-style-name="Text_20_body" style:list-style-name="L252">
      <style:paragraph-properties fo:margin-top="0in" fo:margin-bottom="0in"/>
    </style:style>
    <style:style style:name="P356" style:family="paragraph" style:parent-style-name="Text_20_body" style:list-style-name="L253">
      <style:paragraph-properties fo:margin-top="0in" fo:margin-bottom="0in"/>
    </style:style>
    <style:style style:name="P357" style:family="paragraph" style:parent-style-name="Text_20_body" style:list-style-name="L254">
      <style:paragraph-properties fo:margin-top="0in" fo:margin-bottom="0in"/>
    </style:style>
    <style:style style:name="P358" style:family="paragraph" style:parent-style-name="Text_20_body" style:list-style-name="L255">
      <style:paragraph-properties fo:margin-top="0in" fo:margin-bottom="0in"/>
    </style:style>
    <style:style style:name="P359" style:family="paragraph" style:parent-style-name="Text_20_body" style:list-style-name="L256">
      <style:paragraph-properties fo:margin-top="0in" fo:margin-bottom="0in"/>
    </style:style>
    <style:style style:name="P360" style:family="paragraph" style:parent-style-name="Text_20_body" style:list-style-name="L257">
      <style:paragraph-properties fo:margin-top="0in" fo:margin-bottom="0in"/>
    </style:style>
    <style:style style:name="P361" style:family="paragraph" style:parent-style-name="Text_20_body" style:list-style-name="L258">
      <style:paragraph-properties fo:margin-top="0in" fo:margin-bottom="0in"/>
    </style:style>
    <style:style style:name="P362" style:family="paragraph" style:parent-style-name="Text_20_body" style:list-style-name="L259">
      <style:paragraph-properties fo:margin-top="0in" fo:margin-bottom="0in"/>
    </style:style>
    <style:style style:name="P363" style:family="paragraph" style:parent-style-name="Text_20_body" style:list-style-name="L260">
      <style:paragraph-properties fo:margin-top="0in" fo:margin-bottom="0in"/>
    </style:style>
    <style:style style:name="P364" style:family="paragraph" style:parent-style-name="Text_20_body" style:list-style-name="L261">
      <style:paragraph-properties fo:margin-top="0in" fo:margin-bottom="0in"/>
    </style:style>
    <style:style style:name="P365" style:family="paragraph" style:parent-style-name="Text_20_body" style:list-style-name="L262">
      <style:paragraph-properties fo:margin-top="0in" fo:margin-bottom="0in"/>
    </style:style>
    <style:style style:name="P366" style:family="paragraph" style:parent-style-name="Text_20_body" style:list-style-name="L263">
      <style:paragraph-properties fo:margin-top="0in" fo:margin-bottom="0in"/>
    </style:style>
    <style:style style:name="P367" style:family="paragraph" style:parent-style-name="Text_20_body" style:list-style-name="L264">
      <style:paragraph-properties fo:margin-top="0in" fo:margin-bottom="0in"/>
    </style:style>
    <style:style style:name="P368" style:family="paragraph" style:parent-style-name="Text_20_body" style:list-style-name="L265">
      <style:paragraph-properties fo:margin-top="0in" fo:margin-bottom="0in"/>
    </style:style>
    <style:style style:name="P369" style:family="paragraph" style:parent-style-name="Text_20_body" style:list-style-name="L266">
      <style:paragraph-properties fo:margin-top="0in" fo:margin-bottom="0in"/>
    </style:style>
    <style:style style:name="P370" style:family="paragraph" style:parent-style-name="Text_20_body" style:list-style-name="L267">
      <style:paragraph-properties fo:margin-top="0in" fo:margin-bottom="0in"/>
    </style:style>
    <style:style style:name="P371" style:family="paragraph" style:parent-style-name="Text_20_body" style:list-style-name="L268">
      <style:paragraph-properties fo:margin-top="0in" fo:margin-bottom="0in"/>
    </style:style>
    <style:style style:name="P372" style:family="paragraph" style:parent-style-name="Text_20_body" style:list-style-name="L269">
      <style:paragraph-properties fo:margin-top="0in" fo:margin-bottom="0in"/>
    </style:style>
    <style:style style:name="P373" style:family="paragraph" style:parent-style-name="Text_20_body" style:list-style-name="L270">
      <style:paragraph-properties fo:margin-top="0in" fo:margin-bottom="0in"/>
    </style:style>
    <style:style style:name="P374" style:family="paragraph" style:parent-style-name="Text_20_body" style:list-style-name="L271">
      <style:paragraph-properties fo:margin-top="0in" fo:margin-bottom="0in"/>
    </style:style>
    <style:style style:name="P375" style:family="paragraph" style:parent-style-name="Text_20_body" style:list-style-name="L272">
      <style:paragraph-properties fo:margin-top="0in" fo:margin-bottom="0in"/>
    </style:style>
    <style:style style:name="P376" style:family="paragraph" style:parent-style-name="Text_20_body" style:list-style-name="L273">
      <style:paragraph-properties fo:margin-top="0in" fo:margin-bottom="0in"/>
    </style:style>
    <style:style style:name="P377" style:family="paragraph" style:parent-style-name="Text_20_body" style:list-style-name="L274">
      <style:paragraph-properties fo:margin-top="0in" fo:margin-bottom="0in"/>
    </style:style>
    <style:style style:name="P378" style:family="paragraph" style:parent-style-name="Text_20_body" style:list-style-name="L275">
      <style:paragraph-properties fo:margin-top="0in" fo:margin-bottom="0in"/>
    </style:style>
    <style:style style:name="P379" style:family="paragraph" style:parent-style-name="Text_20_body" style:list-style-name="L276">
      <style:paragraph-properties fo:margin-top="0in" fo:margin-bottom="0in"/>
    </style:style>
    <style:style style:name="P380" style:family="paragraph" style:parent-style-name="Text_20_body" style:list-style-name="L277">
      <style:paragraph-properties fo:margin-top="0in" fo:margin-bottom="0in"/>
    </style:style>
    <style:style style:name="P381" style:family="paragraph" style:parent-style-name="Text_20_body" style:list-style-name="L278">
      <style:paragraph-properties fo:margin-top="0in" fo:margin-bottom="0in"/>
    </style:style>
    <style:style style:name="P382" style:family="paragraph" style:parent-style-name="Text_20_body" style:list-style-name="L279">
      <style:paragraph-properties fo:margin-top="0in" fo:margin-bottom="0in"/>
    </style:style>
    <style:style style:name="P383" style:family="paragraph" style:parent-style-name="Text_20_body" style:list-style-name="L280">
      <style:paragraph-properties fo:margin-top="0in" fo:margin-bottom="0in"/>
    </style:style>
    <style:style style:name="P384" style:family="paragraph" style:parent-style-name="Text_20_body" style:list-style-name="L281">
      <style:paragraph-properties fo:margin-top="0in" fo:margin-bottom="0in"/>
    </style:style>
    <style:style style:name="P385" style:family="paragraph" style:parent-style-name="Text_20_body" style:list-style-name="L282">
      <style:paragraph-properties fo:margin-top="0in" fo:margin-bottom="0in"/>
    </style:style>
    <style:style style:name="P386" style:family="paragraph" style:parent-style-name="Text_20_body" style:list-style-name="L283">
      <style:paragraph-properties fo:margin-top="0in" fo:margin-bottom="0in"/>
    </style:style>
    <style:style style:name="P387" style:family="paragraph" style:parent-style-name="Text_20_body" style:list-style-name="L284">
      <style:paragraph-properties fo:margin-top="0in" fo:margin-bottom="0in"/>
    </style:style>
    <style:style style:name="P388" style:family="paragraph" style:parent-style-name="Text_20_body" style:list-style-name="L285">
      <style:paragraph-properties fo:margin-top="0in" fo:margin-bottom="0in"/>
    </style:style>
    <style:style style:name="P389" style:family="paragraph" style:parent-style-name="Text_20_body" style:list-style-name="L286">
      <style:paragraph-properties fo:margin-top="0in" fo:margin-bottom="0in"/>
    </style:style>
    <style:style style:name="P390" style:family="paragraph" style:parent-style-name="Text_20_body" style:list-style-name="L287">
      <style:paragraph-properties fo:margin-top="0in" fo:margin-bottom="0in"/>
    </style:style>
    <style:style style:name="P391" style:family="paragraph" style:parent-style-name="Text_20_body" style:list-style-name="L288">
      <style:paragraph-properties fo:margin-top="0in" fo:margin-bottom="0in"/>
    </style:style>
    <style:style style:name="P392" style:family="paragraph" style:parent-style-name="Text_20_body" style:list-style-name="L289">
      <style:paragraph-properties fo:margin-top="0in" fo:margin-bottom="0in"/>
    </style:style>
    <style:style style:name="P393" style:family="paragraph" style:parent-style-name="Text_20_body" style:list-style-name="L290">
      <style:paragraph-properties fo:margin-top="0in" fo:margin-bottom="0in"/>
    </style:style>
    <style:style style:name="P394" style:family="paragraph" style:parent-style-name="Text_20_body" style:list-style-name="L291">
      <style:paragraph-properties fo:margin-top="0in" fo:margin-bottom="0in"/>
    </style:style>
    <style:style style:name="P395" style:family="paragraph" style:parent-style-name="Text_20_body" style:list-style-name="L292">
      <style:paragraph-properties fo:margin-top="0in" fo:margin-bottom="0in"/>
    </style:style>
    <style:style style:name="P396" style:family="paragraph" style:parent-style-name="Text_20_body" style:list-style-name="L293">
      <style:paragraph-properties fo:margin-top="0in" fo:margin-bottom="0in"/>
    </style:style>
    <style:style style:name="P397" style:family="paragraph" style:parent-style-name="Text_20_body" style:list-style-name="L294">
      <style:paragraph-properties fo:margin-top="0in" fo:margin-bottom="0in"/>
    </style:style>
    <style:style style:name="P398" style:family="paragraph" style:parent-style-name="Text_20_body" style:list-style-name="L295">
      <style:paragraph-properties fo:margin-top="0in" fo:margin-bottom="0in"/>
    </style:style>
    <style:style style:name="P399" style:family="paragraph" style:parent-style-name="Text_20_body" style:list-style-name="L296">
      <style:paragraph-properties fo:margin-top="0in" fo:margin-bottom="0in"/>
    </style:style>
    <style:style style:name="P400" style:family="paragraph" style:parent-style-name="Text_20_body" style:list-style-name="L297">
      <style:paragraph-properties fo:margin-top="0in" fo:margin-bottom="0in"/>
    </style:style>
    <style:style style:name="P401" style:family="paragraph" style:parent-style-name="Text_20_body" style:list-style-name="L298">
      <style:paragraph-properties fo:margin-top="0in" fo:margin-bottom="0in"/>
    </style:style>
    <style:style style:name="P402" style:family="paragraph" style:parent-style-name="Text_20_body" style:list-style-name="L299">
      <style:paragraph-properties fo:margin-top="0in" fo:margin-bottom="0in"/>
    </style:style>
    <style:style style:name="P403" style:family="paragraph" style:parent-style-name="Text_20_body" style:list-style-name="L300">
      <style:paragraph-properties fo:margin-top="0in" fo:margin-bottom="0in"/>
    </style:style>
    <style:style style:name="P404" style:family="paragraph" style:parent-style-name="Text_20_body" style:list-style-name="L301">
      <style:paragraph-properties fo:margin-top="0in" fo:margin-bottom="0in"/>
    </style:style>
    <style:style style:name="P405" style:family="paragraph" style:parent-style-name="Text_20_body" style:list-style-name="L302">
      <style:paragraph-properties fo:margin-top="0in" fo:margin-bottom="0in"/>
    </style:style>
    <style:style style:name="P406" style:family="paragraph" style:parent-style-name="Text_20_body" style:list-style-name="L303">
      <style:paragraph-properties fo:margin-top="0in" fo:margin-bottom="0in"/>
    </style:style>
    <style:style style:name="P407" style:family="paragraph" style:parent-style-name="Text_20_body" style:list-style-name="L304">
      <style:paragraph-properties fo:margin-top="0in" fo:margin-bottom="0in"/>
    </style:style>
    <style:style style:name="P408" style:family="paragraph" style:parent-style-name="Text_20_body" style:list-style-name="L305">
      <style:paragraph-properties fo:margin-top="0in" fo:margin-bottom="0in"/>
    </style:style>
    <style:style style:name="P409" style:family="paragraph" style:parent-style-name="Text_20_body" style:list-style-name="L306">
      <style:paragraph-properties fo:margin-top="0in" fo:margin-bottom="0in"/>
    </style:style>
    <style:style style:name="P410" style:family="paragraph" style:parent-style-name="Text_20_body" style:list-style-name="L307">
      <style:paragraph-properties fo:margin-top="0in" fo:margin-bottom="0in"/>
    </style:style>
    <style:style style:name="P411" style:family="paragraph" style:parent-style-name="Text_20_body" style:list-style-name="L308">
      <style:paragraph-properties fo:margin-top="0in" fo:margin-bottom="0in"/>
    </style:style>
    <style:style style:name="P412" style:family="paragraph" style:parent-style-name="Text_20_body" style:list-style-name="L309">
      <style:paragraph-properties fo:margin-top="0in" fo:margin-bottom="0in"/>
    </style:style>
    <style:style style:name="P413" style:family="paragraph" style:parent-style-name="Text_20_body" style:list-style-name="L310">
      <style:paragraph-properties fo:margin-top="0in" fo:margin-bottom="0in"/>
    </style:style>
    <style:style style:name="P414" style:family="paragraph" style:parent-style-name="Text_20_body" style:list-style-name="L311">
      <style:paragraph-properties fo:margin-top="0in" fo:margin-bottom="0in"/>
    </style:style>
    <style:style style:name="P415" style:family="paragraph" style:parent-style-name="Text_20_body" style:list-style-name="L312">
      <style:paragraph-properties fo:margin-top="0in" fo:margin-bottom="0in"/>
    </style:style>
    <style:style style:name="P416" style:family="paragraph" style:parent-style-name="Text_20_body" style:list-style-name="L313">
      <style:paragraph-properties fo:margin-top="0in" fo:margin-bottom="0in"/>
    </style:style>
    <style:style style:name="P417" style:family="paragraph" style:parent-style-name="Text_20_body" style:list-style-name="L314">
      <style:paragraph-properties fo:margin-top="0in" fo:margin-bottom="0in"/>
    </style:style>
    <style:style style:name="P418" style:family="paragraph" style:parent-style-name="Text_20_body" style:list-style-name="L315">
      <style:paragraph-properties fo:margin-top="0in" fo:margin-bottom="0in"/>
    </style:style>
    <style:style style:name="P419" style:family="paragraph" style:parent-style-name="Text_20_body" style:list-style-name="L316">
      <style:paragraph-properties fo:margin-top="0in" fo:margin-bottom="0in"/>
    </style:style>
    <style:style style:name="P420" style:family="paragraph" style:parent-style-name="Text_20_body" style:list-style-name="L317">
      <style:paragraph-properties fo:margin-top="0in" fo:margin-bottom="0in"/>
    </style:style>
    <style:style style:name="P421" style:family="paragraph" style:parent-style-name="Text_20_body" style:list-style-name="L318">
      <style:paragraph-properties fo:margin-top="0in" fo:margin-bottom="0in"/>
    </style:style>
    <style:style style:name="P422" style:family="paragraph" style:parent-style-name="Text_20_body" style:list-style-name="L319">
      <style:paragraph-properties fo:margin-top="0in" fo:margin-bottom="0in"/>
    </style:style>
    <style:style style:name="P423" style:family="paragraph" style:parent-style-name="Text_20_body" style:list-style-name="L320">
      <style:paragraph-properties fo:margin-top="0in" fo:margin-bottom="0in"/>
    </style:style>
    <style:style style:name="P424" style:family="paragraph" style:parent-style-name="Text_20_body" style:list-style-name="L321">
      <style:paragraph-properties fo:margin-top="0in" fo:margin-bottom="0in"/>
    </style:style>
    <style:style style:name="P425" style:family="paragraph" style:parent-style-name="Text_20_body" style:list-style-name="L322">
      <style:paragraph-properties fo:margin-top="0in" fo:margin-bottom="0in"/>
    </style:style>
    <style:style style:name="P426" style:family="paragraph" style:parent-style-name="Text_20_body" style:list-style-name="L323">
      <style:paragraph-properties fo:margin-top="0in" fo:margin-bottom="0in"/>
    </style:style>
    <style:style style:name="P427" style:family="paragraph" style:parent-style-name="Text_20_body" style:list-style-name="L324">
      <style:paragraph-properties fo:margin-top="0in" fo:margin-bottom="0in"/>
    </style:style>
    <style:style style:name="P428" style:family="paragraph" style:parent-style-name="Text_20_body" style:list-style-name="L325">
      <style:paragraph-properties fo:margin-top="0in" fo:margin-bottom="0in"/>
    </style:style>
    <style:style style:name="P429" style:family="paragraph" style:parent-style-name="Text_20_body" style:list-style-name="L326">
      <style:paragraph-properties fo:margin-top="0in" fo:margin-bottom="0in"/>
    </style:style>
    <style:style style:name="P430" style:family="paragraph" style:parent-style-name="Text_20_body" style:list-style-name="L327">
      <style:paragraph-properties fo:margin-top="0in" fo:margin-bottom="0in"/>
    </style:style>
    <style:style style:name="P431" style:family="paragraph" style:parent-style-name="Text_20_body" style:list-style-name="L328">
      <style:paragraph-properties fo:margin-top="0in" fo:margin-bottom="0in"/>
    </style:style>
    <style:style style:name="P432" style:family="paragraph" style:parent-style-name="Text_20_body" style:list-style-name="L329">
      <style:paragraph-properties fo:margin-top="0in" fo:margin-bottom="0in"/>
    </style:style>
    <style:style style:name="P433" style:family="paragraph" style:parent-style-name="Text_20_body" style:list-style-name="L330">
      <style:paragraph-properties fo:margin-top="0in" fo:margin-bottom="0in"/>
    </style:style>
    <style:style style:name="P434" style:family="paragraph" style:parent-style-name="Text_20_body" style:list-style-name="L331">
      <style:paragraph-properties fo:margin-top="0in" fo:margin-bottom="0in"/>
    </style:style>
    <style:style style:name="P435" style:family="paragraph" style:parent-style-name="Text_20_body" style:list-style-name="L332">
      <style:paragraph-properties fo:margin-top="0in" fo:margin-bottom="0in"/>
    </style:style>
    <style:style style:name="P436" style:family="paragraph" style:parent-style-name="Text_20_body" style:list-style-name="L333">
      <style:paragraph-properties fo:margin-top="0in" fo:margin-bottom="0in"/>
    </style:style>
    <style:style style:name="P437" style:family="paragraph" style:parent-style-name="Text_20_body" style:list-style-name="L334">
      <style:paragraph-properties fo:margin-top="0in" fo:margin-bottom="0in"/>
    </style:style>
    <style:style style:name="P438" style:family="paragraph" style:parent-style-name="Text_20_body" style:list-style-name="L335">
      <style:paragraph-properties fo:margin-top="0in" fo:margin-bottom="0in"/>
    </style:style>
    <style:style style:name="P439" style:family="paragraph" style:parent-style-name="Text_20_body" style:list-style-name="L336">
      <style:paragraph-properties fo:margin-top="0in" fo:margin-bottom="0in"/>
    </style:style>
    <style:style style:name="P440" style:family="paragraph" style:parent-style-name="Text_20_body" style:list-style-name="L337">
      <style:paragraph-properties fo:margin-top="0in" fo:margin-bottom="0in"/>
    </style:style>
    <style:style style:name="P441" style:family="paragraph" style:parent-style-name="Text_20_body" style:list-style-name="L338">
      <style:paragraph-properties fo:margin-top="0in" fo:margin-bottom="0in"/>
    </style:style>
    <style:style style:name="P442" style:family="paragraph" style:parent-style-name="Text_20_body" style:list-style-name="L339">
      <style:paragraph-properties fo:margin-top="0in" fo:margin-bottom="0in"/>
    </style:style>
    <style:style style:name="P443" style:family="paragraph" style:parent-style-name="Text_20_body" style:list-style-name="L340">
      <style:paragraph-properties fo:margin-top="0in" fo:margin-bottom="0in"/>
    </style:style>
    <style:style style:name="P444" style:family="paragraph" style:parent-style-name="Text_20_body" style:list-style-name="L341">
      <style:paragraph-properties fo:margin-top="0in" fo:margin-bottom="0in"/>
    </style:style>
    <style:style style:name="P445" style:family="paragraph" style:parent-style-name="Text_20_body" style:list-style-name="L342">
      <style:paragraph-properties fo:margin-top="0in" fo:margin-bottom="0in"/>
    </style:style>
    <style:style style:name="P446" style:family="paragraph" style:parent-style-name="Text_20_body" style:list-style-name="L343">
      <style:paragraph-properties fo:margin-top="0in" fo:margin-bottom="0in"/>
    </style:style>
    <style:style style:name="P447" style:family="paragraph" style:parent-style-name="Text_20_body" style:list-style-name="L344">
      <style:paragraph-properties fo:margin-top="0in" fo:margin-bottom="0in"/>
    </style:style>
    <style:style style:name="P448" style:family="paragraph" style:parent-style-name="Text_20_body" style:list-style-name="L345">
      <style:paragraph-properties fo:margin-top="0in" fo:margin-bottom="0in"/>
    </style:style>
    <style:style style:name="P449" style:family="paragraph" style:parent-style-name="Text_20_body" style:list-style-name="L346">
      <style:paragraph-properties fo:margin-top="0in" fo:margin-bottom="0in"/>
    </style:style>
    <style:style style:name="P450" style:family="paragraph" style:parent-style-name="Text_20_body" style:list-style-name="L347">
      <style:paragraph-properties fo:margin-top="0in" fo:margin-bottom="0in"/>
    </style:style>
    <style:style style:name="P451" style:family="paragraph" style:parent-style-name="Text_20_body" style:list-style-name="L348">
      <style:paragraph-properties fo:margin-top="0in" fo:margin-bottom="0in"/>
    </style:style>
    <style:style style:name="P452" style:family="paragraph" style:parent-style-name="Text_20_body" style:list-style-name="L349">
      <style:paragraph-properties fo:margin-top="0in" fo:margin-bottom="0in"/>
    </style:style>
    <style:style style:name="P453" style:family="paragraph" style:parent-style-name="Text_20_body" style:list-style-name="L350">
      <style:paragraph-properties fo:margin-top="0in" fo:margin-bottom="0in"/>
    </style:style>
    <style:style style:name="P454" style:family="paragraph" style:parent-style-name="Text_20_body" style:list-style-name="L351">
      <style:paragraph-properties fo:margin-top="0in" fo:margin-bottom="0in"/>
    </style:style>
    <style:style style:name="P455" style:family="paragraph" style:parent-style-name="Text_20_body" style:list-style-name="L352">
      <style:paragraph-properties fo:margin-top="0in" fo:margin-bottom="0in"/>
    </style:style>
    <style:style style:name="P456" style:family="paragraph" style:parent-style-name="Text_20_body" style:list-style-name="L353">
      <style:paragraph-properties fo:margin-top="0in" fo:margin-bottom="0in"/>
    </style:style>
    <style:style style:name="P457" style:family="paragraph" style:parent-style-name="Text_20_body" style:list-style-name="L354">
      <style:paragraph-properties fo:margin-top="0in" fo:margin-bottom="0in"/>
    </style:style>
    <style:style style:name="P458" style:family="paragraph" style:parent-style-name="Text_20_body" style:list-style-name="L355">
      <style:paragraph-properties fo:margin-top="0in" fo:margin-bottom="0in"/>
    </style:style>
    <style:style style:name="P459" style:family="paragraph" style:parent-style-name="Text_20_body" style:list-style-name="L356">
      <style:paragraph-properties fo:margin-top="0in" fo:margin-bottom="0in"/>
    </style:style>
    <style:style style:name="P460" style:family="paragraph" style:parent-style-name="Text_20_body" style:list-style-name="L357">
      <style:paragraph-properties fo:margin-top="0in" fo:margin-bottom="0in"/>
    </style:style>
    <style:style style:name="P461" style:family="paragraph" style:parent-style-name="Text_20_body" style:list-style-name="L358">
      <style:paragraph-properties fo:margin-top="0in" fo:margin-bottom="0in"/>
    </style:style>
    <style:style style:name="P462" style:family="paragraph" style:parent-style-name="Text_20_body" style:list-style-name="L359">
      <style:paragraph-properties fo:margin-top="0in" fo:margin-bottom="0in"/>
    </style:style>
    <style:style style:name="P463" style:family="paragraph" style:parent-style-name="Text_20_body" style:list-style-name="L360">
      <style:paragraph-properties fo:margin-top="0in" fo:margin-bottom="0in"/>
    </style:style>
    <style:style style:name="P464" style:family="paragraph" style:parent-style-name="Text_20_body" style:list-style-name="L361">
      <style:paragraph-properties fo:margin-top="0in" fo:margin-bottom="0in"/>
    </style:style>
    <style:style style:name="P465" style:family="paragraph" style:parent-style-name="Text_20_body" style:list-style-name="L362">
      <style:paragraph-properties fo:margin-top="0in" fo:margin-bottom="0in"/>
    </style:style>
    <style:style style:name="P466" style:family="paragraph" style:parent-style-name="Text_20_body" style:list-style-name="L363">
      <style:paragraph-properties fo:margin-top="0in" fo:margin-bottom="0in"/>
    </style:style>
    <style:style style:name="P467" style:family="paragraph" style:parent-style-name="Text_20_body" style:list-style-name="L364">
      <style:paragraph-properties fo:margin-top="0in" fo:margin-bottom="0in"/>
    </style:style>
    <style:style style:name="P468" style:family="paragraph" style:parent-style-name="Text_20_body" style:list-style-name="L365">
      <style:paragraph-properties fo:margin-top="0in" fo:margin-bottom="0in"/>
    </style:style>
    <style:style style:name="P469" style:family="paragraph" style:parent-style-name="Text_20_body" style:list-style-name="L366">
      <style:paragraph-properties fo:margin-top="0in" fo:margin-bottom="0in"/>
    </style:style>
    <style:style style:name="P470" style:family="paragraph" style:parent-style-name="Text_20_body" style:list-style-name="L367">
      <style:paragraph-properties fo:margin-top="0in" fo:margin-bottom="0in"/>
    </style:style>
    <style:style style:name="P471" style:family="paragraph" style:parent-style-name="Text_20_body" style:list-style-name="L368">
      <style:paragraph-properties fo:margin-top="0in" fo:margin-bottom="0in"/>
    </style:style>
    <style:style style:name="P472" style:family="paragraph" style:parent-style-name="Text_20_body" style:list-style-name="L369">
      <style:paragraph-properties fo:margin-top="0in" fo:margin-bottom="0in"/>
    </style:style>
    <style:style style:name="P473" style:family="paragraph" style:parent-style-name="Text_20_body" style:list-style-name="L370">
      <style:paragraph-properties fo:margin-top="0in" fo:margin-bottom="0in"/>
    </style:style>
    <style:style style:name="P474" style:family="paragraph" style:parent-style-name="Text_20_body" style:list-style-name="L371">
      <style:paragraph-properties fo:margin-top="0in" fo:margin-bottom="0in"/>
    </style:style>
    <style:style style:name="P475" style:family="paragraph" style:parent-style-name="Text_20_body" style:list-style-name="L372">
      <style:paragraph-properties fo:margin-top="0in" fo:margin-bottom="0in"/>
    </style:style>
    <style:style style:name="P476" style:family="paragraph" style:parent-style-name="Text_20_body" style:list-style-name="L373">
      <style:paragraph-properties fo:margin-top="0in" fo:margin-bottom="0in"/>
    </style:style>
    <style:style style:name="P477" style:family="paragraph" style:parent-style-name="Text_20_body" style:list-style-name="L374">
      <style:paragraph-properties fo:margin-top="0in" fo:margin-bottom="0in"/>
    </style:style>
    <style:style style:name="P478" style:family="paragraph" style:parent-style-name="Text_20_body" style:list-style-name="L375">
      <style:paragraph-properties fo:margin-top="0in" fo:margin-bottom="0in"/>
    </style:style>
    <style:style style:name="P479" style:family="paragraph" style:parent-style-name="Text_20_body" style:list-style-name="L376">
      <style:paragraph-properties fo:margin-top="0in" fo:margin-bottom="0in"/>
    </style:style>
    <style:style style:name="P480" style:family="paragraph" style:parent-style-name="Text_20_body" style:list-style-name="L377">
      <style:paragraph-properties fo:margin-top="0in" fo:margin-bottom="0in"/>
    </style:style>
    <style:style style:name="P481" style:family="paragraph" style:parent-style-name="Text_20_body" style:list-style-name="L378">
      <style:paragraph-properties fo:margin-top="0in" fo:margin-bottom="0in"/>
    </style:style>
    <style:style style:name="P482" style:family="paragraph" style:parent-style-name="Text_20_body" style:list-style-name="L379">
      <style:paragraph-properties fo:margin-top="0in" fo:margin-bottom="0in"/>
    </style:style>
    <style:style style:name="P483" style:family="paragraph" style:parent-style-name="Text_20_body" style:list-style-name="L380">
      <style:paragraph-properties fo:margin-top="0in" fo:margin-bottom="0in"/>
    </style:style>
    <style:style style:name="P484" style:family="paragraph" style:parent-style-name="Text_20_body" style:list-style-name="L381">
      <style:paragraph-properties fo:margin-top="0in" fo:margin-bottom="0in"/>
    </style:style>
    <style:style style:name="P485" style:family="paragraph" style:parent-style-name="Text_20_body" style:list-style-name="L382">
      <style:paragraph-properties fo:margin-top="0in" fo:margin-bottom="0in"/>
    </style:style>
    <style:style style:name="P486" style:family="paragraph" style:parent-style-name="Text_20_body" style:list-style-name="L383">
      <style:paragraph-properties fo:margin-top="0in" fo:margin-bottom="0in"/>
    </style:style>
    <style:style style:name="P487" style:family="paragraph" style:parent-style-name="Text_20_body" style:list-style-name="L384">
      <style:paragraph-properties fo:margin-top="0in" fo:margin-bottom="0in"/>
    </style:style>
    <style:style style:name="P488" style:family="paragraph" style:parent-style-name="Text_20_body" style:list-style-name="L385">
      <style:paragraph-properties fo:margin-top="0in" fo:margin-bottom="0in"/>
    </style:style>
    <style:style style:name="P489" style:family="paragraph" style:parent-style-name="Text_20_body" style:list-style-name="L386">
      <style:paragraph-properties fo:margin-top="0in" fo:margin-bottom="0in"/>
    </style:style>
    <style:style style:name="P490" style:family="paragraph" style:parent-style-name="Text_20_body" style:list-style-name="L387">
      <style:paragraph-properties fo:margin-top="0in" fo:margin-bottom="0in"/>
    </style:style>
    <style:style style:name="P491" style:family="paragraph" style:parent-style-name="Text_20_body" style:list-style-name="L388">
      <style:paragraph-properties fo:margin-top="0in" fo:margin-bottom="0in"/>
    </style:style>
    <style:style style:name="P492" style:family="paragraph" style:parent-style-name="Text_20_body" style:list-style-name="L389">
      <style:paragraph-properties fo:margin-top="0in" fo:margin-bottom="0in"/>
    </style:style>
    <style:style style:name="P493" style:family="paragraph" style:parent-style-name="Text_20_body" style:list-style-name="L390">
      <style:paragraph-properties fo:margin-top="0in" fo:margin-bottom="0in"/>
    </style:style>
    <style:style style:name="P494" style:family="paragraph" style:parent-style-name="Text_20_body" style:list-style-name="L391">
      <style:paragraph-properties fo:margin-top="0in" fo:margin-bottom="0in"/>
    </style:style>
    <style:style style:name="P495" style:family="paragraph" style:parent-style-name="Text_20_body" style:list-style-name="L392">
      <style:paragraph-properties fo:margin-top="0in" fo:margin-bottom="0in"/>
    </style:style>
    <style:style style:name="P496" style:family="paragraph" style:parent-style-name="Text_20_body" style:list-style-name="L393">
      <style:paragraph-properties fo:margin-top="0in" fo:margin-bottom="0in"/>
    </style:style>
    <style:style style:name="P497" style:family="paragraph" style:parent-style-name="Text_20_body" style:list-style-name="L394">
      <style:paragraph-properties fo:margin-top="0in" fo:margin-bottom="0in"/>
    </style:style>
    <style:style style:name="P498" style:family="paragraph" style:parent-style-name="Text_20_body" style:list-style-name="L395">
      <style:paragraph-properties fo:margin-top="0in" fo:margin-bottom="0in"/>
    </style:style>
    <style:style style:name="P499" style:family="paragraph" style:parent-style-name="Text_20_body" style:list-style-name="L396">
      <style:paragraph-properties fo:margin-top="0in" fo:margin-bottom="0in"/>
    </style:style>
    <style:style style:name="P500" style:family="paragraph" style:parent-style-name="Text_20_body" style:list-style-name="L397">
      <style:paragraph-properties fo:margin-top="0in" fo:margin-bottom="0in"/>
    </style:style>
    <style:style style:name="P501" style:family="paragraph" style:parent-style-name="Text_20_body" style:list-style-name="L398">
      <style:paragraph-properties fo:margin-top="0in" fo:margin-bottom="0in"/>
    </style:style>
    <style:style style:name="P502" style:family="paragraph" style:parent-style-name="Text_20_body" style:list-style-name="L399">
      <style:paragraph-properties fo:margin-top="0in" fo:margin-bottom="0in"/>
    </style:style>
    <style:style style:name="P503" style:family="paragraph" style:parent-style-name="Text_20_body" style:list-style-name="L400">
      <style:paragraph-properties fo:margin-top="0in" fo:margin-bottom="0in"/>
    </style:style>
    <style:style style:name="P504" style:family="paragraph" style:parent-style-name="Text_20_body" style:list-style-name="L401">
      <style:paragraph-properties fo:margin-top="0in" fo:margin-bottom="0in"/>
    </style:style>
    <style:style style:name="P505" style:family="paragraph" style:parent-style-name="Text_20_body" style:list-style-name="L402">
      <style:paragraph-properties fo:margin-top="0in" fo:margin-bottom="0in"/>
    </style:style>
    <style:style style:name="P506" style:family="paragraph" style:parent-style-name="Text_20_body" style:list-style-name="L403">
      <style:paragraph-properties fo:margin-top="0in" fo:margin-bottom="0in"/>
    </style:style>
    <style:style style:name="P507" style:family="paragraph" style:parent-style-name="Text_20_body" style:list-style-name="L404">
      <style:paragraph-properties fo:margin-top="0in" fo:margin-bottom="0in"/>
    </style:style>
    <style:style style:name="P508" style:family="paragraph" style:parent-style-name="Text_20_body" style:list-style-name="L405">
      <style:paragraph-properties fo:margin-top="0in" fo:margin-bottom="0in"/>
    </style:style>
    <style:style style:name="P509" style:family="paragraph" style:parent-style-name="Text_20_body" style:list-style-name="L406">
      <style:paragraph-properties fo:margin-top="0in" fo:margin-bottom="0in"/>
    </style:style>
    <style:style style:name="P510" style:family="paragraph" style:parent-style-name="Text_20_body" style:list-style-name="L407">
      <style:paragraph-properties fo:margin-top="0in" fo:margin-bottom="0in"/>
    </style:style>
    <style:style style:name="P511" style:family="paragraph" style:parent-style-name="Text_20_body" style:list-style-name="L408">
      <style:paragraph-properties fo:margin-top="0in" fo:margin-bottom="0in"/>
    </style:style>
    <style:style style:name="P512" style:family="paragraph" style:parent-style-name="Text_20_body" style:list-style-name="L409">
      <style:paragraph-properties fo:margin-top="0in" fo:margin-bottom="0in"/>
    </style:style>
    <style:style style:name="P513" style:family="paragraph" style:parent-style-name="Text_20_body" style:list-style-name="L410">
      <style:paragraph-properties fo:margin-top="0in" fo:margin-bottom="0in"/>
    </style:style>
    <style:style style:name="P514" style:family="paragraph" style:parent-style-name="Text_20_body" style:list-style-name="L411">
      <style:paragraph-properties fo:margin-top="0in" fo:margin-bottom="0in"/>
    </style:style>
    <style:style style:name="P515" style:family="paragraph" style:parent-style-name="Text_20_body" style:list-style-name="L412">
      <style:paragraph-properties fo:margin-top="0in" fo:margin-bottom="0in"/>
    </style:style>
    <style:style style:name="P516" style:family="paragraph" style:parent-style-name="Text_20_body" style:list-style-name="L413">
      <style:paragraph-properties fo:margin-top="0in" fo:margin-bottom="0in"/>
    </style:style>
    <style:style style:name="P517" style:family="paragraph" style:parent-style-name="Text_20_body" style:list-style-name="L414">
      <style:paragraph-properties fo:margin-top="0in" fo:margin-bottom="0in"/>
    </style:style>
    <style:style style:name="P518" style:family="paragraph" style:parent-style-name="Text_20_body" style:list-style-name="L415">
      <style:paragraph-properties fo:margin-top="0in" fo:margin-bottom="0in"/>
    </style:style>
    <style:style style:name="P519" style:family="paragraph" style:parent-style-name="Text_20_body" style:list-style-name="L416">
      <style:paragraph-properties fo:margin-top="0in" fo:margin-bottom="0in"/>
    </style:style>
    <style:style style:name="P520" style:family="paragraph" style:parent-style-name="Text_20_body" style:list-style-name="L417">
      <style:paragraph-properties fo:margin-top="0in" fo:margin-bottom="0in"/>
    </style:style>
    <style:style style:name="P521" style:family="paragraph" style:parent-style-name="Text_20_body" style:list-style-name="L418">
      <style:paragraph-properties fo:margin-top="0in" fo:margin-bottom="0in"/>
    </style:style>
    <style:style style:name="P522" style:family="paragraph" style:parent-style-name="Text_20_body" style:list-style-name="L419">
      <style:paragraph-properties fo:margin-top="0in" fo:margin-bottom="0in"/>
    </style:style>
    <style:style style:name="P523" style:family="paragraph" style:parent-style-name="Text_20_body" style:list-style-name="L420">
      <style:paragraph-properties fo:margin-top="0in" fo:margin-bottom="0in"/>
    </style:style>
    <style:style style:name="P524" style:family="paragraph" style:parent-style-name="Text_20_body" style:list-style-name="L421">
      <style:paragraph-properties fo:margin-top="0in" fo:margin-bottom="0in"/>
    </style:style>
    <style:style style:name="P525" style:family="paragraph" style:parent-style-name="Text_20_body" style:list-style-name="L422">
      <style:paragraph-properties fo:margin-top="0in" fo:margin-bottom="0in"/>
    </style:style>
    <style:style style:name="P526" style:family="paragraph" style:parent-style-name="Text_20_body" style:list-style-name="L423">
      <style:paragraph-properties fo:margin-top="0in" fo:margin-bottom="0in"/>
    </style:style>
    <style:style style:name="P527" style:family="paragraph" style:parent-style-name="Text_20_body" style:list-style-name="L42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rel-width="100%"/>
    </style:style>
    <style:style style:name="Table3.A" style:family="table-column">
      <style:table-column-properties style:rel-column-width="5461*"/>
    </style:style>
    <style:style style:name="Table3.B" style:family="table-column">
      <style:table-column-properties style:rel-column-width="5461*"/>
    </style:style>
    <style:style style:name="Table3.C" style:family="table-column">
      <style:table-column-properties style:rel-column-width="5461*"/>
    </style:style>
    <style:style style:name="Table3.D" style:family="table-column">
      <style:table-column-properties style:rel-column-width="5461*"/>
    </style:style>
    <style:style style:name="Table3.E" style:family="table-column">
      <style:table-column-properties style:rel-column-width="5461*"/>
    </style:style>
    <style:style style:name="Table3.F" style:family="table-column">
      <style:table-column-properties style:rel-column-width="5461*"/>
    </style:style>
    <style:style style:name="Table3.G" style:family="table-column">
      <style:table-column-properties style:rel-column-width="5461*"/>
    </style:style>
    <style:style style:name="Table3.H" style:family="table-column">
      <style:table-column-properties style:rel-column-width="5461*"/>
    </style:style>
    <style:style style:name="Table3.I" style:family="table-column">
      <style:table-column-properties style:rel-column-width="5461*"/>
    </style:style>
    <style:style style:name="Table3.J" style:family="table-column">
      <style:table-column-properties style:rel-column-width="5461*"/>
    </style:style>
    <style:style style:name="Table3.K" style:family="table-column">
      <style:table-column-properties style:rel-column-width="5461*"/>
    </style:style>
    <style:style style:name="Table3.L" style:family="table-column">
      <style:table-column-properties style:rel-column-width="5461*"/>
    </style:style>
  </office:automatic-styles>
  <office:body>
    <office:text>
      <text:p text:style-name="Title">Marethar</text:p>
      <text:p text:style-name="Subtitle">Ambientazione Gunpowder MedFantasy</text:p>
      <text:p text:style-name="Author">Orizzonti GDR</text:p>
      <text:p text:style-name="Text_20_body">Questa è la seconda edizione di Marethar: un mondo vivo, contraddittorio, e pronto a crollare nel momento in cui iniziate a giocarci.</text:p>
      <text:p text:style-name="Text_20_body">Rispetto alla prima versione, ogni sezione è stata ripensata per offrire materiale più reattivo: meno lore da memorizzare, più tensioni da far esplodere. Le culture sono più sfaccettate, le religioni più pericolose, le mappe più incerte.</text:p>
      <text:p text:style-name="Text_20_body">Non ci sono verità ufficiali, metatrame da rispettare o personaggi canonici da salvare. Ci sono rovine che vi guardano, culti che vi giudicano e città che cambiano mentre parlate.</text:p>
      <text:p text:style-name="Text_20_body">Il Marethar non aspetta. Entra, e comincia a viverlo.</text:p>
      <text:p text:style-name="Text_20_body"><text:span text:style-name="T1">Dedicato a</text:span><text:line-break/>chi tiene mappe immaginarie nel cassetto,<text:line-break/>chi si perde nei dettagli inutili,<text:line-break/>chi prende appunti su ciò che nessuno ricorderà,<text:line-break/>chi crede che ogni parola lasci una traccia, anche quando non si sa dove porta.</text:p>
      <text:p text:style-name="Text_20_body">© 2025 Orizzonti GDR</text:p>
      <text:p text:style-name="Text_20_body">Testo: Roberto Bisceglie<text:line-break/>Mappa: disegnata con Wonderdraft, pennelli di K.M. Alexander (CC0)</text:p>
      <text:p text:style-name="Text_20_body">Copertina e illustrazioni generate con Leonardo AI</text:p>
      <text:p text:style-name="Text_20_body">Quest’opera è rilasciata con licenza Creative Commons Attribuzione-Condividi allo stesso modo 4.0 Internazionale. Per visualizzare una copia di questa licenza, visitare <text:a xlink:type="simple" xlink:href="http://creativecommons.org/licenses/by-sa/4.0/" office:name=""><text:span text:style-name="Definition">http://creativecommons.org/licenses/by-sa/4.0/</text:span></text:a> o inviare una lettera a Creative Commons, PO Box 1866, Mountain View, CA 94042, USA.</text:p>
      <text:h text:style-name="Heading_20_1" text:outline-level="1"><text:bookmark-start text:name="parte-i-il-mondo-di-marethar"/>🜍 Parte I – Il Mondo di Marethar<text:bookmark-end text:name="parte-i-il-mondo-di-marethar"/></text:h>
      <text:p text:style-name="First_20_paragraph"><text:span text:style-name="T2">Vento, voci, fondamenti non condivisi</text:span></text:p>
      <text:p text:style-name="P1">“<text:span text:style-name="T2">Per capire il Marethar, bisogna prima scegliere chi si finge di essere mentre lo si ascolta.</text:span>”</text:p>
      <text:p text:style-name="First_20_paragraph">Non è un mondo unico, ma una convergenza fragile. Ogni popolo parla la sua verità, ogni culto misura il cielo con strumenti diversi. Qui si raccolgono credenze e strutture, mappe del potere, frammenti di ciò che viene tramandato — o imposto. Non aspettarti coerenza. Ma se trovi contraddizioni, vuol dire che hai trovato il cuore.</text:p>
      <text:h text:style-name="Heading_20_2" text:outline-level="2"><text:bookmark-start text:name="benvenuti-nel-marethar"/>🜍 Benvenuti nel Marethar<text:bookmark-end text:name="benvenuti-nel-marethar"/></text:h>
      <text:p text:style-name="First_20_paragraph"><text:span text:style-name="T2">Trascrizione annotata del prologo alla </text:span>“<text:span text:style-name="T2">Lettera ai Cartografi dell’Est</text:span>”<text:span text:style-name="T2">, scritta dal filosofo Lysaur di Premia</text:span></text:p>
      <text:p text:style-name="P2"><text:span text:style-name="T2">«Non c’è nulla che non sia stato già scoperto nel Marethar. Ma ogni scoperta è un fraintendimento ben documentato.»</text:span> — Lysaur di Premia, filosofo dissidente</text:p>
      <text:p text:style-name="First_20_paragraph"><text:span text:style-name="T1">Gentili studiosi, mercanti e cercatori di equilibrio,</text:span></text:p>
      <text:p text:style-name="Text_20_body">se giungete a leggere queste righe, è probabile che siate prossimi a mettere piede nel cuore del Marethar — o che abbiate almeno deciso di attraversarlo con la mente. In entrambi i casi, sappiate che nessun libro, mappa o cronaca può prepararvi davvero alla sua verità.</text:p>
      <text:p text:style-name="Text_20_body">Il Marethar è il nostro centro e il nostro specchio. Un mare interno, sì, ma anche un luogo simbolico dove si riflettono i desideri e le ossessioni di tutti i popoli che vi si affacciano. Le sue coste sono punteggiate da città-stato orgogliose, da imperi tentacolari e da deserti che parlano la lingua degli antenati. Nessuna sponda è neutra, nessuna nave naviga solo per commercio.</text:p>
      <text:p text:style-name="Text_20_body">Attorno a questo mare si dispiega un continente antico, i cui nomi cambiano a seconda della lingua con cui vengono pronunciati, e le cui frontiere si disegnano con l’inchiostro o con il sangue. Le steppe di Aridonia, le valli fluviali di Naharim, le roccaforti montane di Orethia, le colonie costiere di Thalassia: ogni regione ha scolpito il proprio modo di vivere, di pregare, di combattere, e soprattutto di ricordare.</text:p>
      <text:h text:style-name="Heading_20_3" text:outline-level="3"><text:bookmark-start text:name="su-questo-mondo"/>Su questo mondo<text:bookmark-end text:name="su-questo-mondo"/></text:h>
      <text:p text:style-name="First_20_paragraph">Nel Marethar, la tecnologia ha il suono dei cannoni e l’odore del ferro caldo. Le armature sono pesanti, le polveri esplosive sono instabili, le navi scivolano sull’acqua spinta da mappe stellari e credenze astrologiche. Ma per ogni fucile, c’è un idolo in una cripta. Per ogni accademia, una setta. Per ogni biblioteca, un culto del silenzio.</text:p>
      <text:p text:style-name="Text_20_body">La scienza avanza — sì — ma non ha ancora vinto. E forse non lo farà mai.</text:p>
      <text:p text:style-name="Text_20_body">Il sapere viaggia a bordo di caravelle e cavalli da soma, ma anche sotto forma di canti, tatuaggi, pergamene custodite da ciechi scribi. Alcuni popoli affidano tutto agli dèi; altri li temono e basta. Altri ancora ne negano l’esistenza con la stessa forza con cui ne inseguono il potere. In certe terre si compiono miracoli. In altre si processano i miracoli come frodi.</text:p>
      <text:p text:style-name="P3"><text:span text:style-name="T2">Marginalia scritta a mano sul margine di un codice orethiano:</text:span> “Un uomo può essere saggio senza essere giusto, e giusto senza capire il mondo. Ma nel Marethar, chi non è nessuna delle due cose, è morto.”</text:p>
      <text:h text:style-name="Heading_20_3" text:outline-level="3"><text:bookmark-start text:name="su-chi-lo-abita"/>Su chi lo abita<text:bookmark-end text:name="su-chi-lo-abita"/></text:h>
      <text:p text:style-name="First_20_paragraph">Le genti del Marethar non sono popoli esotici. Sono noi. O meglio, ognuno di noi ne ha almeno uno dentro: il mercante lysandriano che giura solo sul profitto; il soldato orethiano che non abbassa mai la testa; la sacerdotessa aridoniana che legge il vento del deserto. Ognuno ha la propria morale, il proprio codice, il proprio dio — e se non ne ha, se li costruisce.</text:p>
      <text:p text:style-name="Text_20_body">Le differenze non sono solo esteriori. Le lingue cambiano forma come i corpi, i calendari seguono ritmi diversi, i colori sacri non coincidono. Un fiore offerto in segno di pace in una cultura, può essere insulto in un’altra. Una festa può essere sacra in una valle e proibita due colline più in là.</text:p>
      <text:p text:style-name="Text_20_body">Questo rende ogni incontro pericoloso e prezioso.</text:p>
      <text:h text:style-name="Heading_20_3" text:outline-level="3"><text:bookmark-start text:name="su-cosa-si-può-fare"/>Su cosa si può fare<text:bookmark-end text:name="su-cosa-si-può-fare"/></text:h>
      <text:p text:style-name="First_20_paragraph">Nel Marethar, si può giocare a sopravvivere, a dominare, a cambiare. È un mondo di esplorazione ma anche di resistenza. Qui si può fondare una carovana o dissolvere un regno. Si può difendere una rovina o bruciare un tempio. Si può riscrivere la storia — ma solo se si è disposti a pagarne il prezzo.</text:p>
      <text:p text:style-name="Text_20_body">Tutto questo non per dire che vi conviene andarvene, no. Ma per ricordarvi che qui le parole hanno peso, e che le mappe più utili sono quelle disegnate a voce tra amici, la sera, quando il vino ha sciolto la paura e il futuro è ancora una scommessa.</text:p>
      <text:p text:style-name="P4"><text:span text:style-name="T2">Nota finale dell’autore:</text:span> “Se qualcuno dovesse raccogliere questo scritto quando io non ci sarò più, sappia che ho mentito solo sulle cose più pericolose. Il resto è tutto vero. O abbastanza vero da esserci morto qualcuno.”</text:p>
      <text:h text:style-name="Heading_20_2" text:outline-level="2"><text:bookmark-start text:name="perché-usare-marethar-in-campagna"/>🜚 Perché usare Marethar in campagna<text:bookmark-end text:name="perché-usare-marethar-in-campagna"/></text:h>
      <text:p text:style-name="First_20_paragraph"><text:span text:style-name="T2">Una guida per chi crea storie</text:span></text:p>
      <text:p text:style-name="P5">“<text:span text:style-name="T2">Ci sono luoghi dove si combatte per la salvezza. Qui si combatte per ricordare.</text:span>”</text:p>
      <text:p text:style-name="First_20_paragraph">Il Marethar è un’ambientazione vasta, stratificata e aperta. È stata progettata non per essere letta come una lore da imparare a memoria, ma per essere <text:span text:style-name="T1">giocata, reinterpretata, riempita</text:span>. Non offre eroi predestinati, linee narrative imposte, né guerre cosmiche da risolvere: offre <text:span text:style-name="T1">tensioni, culture complesse, eventi storici in movimento, e un mondo vivo dove il conflitto è quotidiano, e spesso interiore</text:span>.</text:p>
      <text:p text:style-name="Text_20_body">È un luogo ideale per raccontare storie di scelta, responsabilità, esplorazione e memoria.</text:p>
      <text:h text:style-name="Heading_20_3" text:outline-level="3"><text:bookmark-start text:name="un-mondo-per-chi-ama-il-conflitto-morale"/>Un mondo per chi ama il conflitto morale<text:bookmark-end text:name="un-mondo-per-chi-ama-il-conflitto-morale"/></text:h>
      <text:p text:style-name="First_20_paragraph">Il Marethar non offre risposte facili. Ogni decisione, anche apparentemente pratica, porta con sé <text:span text:style-name="T1">implicazioni etiche e culturali</text:span>. L’uso della forza, il dialogo con poteri religiosi, la negoziazione tra popoli, il possesso di artefatti: nulla è neutro.</text:p>
      <text:p text:style-name="Text_20_body">Questo lo rende perfetto per:</text:p>
      <text:list text:style-name="L1">
        <text:list-item>
          <text:p text:style-name="P6"><text:span text:style-name="T1">campagne politiche</text:span> incentrate su diplomazia, trattati, dispute tra fazioni interne a una nazione;</text:p>
        </text:list-item>
        <text:list-item>
          <text:p text:style-name="P6"><text:span text:style-name="T1">drammi morali</text:span> dove i personaggi si trovano a dover scegliere se tradire il proprio credo, disobbedire a una divinità, o negoziare con un nemico storico per evitare un massacro;</text:p>
        </text:list-item>
        <text:list-item>
          <text:p text:style-name="P6"><text:span text:style-name="T1">cronache militari</text:span> in cui l’esercito non è solo forza armata, ma strumento di dominio o liberazione.</text:p>
        </text:list-item>
      </text:list>
      <text:p text:style-name="P7"><text:span text:style-name="T2">Esempio</text:span>: Un gruppo di agenti incaricati di negoziare la pace tra la Repubblica di Premia e il Regno di Vallan scopre che l’accordo richiede il sacrificio di un culto minoritario non riconosciuto. Accettare il compromesso garantirebbe la fine di una guerra, ma a quale prezzo?</text:p>
      <text:h text:style-name="Heading_20_3" text:outline-level="3"><text:bookmark-start text:name="cultura-materiale-e-sociale-al-centro-del-gioco"/>Cultura materiale e sociale al centro del gioco<text:bookmark-end text:name="cultura-materiale-e-sociale-al-centro-del-gioco"/></text:h>
      <text:p text:style-name="First_20_paragraph">Il Marethar prende sul serio le strutture sociali. Ogni cultura ha un’organizzazione interna, un rapporto con il potere, una visione del sacro, della giustizia, della memoria e del tempo.</text:p>
      <text:p text:style-name="Text_20_body">La religione, ad esempio, <text:span text:style-name="T1">non è solo un pretesto per la magia</text:span>: è un sistema di regole, riti e responsabilità. La scienza non è neutra: è uno strumento conteso tra filosofi, stati e corporazioni. Il sapere è spesso orale, parziale, e legato a caste o gilde che decidono cosa può essere divulgato.</text:p>
      <text:p text:style-name="P8">Questo rende l’ambientazione particolarmente adatta a:</text:p>
      <text:list text:style-name="L2">
        <text:list-item>
          <text:p text:style-name="P9">campagne di <text:span text:style-name="T1">ricerca storica e archeologica</text:span> dove il senso stesso della “verità” è in discussione;</text:p>
        </text:list-item>
        <text:list-item>
          <text:p text:style-name="P9">storie di <text:span text:style-name="T1">conflitto religioso e sincretismo</text:span>, tra culti ufficiali e fedi minoritarie;</text:p>
        </text:list-item>
        <text:list-item>
          <text:p text:style-name="P9">partite ambientate in <text:span text:style-name="T1">ambiti artigianali o accademici</text:span>, come gilde di costruttori navali, ordini druidici o collegi alchemici.</text:p>
        </text:list-item>
      </text:list>
      <text:h text:style-name="Heading_20_3" text:outline-level="3"><text:bookmark-start text:name="magia-non-come-sistema-ma-come-tensione"/>Magia non come sistema, ma come tensione<text:bookmark-end text:name="magia-non-come-sistema-ma-come-tensione"/></text:h>
      <text:p text:style-name="First_20_paragraph">Nel Marethar la magia esiste, ma non ha un “regolamento universale”. Ogni tradizione magica ha le sue origini, limiti, linguaggi e rituali. La magia può derivare dagli antenati, dagli spiriti, dagli dèi o da lunghe catene di esperimenti. Per alcuni è sacra, per altri illegale, per altri ancora una risorsa da sfruttare politicamente.</text:p>
      <text:p text:style-name="Text_20_body">Questo crea il terreno perfetto per:</text:p>
      <text:list text:style-name="L3">
        <text:list-item>
          <text:p text:style-name="P10"><text:span text:style-name="T1">campagne investigative</text:span> su poteri incompresi o proibiti;</text:p>
        </text:list-item>
        <text:list-item>
          <text:p text:style-name="P10"><text:span text:style-name="T1">giochi di potere tra ordini magici e stati sovrani</text:span>;</text:p>
        </text:list-item>
        <text:list-item>
          <text:p text:style-name="P10">avventure dove la <text:span text:style-name="T1">magia è una minaccia percepita, anche quando non è reale</text:span>.</text:p>
        </text:list-item>
      </text:list>
      <text:p text:style-name="P11"><text:span text:style-name="T2">Esempio</text:span>: Un villaggio di confine è accusato di custodire un’antica reliquia magica in grado di deviare le rotte fluviali. La delegazione inviata a indagare scopre che il “potere” è forse solo una leggenda… ma il solo sospetto è sufficiente a scatenare una contesa armata tra due stati confinanti.</text:p>
      <text:h text:style-name="Heading_20_3" text:outline-level="3"><text:bookmark-start text:name="esperienza-estetica-e-sensoriale"/>Esperienza estetica e sensoriale<text:bookmark-end text:name="esperienza-estetica-e-sensoriale"/></text:h>
      <text:p text:style-name="First_20_paragraph">Il Marethar si ispira a un <text:span text:style-name="T1">immaginario mediterraneo allargato</text:span>, ma declinato attraverso:</text:p>
      <text:list text:style-name="L4">
        <text:list-item>
          <text:p text:style-name="P12">la tecnologia del XVI secolo (cannoni, mappe stellari, irrigazione, fortificazioni),</text:p>
        </text:list-item>
        <text:list-item>
          <text:p text:style-name="P12">la memoria delle civiltà dell’età del bronzo (riti solari, culti degli antenati, architettura megalitica),</text:p>
        </text:list-item>
        <text:list-item>
          <text:p text:style-name="P12">lo splendore e la decadenza del primo barocco (palazzi, maschere, mecenatismo, scienza oscura).</text:p>
        </text:list-item>
      </text:list>
      <text:p text:style-name="First_20_paragraph">Questo rende ogni campagna visivamente e simbolicamente <text:span text:style-name="T1">ricca, densa, profumata di storia</text:span>.</text:p>
      <text:p text:style-name="P13">Il gioco può evocare:</text:p>
      <text:list text:style-name="L5">
        <text:list-item>
          <text:p text:style-name="P14">le processioni religiose al tramonto,</text:p>
        </text:list-item>
        <text:list-item>
          <text:p text:style-name="P14">le cripte coperte di affreschi e candele,</text:p>
        </text:list-item>
        <text:list-item>
          <text:p text:style-name="P14">i mercati del porto tra spezie, libri, pergamene,</text:p>
        </text:list-item>
        <text:list-item>
          <text:p text:style-name="P14">le stanze dei filosofi illuminate a olio,</text:p>
        </text:list-item>
        <text:list-item>
          <text:p text:style-name="P14">le casematte dove le armi si benedicono prima di usarle.</text:p>
        </text:list-item>
      </text:list>
      <text:h text:style-name="Heading_20_3" text:outline-level="3"><text:bookmark-start text:name="nessun-metaplot-solo-materiali-reattivi"/>Nessun metaplot: solo materiali reattivi<text:bookmark-end text:name="nessun-metaplot-solo-materiali-reattivi"/></text:h>
      <text:p text:style-name="First_20_paragraph">Il documento di Marethar non impone un metaplot da seguire. Non ci sono eventi globali in corso, né eroi “ufficiali” da inseguire. Tutto è descritto come in uno <text:span text:style-name="T1">spazio potenziale</text:span>, pronto a essere abitato da personaggi, scelte e conflitti nuovi.</text:p>
      <text:p text:style-name="P15">Ogni regione è in un equilibrio precario. Ogni cultura è attraversata da fratture. Ogni religione ha la sua eresia. Ogni nazione ha un nemico esterno… o interno.</text:p>
      <text:p text:style-name="First_20_paragraph">Questo rende Marethar ideale per:</text:p>
      <text:list text:style-name="L6">
        <text:list-item>
          <text:p text:style-name="P16">campagne emergenti, senza trama predeterminata;</text:p>
        </text:list-item>
        <text:list-item>
          <text:p text:style-name="P16">play sandbox, OSR o masterless;</text:p>
        </text:list-item>
        <text:list-item>
          <text:p text:style-name="P16">evoluzioni storiche generate dal tavolo di gioco.</text:p>
        </text:list-item>
      </text:list>
      <text:h text:style-name="Heading_20_3" text:outline-level="3"><text:bookmark-start text:name="tre-modalità-di-utilizzo-consigliate"/>Tre modalità di utilizzo consigliate<text:bookmark-end text:name="tre-modalità-di-utilizzo-consigliate"/></text:h>
      <text:p text:style-name="First_20_paragraph"><text:span text:style-name="T1">🔹 Full immersion:</text:span> Ambientate l’intera campagna nel Marethar. Scegliete una regione iniziale, leggete le culture coinvolte e fatene emergere le tensioni. Utile per chi vuole <text:span text:style-name="T1">un setting profondo e coerente</text:span>.</text:p>
      <text:p text:style-name="Text_20_body"><text:span text:style-name="T1">🔹 Estensione modulare:</text:span> Incorporate Marethar come <text:span text:style-name="T1">una regione in un mondo più ampio</text:span>. Ideale se usate un vostro universo e volete inserire un’area credibile e con forti tensioni interne. Perfetto per campagne a zone o multiregionali.</text:p>
      <text:p text:style-name="Text_20_body"><text:span text:style-name="T1">🔹 Fonte di ispirazione:</text:span> Usate Marethar come <text:span text:style-name="T1">banca di culture, culti, tecnologie, mappe, creature e tensioni</text:span> da riassemblare altrove. Ogni paragrafo è pensato per poter essere estratto e trapiantato.</text:p>
      <text:h text:style-name="Heading_20_3" text:outline-level="3"><text:bookmark-start text:name="che-tipo-di-giocatori-lo-apprezzano"/>Che tipo di giocatori lo apprezzano?<text:bookmark-end text:name="che-tipo-di-giocatori-lo-apprezzano"/></text:h>
      <text:list text:style-name="L7">
        <text:list-item>
          <text:p text:style-name="P17">Chi ama i mondi con <text:span text:style-name="T1">densità culturale</text:span>, anche a costo di qualche complessità in più.</text:p>
        </text:list-item>
        <text:list-item>
          <text:p text:style-name="P17">Chi cerca <text:span text:style-name="T1">storie senza buoni e cattivi</text:span>, ma con molte verità parziali.</text:p>
        </text:list-item>
        <text:list-item>
          <text:p text:style-name="P17">Chi si diverte a <text:span text:style-name="T1">costruire relazioni, reti, mappe sociali</text:span>.</text:p>
        </text:list-item>
        <text:list-item>
          <text:p text:style-name="P17">Chi vuole <text:span text:style-name="T1">ricostruire il passato, interpretare il presente e influenzare il futuro</text:span>.</text:p>
        </text:list-item>
      </text:list>
      <text:h text:style-name="Heading_20_4" text:outline-level="4"><text:bookmark-start text:name="in-sintesi-perché-scegliere-marethar"/>In sintesi: perché scegliere Marethar?<text:bookmark-end text:name="in-sintesi-perché-scegliere-marethar"/></text:h>
      <table:table table:name="Table1" table:style-name="Table1">
        <table:table-column table:style-name="Table1.A"/>
        <table:table-column table:style-name="Table1.B"/>
        <table:table-header-rows>
          <table:table-row>
            <table:table-cell table:style-name="TableHeaderRowCell" office:value-type="string">
              <text:p text:style-name="Table_20_Heading">Caratteristica</text:p>
            </table:table-cell>
            <table:table-cell table:style-name="TableHeaderRowCell" office:value-type="string">
              <text:p text:style-name="Table_20_Heading">Cosa offre</text:p>
            </table:table-cell>
          </table:table-row>
        </table:table-header-rows>
        <table:table-row>
          <table:table-cell table:style-name="TableRowCell" office:value-type="string">
            <text:p text:style-name="Table_20_Contents"><text:span text:style-name="T1">Profondità culturale</text:span></text:p>
          </table:table-cell>
          <table:table-cell table:style-name="TableRowCell" office:value-type="string">
            <text:p text:style-name="Table_20_Contents">Religioni, sistemi politici, arte e potere coerenti</text:p>
          </table:table-cell>
        </table:table-row>
        <table:table-row>
          <table:table-cell table:style-name="TableRowCell" office:value-type="string">
            <text:p text:style-name="Table_20_Contents"><text:span text:style-name="T1">Giocabilità emergente</text:span></text:p>
          </table:table-cell>
          <table:table-cell table:style-name="TableRowCell" office:value-type="string">
            <text:p text:style-name="Table_20_Contents">Nessun metaplot, ma tensioni continue tra popoli e ideali</text:p>
          </table:table-cell>
        </table:table-row>
        <table:table-row>
          <table:table-cell table:style-name="TableRowCell" office:value-type="string">
            <text:p text:style-name="Table_20_Contents"><text:span text:style-name="T1">Magia come tensione sociale</text:span></text:p>
          </table:table-cell>
          <table:table-cell table:style-name="TableRowCell" office:value-type="string">
            <text:p text:style-name="Table_20_Contents">Non un sistema meccanico, ma una pratica ambigua e contesa</text:p>
          </table:table-cell>
        </table:table-row>
        <table:table-row>
          <table:table-cell table:style-name="TableRowCell" office:value-type="string">
            <text:p text:style-name="Table_20_Contents"><text:span text:style-name="T1">Materialità evocativa</text:span></text:p>
          </table:table-cell>
          <table:table-cell table:style-name="TableRowCell" office:value-type="string">
            <text:p text:style-name="Table_20_Contents">Estetica tardo-rinascimentale + strutture preclassiche</text:p>
          </table:table-cell>
        </table:table-row>
        <table:table-row>
          <table:table-cell table:style-name="TableRowCell" office:value-type="string">
            <text:p text:style-name="Table_20_Contents"><text:span text:style-name="T1">Modularità piena</text:span></text:p>
          </table:table-cell>
          <table:table-cell table:style-name="TableRowCell" office:value-type="string">
            <text:p text:style-name="Table_20_Contents">Può essere usato come mondo intero o come fonte frammentaria</text:p>
          </table:table-cell>
        </table:table-row>
      </table:table>
      <text:h text:style-name="Heading_20_3" text:outline-level="3"><text:bookmark-start text:name="come-iniziare-una-campagna-in-marethar"/>Come iniziare una campagna in Marethar<text:bookmark-end text:name="come-iniziare-una-campagna-in-marethar"/></text:h>
      <text:p text:style-name="First_20_paragraph"><text:span text:style-name="T2">Una guida pratica per il master</text:span></text:p>
      <text:p text:style-name="Text_20_body">Iniziare a giocare nel Marethar non richiede la lettura completa dell’ambientazione. Il mondo è stato progettato per <text:span text:style-name="T1">funzionare a cerchi concentrici</text:span>: puoi partire da un punto, approfondire in seguito, e lasciare il resto nell’ombra finché serve.</text:p>
      <text:h text:style-name="Heading_20_3" text:outline-level="3"><text:bookmark-start text:name="passaggi-consigliati"/>Passaggi consigliati:<text:bookmark-end text:name="passaggi-consigliati"/></text:h>
      <text:p text:style-name="First_20_paragraph"><text:span text:style-name="T1">1. Scegli un punto di inizio localizzato</text:span> Una città, una regione, una frontiera. Basta un paragrafo per darti tutto quello che serve.</text:p>
      <text:p text:style-name="P18"><text:span text:style-name="T2">Esempio:</text:span> “La Diarchia di Ashania, tra foreste sacre e tensioni rurali, offre uno scenario perfetto per campagne intime, misteriose, dove la magia è sussurrata e i nobili non si fidano più dei propri guardiani.”</text:p>
      <text:p text:style-name="First_20_paragraph"><text:span text:style-name="T1">2. Scegli due culture in tensione</text:span> Le differenze culturali sono la linfa del gioco. Può trattarsi di religione, linguaggio, valori. Anche se inizia con un gruppo omogeneo, il mondo intorno dovrà reagire a loro.</text:p>
      <text:p text:style-name="Text_20_body"><text:span text:style-name="T1">3. Scegli un conflitto aperto, uno sommerso, uno dimenticato</text:span></text:p>
      <text:p text:style-name="P19"><text:span text:style-name="T2">Aperto:</text:span> una guerra commerciale, una disputa religiosa, un embargo. <text:span text:style-name="T2">Sommerso:</text:span> una cospirazione interna, una ribellione nascente. <text:span text:style-name="T2">Dimenticato:</text:span> un evento storico mai risolto, un culto cancellato, una rovina non mappata.</text:p>
      <text:p text:style-name="First_20_paragraph"><text:span text:style-name="T1">4. Crea 3 legami tra i PG e il mondo</text:span> Legami familiari, culturali, politici. Falli emergere con domande all’inizio, oppure falli scoprire in gioco.</text:p>
      <text:p text:style-name="Text_20_body"><text:span text:style-name="T1">5. Usa solo 4 sezioni del manuale</text:span> Per le prime sessioni bastano:</text:p>
      <text:list text:style-name="L8">
        <text:list-item>
          <text:p text:style-name="P20">La cultura dominante del luogo</text:p>
        </text:list-item>
        <text:list-item>
          <text:p text:style-name="P20">Le religioni coinvolte</text:p>
        </text:list-item>
        <text:list-item>
          <text:p text:style-name="P20">La cronologia sintetica</text:p>
        </text:list-item>
        <text:list-item>
          <text:p text:style-name="P20">La geografia della regione</text:p>
        </text:list-item>
      </text:list>
      <text:h text:style-name="Heading_20_3" text:outline-level="3"><text:bookmark-start text:name="toni-e-linguaggi-tematici-consigliati"/>Toni e linguaggi tematici consigliati<text:bookmark-end text:name="toni-e-linguaggi-tematici-consigliati"/></text:h>
      <text:p text:style-name="First_20_paragraph"><text:span text:style-name="T2">Per un Marethar coerente e sfaccettato</text:span></text:p>
      <text:p text:style-name="Text_20_body">Marethar può ospitare molte tonalità narrative, ma alcune ne esaltano la natura:</text:p>
      <text:h text:style-name="Heading_20_4" text:outline-level="4"><text:bookmark-start text:name="toni-consigliati"/><text:span text:style-name="T1">Toni consigliati</text:span><text:bookmark-end text:name="toni-consigliati"/></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ono</text:p>
            </table:table-cell>
            <table:table-cell table:style-name="TableHeaderRowCell" office:value-type="string">
              <text:p text:style-name="Table_20_Heading">Descrizione</text:p>
            </table:table-cell>
            <table:table-cell table:style-name="TableHeaderRowCell" office:value-type="string">
              <text:p text:style-name="Table_20_Heading">Esempi giocabili</text:p>
            </table:table-cell>
          </table:table-row>
        </table:table-header-rows>
        <table:table-row>
          <table:table-cell table:style-name="TableRowCell" office:value-type="string">
            <text:p text:style-name="Table_20_Contents"><text:span text:style-name="T1">Epico crepuscolare</text:span></text:p>
          </table:table-cell>
          <table:table-cell table:style-name="TableRowCell" office:value-type="string">
            <text:p text:style-name="Table_20_Contents">Il mondo è grande, ma in decadenza. Si combatte per ciò che resta.</text:p>
          </table:table-cell>
          <table:table-cell table:style-name="TableRowCell" office:value-type="string">
            <text:p text:style-name="Table_20_Contents">Ultimi protettori di un culto in via d’estinzione</text:p>
          </table:table-cell>
        </table:table-row>
        <table:table-row>
          <table:table-cell table:style-name="TableRowCell" office:value-type="string">
            <text:p text:style-name="Table_20_Contents"><text:span text:style-name="T1">Realismo sporco</text:span></text:p>
          </table:table-cell>
          <table:table-cell table:style-name="TableRowCell" office:value-type="string">
            <text:p text:style-name="Table_20_Contents">La gloria è polvere, i re sanguinano. Tutto ha un prezzo.</text:p>
          </table:table-cell>
          <table:table-cell table:style-name="TableRowCell" office:value-type="string">
            <text:p text:style-name="Table_20_Contents">Negoziare un trattato tra nemici giurati</text:p>
          </table:table-cell>
        </table:table-row>
        <table:table-row>
          <table:table-cell table:style-name="TableRowCell" office:value-type="string">
            <text:p text:style-name="Table_20_Contents"><text:span text:style-name="T1">Mistico ambiguo</text:span></text:p>
          </table:table-cell>
          <table:table-cell table:style-name="TableRowCell" office:value-type="string">
            <text:p text:style-name="Table_20_Contents">Non è chiaro dove finisce la fede e inizia la realtà.</text:p>
          </table:table-cell>
          <table:table-cell table:style-name="TableRowCell" office:value-type="string">
            <text:p text:style-name="Table_20_Contents">Interpretare segni, presagi, apparizioni</text:p>
          </table:table-cell>
        </table:table-row>
        <table:table-row>
          <table:table-cell table:style-name="TableRowCell" office:value-type="string">
            <text:p text:style-name="Table_20_Contents"><text:span text:style-name="T1">Esplorazione culturale</text:span></text:p>
          </table:table-cell>
          <table:table-cell table:style-name="TableRowCell" office:value-type="string">
            <text:p text:style-name="Table_20_Contents">Il vero ignoto non è la mappa, ma le persone.</text:p>
          </table:table-cell>
          <table:table-cell table:style-name="TableRowCell" office:value-type="string">
            <text:p text:style-name="Table_20_Contents">Campagna senza combattimenti, ma con impatti storici</text:p>
          </table:table-cell>
        </table:table-row>
        <table:table-row>
          <table:table-cell table:style-name="TableRowCell" office:value-type="string">
            <text:p text:style-name="Table_20_Contents"><text:span text:style-name="T1">Cospirazione rinascimentale</text:span></text:p>
          </table:table-cell>
          <table:table-cell table:style-name="TableRowCell" office:value-type="string">
            <text:p text:style-name="Table_20_Contents">Intrighi, doppie lealtà, maschere e reticenze.</text:p>
          </table:table-cell>
          <table:table-cell table:style-name="TableRowCell" office:value-type="string">
            <text:p text:style-name="Table_20_Contents">L’arresto di un filosofo cambia il destino di una città</text:p>
          </table:table-cell>
        </table:table-row>
      </table:table>
      <text:h text:style-name="Heading_20_4" text:outline-level="4"><text:bookmark-start text:name="estetica-narrativa"/><text:span text:style-name="T1">Estetica narrativa</text:span><text:bookmark-end text:name="estetica-narrativa"/></text:h>
      <text:list text:style-name="L9">
        <text:list-item>
          <text:p text:style-name="P21"><text:span text:style-name="T1">Evoca il peso delle tradizioni.</text:span> I personaggi sono immersi in storie più grandi di loro.</text:p>
        </text:list-item>
        <text:list-item>
          <text:p text:style-name="P21"><text:span text:style-name="T1">Lascia spazio all’ambiguità.</text:span> Non tutto è spiegato, e spesso non lo sarà.</text:p>
        </text:list-item>
        <text:list-item>
          <text:p text:style-name="P21"><text:span text:style-name="T1">La bellezza convive con la rovina.</text:span> Una cupola può crollare mentre si prega sotto di essa.</text:p>
        </text:list-item>
        <text:list-item>
          <text:p text:style-name="P21"><text:span text:style-name="T1">Le parole sono importanti.</text:span> Un editto può cambiare più di una spada.</text:p>
        </text:list-item>
      </text:list>
      <text:h text:style-name="Heading_20_2" text:outline-level="2"><text:bookmark-start text:name="semi-davventura"/>🝰 Semi d’avventura<text:bookmark-end text:name="semi-davventura"/></text:h>
      <text:p text:style-name="First_20_paragraph"><text:span text:style-name="T2">Dodici punti di partenza per mettere in crisi il mondo</text:span></text:p>
      <text:p text:style-name="P22">“<text:span text:style-name="T2">Ogni campagna comincia quando qualcuno osa domandare: cosa sarebbe successo se…?</text:span>”</text:p>
      <text:h text:style-name="Heading_20_3" text:outline-level="3"><text:bookmark-start text:name="il-voto-del-leone"/><text:span text:style-name="T1">Il voto del Leone</text:span><text:bookmark-end text:name="il-voto-del-leone"/></text:h>
      <text:p text:style-name="First_20_paragraph"><text:span text:style-name="T1">Dove</text:span>: Deserto di Qadmath<text:line-break/><text:span text:style-name="T1">Contesto</text:span>: Sta per avvenire la nomina del nuovo capo di una delle tribù centrali degli Aridoniani. Il candidato più accreditato è figlio di una stirpe onorata.<text:line-break/><text:span text:style-name="T1">Rottura</text:span>: Una voce si diffonde: il giovane avrebbe sangue Rashiano. Alcuni vogliono fermare la nomina, altri vedono in lui un ponte per la pace.</text:p>
      <text:p text:style-name="Text_20_body"><text:span text:style-name="T1">Come iniziare subito</text:span>:</text:p>
      <text:list text:style-name="L10">
        <text:list-item>
          <text:p text:style-name="P23">Un PG è membro del consiglio tribale e deve votare.</text:p>
        </text:list-item>
        <text:list-item>
          <text:p text:style-name="P23">I PG sono mercanti in cerca di alleanze nel deserto, ma finiscono coinvolti nel rituale.</text:p>
        </text:list-item>
        <text:list-item>
          <text:p text:style-name="P23">Qualcuno paga i PG per trovare prove della verità (o distruggerle). <text:span text:style-name="T1">Tag</text:span>: identità, sangue vs cultura, intrigo locale, voto rituale</text:p>
        </text:list-item>
      </text:list>
      <text:h text:style-name="Heading_20_3" text:outline-level="3"><text:bookmark-start text:name="la-mappa-della-linea-spezzata"/><text:span text:style-name="T1">La mappa della linea spezzata</text:span><text:bookmark-end text:name="la-mappa-della-linea-spezzata"/></text:h>
      <text:p text:style-name="First_20_paragraph"><text:span text:style-name="T1">Dove</text:span>: Marethar centrale, tratte navali Lysandriane <text:span text:style-name="T1">Contesto</text:span>: Un navigatore muore lasciando in eredità una mappa incompleta. Indica una rotta marittima che “non dovrebbe esistere”, tra scogli sommersi e isole assenti dalle mappe ufficiali. <text:span text:style-name="T1">Rottura</text:span>: Altri mercanti vogliono la mappa, la Gilda Navale la considera pericolosa, e alcuni sacerdoti dicono che quella rotta “è maledetta”. <text:span text:style-name="T1">Come iniziare subito</text:span>:</text:p>
      <text:list text:style-name="L11">
        <text:list-item>
          <text:p text:style-name="P24">I PG sono chiamati come equipaggio della spedizione.</text:p>
        </text:list-item>
        <text:list-item>
          <text:p text:style-name="P24">La mappa è rubata e un PG è sospettato di averla.</text:p>
        </text:list-item>
        <text:list-item>
          <text:p text:style-name="P24">Una voce dice che la rotta porti a un porto “prima dei tempi”. <text:span text:style-name="T1">Tag</text:span>: esplorazione, mito sommerso, rivalità commerciale, mare e memorie</text:p>
        </text:list-item>
      </text:list>
      <text:h text:style-name="Heading_20_3" text:outline-level="3"><text:bookmark-start text:name="fuoco-sulla-forgia"/><text:span text:style-name="T1">Fuoco sulla forgia</text:span><text:bookmark-end text:name="fuoco-sulla-forgia"/></text:h>
      <text:p text:style-name="First_20_paragraph"><text:span text:style-name="T1">Dove</text:span>: Regno di Vallan, regioni minerarie <text:span text:style-name="T1">Contesto</text:span>: Un nuovo metallo viene scoperto: leggero, sonoro, difficile da fondere. Gli artigiani più esperti parlano di “risposte nella lega”. <text:span text:style-name="T1">Rottura</text:span>: La Confraternita degli Artigiani vieta la lavorazione del metallo. Alcuni lo chiamano “mineral-anima”, altri “metallo impuro”. <text:span text:style-name="T1">Come iniziare subito</text:span>:</text:p>
      <text:list text:style-name="L12">
        <text:list-item>
          <text:p text:style-name="P25">Un PG è apprendista e riceve un frammento.</text:p>
        </text:list-item>
        <text:list-item>
          <text:p text:style-name="P25">Un nobile commissiona un’arma segreta contro il veto della gilda.</text:p>
        </text:list-item>
        <text:list-item>
          <text:p text:style-name="P25">Una voce dice che le lame forgiate con quel metallo parlano. <text:span text:style-name="T1">Tag</text:span>: tecnologia e superstizione, gilde, potere latente, materia viva</text:p>
        </text:list-item>
      </text:list>
      <text:h text:style-name="Heading_20_3" text:outline-level="3"><text:bookmark-start text:name="il-trattato-del-grano"/><text:span text:style-name="T1">Il trattato del grano</text:span><text:bookmark-end text:name="il-trattato-del-grano"/></text:h>
      <text:p text:style-name="First_20_paragraph"><text:span text:style-name="T1">Dove</text:span>: Repubblica di Premia / Diarchia di Ashania <text:span text:style-name="T1">Contesto</text:span>: Le piane coltivate di Preiacoria sono colpite da una carestia. Il raccolto è stato perso e il granaio centrale bruciato in circostanze ambigue. <text:span text:style-name="T1">Rottura</text:span>: Ashania si offre di inviare scorte alimentari, ma solo in cambio della possibilità di costruire un tempio del culto solare nel cuore della repubblica. <text:span text:style-name="T1">Come iniziare subito</text:span>:</text:p>
      <text:list text:style-name="L13">
        <text:list-item>
          <text:p text:style-name="P26">I PG sono inviati dal Senato per negoziare i termini con i diarchi.</text:p>
        </text:list-item>
        <text:list-item>
          <text:p text:style-name="P26">Un personaggio è fedele del culto ashani, ma lo tiene segreto.</text:p>
        </text:list-item>
        <text:list-item>
          <text:p text:style-name="P26">Una fazione estremista in Premia vuole sabotare l’accordo prima che venga firmato. <text:span text:style-name="T1">Tag</text:span>: politica, religione, diplomazia, fame e fede</text:p>
        </text:list-item>
      </text:list>
      <text:h text:style-name="Heading_20_3" text:outline-level="3"><text:bookmark-start text:name="la-luce-sul-lago"/><text:span text:style-name="T1">La luce sul lago</text:span><text:bookmark-end text:name="la-luce-sul-lago"/></text:h>
      <text:p text:style-name="First_20_paragraph"><text:span text:style-name="T1">Dove</text:span>: Lega Rhithiana, isole settentrionali <text:span text:style-name="T1">Contesto</text:span>: Ogni sera, per pochi istanti, uno specchio d’acqua brilla di una luce iridescente che nessuno sa spiegare. <text:span text:style-name="T1">Rottura</text:span>: Si dice che sia la manifestazione ciclica di una città sommersa. La Gilda Navale vuole interdire l’accesso al lago per “motivi di sicurezza”. <text:span text:style-name="T1">Come iniziare subito</text:span>:</text:p>
      <text:list text:style-name="L14">
        <text:list-item>
          <text:p text:style-name="P27">I PG sono cartografi incaricati di rilevare il fenomeno.</text:p>
        </text:list-item>
        <text:list-item>
          <text:p text:style-name="P27">Un parente di uno dei PG è scomparso nel lago dieci anni fa.</text:p>
        </text:list-item>
        <text:list-item>
          <text:p text:style-name="P27">Un culto minore sostiene che la luce è un portale e si prepara a “seguire il richiamo”. <text:span text:style-name="T1">Tag</text:span>: mistero, folklore, acqua, risveglio antico</text:p>
        </text:list-item>
      </text:list>
      <text:h text:style-name="Heading_20_3" text:outline-level="3"><text:bookmark-start text:name="il-silenzio-di-shahin"/><text:span text:style-name="T1">Il silenzio di Shahin</text:span><text:bookmark-end text:name="il-silenzio-di-shahin"/></text:h>
      <text:p text:style-name="First_20_paragraph"><text:span text:style-name="T1">Dove</text:span>: Aridonia <text:span text:style-name="T1">Contesto</text:span>: La Setta dell’Albero, uno dei culti più antichi, ha improvvisamente cessato ogni rito pubblico, ogni parola, ogni canto. <text:span text:style-name="T1">Rottura</text:span>: I sacerdoti restano in silenzio. Si dice che Shahin abbia taciuto per punire un peccato collettivo… o forse per rivelare qualcosa. <text:span text:style-name="T1">Come iniziare subito</text:span>:</text:p>
      <text:list text:style-name="L15">
        <text:list-item>
          <text:p text:style-name="P28">I PG vengono inviati da un capotribù per chiedere spiegazioni.</text:p>
        </text:list-item>
        <text:list-item>
          <text:p text:style-name="P28">Un PG è ex adepto del culto e riceve sogni inquietanti.</text:p>
        </text:list-item>
        <text:list-item>
          <text:p text:style-name="P28">Un altro culto vuole approfittare del silenzio per imporsi. <text:span text:style-name="T1">Tag</text:span>: misticismo, silenzio, eresia, fede fratturata</text:p>
        </text:list-item>
      </text:list>
      <text:h text:style-name="Heading_20_3" text:outline-level="3"><text:bookmark-start text:name="il-serpente-e-la-ruota"/><text:span text:style-name="T1">Il serpente e la ruota</text:span><text:bookmark-end text:name="il-serpente-e-la-ruota"/></text:h>
      <text:p text:style-name="First_20_paragraph"><text:span text:style-name="T1">Dove</text:span>: Impero Rashiano <text:span text:style-name="T1">Contesto</text:span>: Nei quartieri poveri, si diffonde un culto clandestino che venera il simbolo di un serpente avvolto in una ruota. <text:span text:style-name="T1">Rottura</text:span>: Quel simbolo riappare anche su tombe antichissime e nei sogni di molti. I nobili vogliono reprimere il culto, ma alcuni iniziano a portarne il segno. <text:span text:style-name="T1">Come iniziare subito</text:span>:</text:p>
      <text:list text:style-name="L16">
        <text:list-item>
          <text:p text:style-name="P29">I PG vengono infiltrati nel culto su ordine dell’esercito.</text:p>
        </text:list-item>
        <text:list-item>
          <text:p text:style-name="P29">Uno di loro è nato con una voglia che riproduce il simbolo.</text:p>
        </text:list-item>
        <text:list-item>
          <text:p text:style-name="P29">Un nobile importante adotta il culto pubblicamente. <text:span text:style-name="T1">Tag</text:span>: culto, identità, simbolismo, rivoluzione</text:p>
        </text:list-item>
      </text:list>
      <text:h text:style-name="Heading_20_3" text:outline-level="3"><text:bookmark-start text:name="il-giuramento-di-linia"/><text:span text:style-name="T1">Il giuramento di Linia</text:span><text:bookmark-end text:name="il-giuramento-di-linia"/></text:h>
      <text:p text:style-name="First_20_paragraph"><text:span text:style-name="T1">Dove</text:span>: Impero di Linia <text:span text:style-name="T1">Contesto</text:span>: Un senatore propone l’abolizione dei privilegi nobiliari. <text:span text:style-name="T1">Rottura</text:span>: Tre suoi figli scompaiono nella stessa notte. I nobili negano ogni coinvolgimento… ma i simboli lasciati sul luogo indicano una vendetta rituale. <text:span text:style-name="T1">Come iniziare subito</text:span>:</text:p>
      <text:list text:style-name="L17">
        <text:list-item>
          <text:p text:style-name="P30">I PG devono ritrovare i figli (o impedirne il ritorno).</text:p>
        </text:list-item>
        <text:list-item>
          <text:p text:style-name="P30">Un PG è uno dei figli, fuggito per finta.</text:p>
        </text:list-item>
        <text:list-item>
          <text:p text:style-name="P30">Un emendamento segreto potrebbe cambiare tutto. <text:span text:style-name="T1">Tag</text:span>: politica, scomparsa, riforma, potere</text:p>
        </text:list-item>
      </text:list>
      <text:h text:style-name="Heading_20_3" text:outline-level="3"><text:bookmark-start text:name="il-giuramento-dellacqua"/><text:span text:style-name="T1">Il giuramento dell’acqua</text:span><text:bookmark-end text:name="il-giuramento-dellacqua"/></text:h>
      <text:p text:style-name="First_20_paragraph"><text:span text:style-name="T1">Dove</text:span>: Impero Doriano / Naharim <text:span text:style-name="T1">Contesto</text:span>: Il Fiume Doriano ha deviato corso, devastando campi e templi sacri. <text:span text:style-name="T1">Rottura</text:span>: Alcuni dicono che è un castigo divino. Altri sospettano un sabotaggio ingegneristico. Nel frattempo, un affluente inizia a cantare. <text:span text:style-name="T1">Come iniziare subito</text:span>:</text:p>
      <text:list text:style-name="L18">
        <text:list-item>
          <text:p text:style-name="P31">I PG devono mediare una disputa tra due comunità.</text:p>
        </text:list-item>
        <text:list-item>
          <text:p text:style-name="P31">Un PG ha sogni inquietanti legati al fiume.</text:p>
        </text:list-item>
        <text:list-item>
          <text:p text:style-name="P31">Un culto fluviale vede l’evento come profezia avverata. <text:span text:style-name="T1">Tag</text:span>: acqua, divinità, natura viva, disastro</text:p>
        </text:list-item>
      </text:list>
      <text:h text:style-name="Heading_20_3" text:outline-level="3"><text:bookmark-start text:name="la-febbre-del-sale"/><text:span text:style-name="T1">La febbre del sale</text:span><text:bookmark-end text:name="la-febbre-del-sale"/></text:h>
      <text:p text:style-name="First_20_paragraph"><text:span text:style-name="T1">Dove</text:span>: Hamania <text:span text:style-name="T1">Contesto</text:span>: I lavoratori delle saline iniziano a soffrire di una febbre delirante. <text:span text:style-name="T1">Rottura</text:span>: I malati raccontano di una creatura fatta di sale che cammina tra le dune e li chiama per nome. <text:span text:style-name="T1">Come iniziare subito</text:span>:</text:p>
      <text:list text:style-name="L19">
        <text:list-item>
          <text:p text:style-name="P32">I PG sono guaritori o medici inviati dal Granduca.</text:p>
        </text:list-item>
        <text:list-item>
          <text:p text:style-name="P32">Una visione della febbre anticipa un disastro imminente.</text:p>
        </text:list-item>
        <text:list-item>
          <text:p text:style-name="P32">Le autorità vogliono chiudere le saline con la forza. <text:span text:style-name="T1">Tag</text:span>: malattia, visioni, industriale, corpo e mito</text:p>
        </text:list-item>
      </text:list>
      <text:h text:style-name="Heading_20_3" text:outline-level="3"><text:bookmark-start text:name="la-sesta-porta-di-allasia"/><text:span text:style-name="T1">La sesta porta di Allasia</text:span><text:bookmark-end text:name="la-sesta-porta-di-allasia"/></text:h>
      <text:p text:style-name="First_20_paragraph"><text:span text:style-name="T1">Dove</text:span>: Città-stato di Allasia <text:span text:style-name="T1">Contesto</text:span>: Dopo un terremoto, si riapre una porta antica murata da secoli nelle mura cittadine. <text:span text:style-name="T1">Rottura</text:span>: Nessuno ne ricorda l’origine. Qualcuno dice che “non porta in nessun luogo, ma cambia chi la attraversa.” <text:span text:style-name="T1">Come iniziare subito</text:span>:</text:p>
      <text:list text:style-name="L20">
        <text:list-item>
          <text:p text:style-name="P33">I PG sono incaricati di esplorarla.</text:p>
        </text:list-item>
        <text:list-item>
          <text:p text:style-name="P33">Un PG riceve lettere misteriose da “chi è già oltre”.</text:p>
        </text:list-item>
        <text:list-item>
          <text:p text:style-name="P33">Le autorità vogliono murarla. Ma la città ha già iniziato a cambiare. <text:span text:style-name="T1">Tag</text:span>: metafisico, città, rovina, soglia</text:p>
        </text:list-item>
      </text:list>
      <text:h text:style-name="Heading_20_3" text:outline-level="3"><text:bookmark-start text:name="il-rame-e-la-sabbia"/><text:span text:style-name="T1">Il rame e la sabbia</text:span><text:bookmark-end text:name="il-rame-e-la-sabbia"/></text:h>
      <text:p text:style-name="First_20_paragraph"><text:span text:style-name="T1">Dove</text:span>: Deserto di Qadmath, Aridonia <text:span text:style-name="T1">Contesto</text:span>: Una carovana scompare. Dopo settimane, una guardia ritorna, ricoperta di rame fuso, muta. <text:span text:style-name="T1">Rottura</text:span>: Il rame sembra vivo. La sabbia che la circonda non lascia più impronte. <text:span text:style-name="T1">Come iniziare subito</text:span>:</text:p>
      <text:list text:style-name="L21">
        <text:list-item>
          <text:p text:style-name="P34">I PG devono ricostruire l’itinerario della carovana.</text:p>
        </text:list-item>
        <text:list-item>
          <text:p text:style-name="P34">Un culto proclama che la donna è stata “purificata”.</text:p>
        </text:list-item>
        <text:list-item>
          <text:p text:style-name="P34">Il rame si diffonde. E cambia chi lo tocca. <text:span text:style-name="T1">Tag</text:span>: strano, deserto, trasformazione, perdita</text:p>
        </text:list-item>
      </text:list>
      <text:h text:style-name="Heading_20_2" text:outline-level="2"><text:bookmark-start text:name="sfumature-del-potere"/>🜨 Sfumature del potere<text:bookmark-end text:name="sfumature-del-potere"/></text:h>
      <text:p text:style-name="First_20_paragraph"><text:span text:style-name="T2">Strutture invisibili che reggono il Marethar</text:span></text:p>
      <text:p text:style-name="Text_20_body">Nel Marethar, il potere non è concentrato in un unico luogo, né si manifesta sempre sotto forma di troni, eserciti o decreti. Esistono <text:span text:style-name="T1">forme di influenza più sottili</text:span>, distribuite lungo assi culturali, religiosi, economici e accademici. Alcune sono visibili, altre operano da secoli nell’ombra, altre ancora si confondono con la tradizione o con la fede.</text:p>
      <text:p text:style-name="Text_20_body">Per comprendere le tensioni che muovono il continente, è necessario esaminare tre delle sue fondamenta più diffuse e intrecciate: <text:span text:style-name="T1">le religioni, le gilde e le reti di trasmissione del sapere</text:span>.</text:p>
      <text:h text:style-name="Heading_20_3" text:outline-level="3"><text:bookmark-start text:name="religioni-che-regolano-i-popoli"/>Religioni che regolano i popoli<text:bookmark-end text:name="religioni-che-regolano-i-popoli"/></text:h>
      <text:p text:style-name="First_20_paragraph">In molte regioni del Marethar, la religione <text:span text:style-name="T1">non è separata dall’amministrazione politica o dalla giurisprudenza</text:span>. Le divinità non sono simboli: sono <text:span text:style-name="T1">forze attive</text:span> nei sistemi normativi, nei rituali civili, nelle identità culturali e nel diritto.</text:p>
      <text:h text:style-name="Heading_20_4" text:outline-level="4"><text:bookmark-start text:name="forme-di-influenza-religiosa"/>Forme di influenza religiosa<text:bookmark-end text:name="forme-di-influenza-religiosa"/></text:h>
      <text:list text:style-name="L22">
        <text:list-item>
          <text:p text:style-name="P35">In Aridonia, la <text:span text:style-name="T1">Setta di Shahin</text:span> stabilisce rituali di passaggio, calendario, e in molti casi approva le nomine tribali.</text:p>
        </text:list-item>
        <text:list-item>
          <text:p text:style-name="P35">In Vallan e Orethia, le <text:span text:style-name="T1">fedi sciamaniche degli antenati</text:span> influenzano l’accesso al potere militare e la validazione delle imprese.</text:p>
        </text:list-item>
        <text:list-item>
          <text:p text:style-name="P35">In Linia, la <text:span text:style-name="T1">Fede degli Dei di Ralertis</text:span> affianca il senato in questioni simboliche e patrimoniali, ma senza potere esecutivo diretto.</text:p>
        </text:list-item>
        <text:list-item>
          <text:p text:style-name="P35">In Thalassia, le <text:span text:style-name="T1">fedi animistiche come il culto di Thalaran</text:span> regolano il comportamento dei mercanti, specialmente in mare.</text:p>
        </text:list-item>
      </text:list>
      <text:h text:style-name="Heading_20_4" text:outline-level="4"><text:bookmark-start text:name="conflitti-tipici"/>Conflitti tipici<text:bookmark-end text:name="conflitti-tipici"/></text:h>
      <text:list text:style-name="L23">
        <text:list-item>
          <text:p text:style-name="P36"><text:span text:style-name="T1">Giurisdizione incerta</text:span>: chi giudica un crimine sacrilego? Il tempio o il tribunale?</text:p>
        </text:list-item>
        <text:list-item>
          <text:p text:style-name="P36"><text:span text:style-name="T1">Eresie funzionali</text:span>: culti minoritari nascono per rispondere a bisogni sociali non soddisfatti dalle fedi ufficiali.</text:p>
        </text:list-item>
        <text:list-item>
          <text:p text:style-name="P36"><text:span text:style-name="T1">Sincretismi spontanei</text:span>: in città di confine, i riti si contaminano e le comunità litigano su quale interpretazione sia “vera”.</text:p>
        </text:list-item>
      </text:list>
      <text:p text:style-name="P37"><text:span text:style-name="T2">Nota di archivio: in numerosi villaggi di frontiera tra Premia e Ashania, i due calendari religiosi sono fusi in uno solo, il </text:span>“<text:span text:style-name="T2">Ciclo delle Due Luci</text:span>”<text:span text:style-name="T2">, non riconosciuto da nessuna autorità.</text:span></text:p>
      <text:h text:style-name="Heading_20_3" text:outline-level="3"><text:bookmark-start text:name="gilde-e-ordini-come-strutture-sovranazionali"/>Gilde e ordini come strutture sovranazionali<text:bookmark-end text:name="gilde-e-ordini-come-strutture-sovranazionali"/></text:h>
      <text:p text:style-name="First_20_paragraph">Nel Marethar, le gilde di mercanti e artigiani non sono semplici consorzi economici. Alcune di esse <text:span text:style-name="T1">dispongono di poteri paragonabili a quelli delle magistrature</text:span>, influenzando prezzi, standard di qualità, accesso alle professioni e trattati commerciali.</text:p>
      <text:h text:style-name="Heading_20_4" text:outline-level="4"><text:bookmark-start text:name="esempi-rilevanti"/>Esempi rilevanti<text:bookmark-end text:name="esempi-rilevanti"/></text:h>
      <text:list text:style-name="L24">
        <text:list-item>
          <text:p text:style-name="P38">La <text:span text:style-name="T1">Gilda dei Mercanti di Meshdad</text:span> controlla la rete delle spezie, fissa i prezzi ufficiali e media tra città in guerra commerciale.</text:p>
        </text:list-item>
        <text:list-item>
          <text:p text:style-name="P38">La <text:span text:style-name="T1">Corporazione dei Costruttori Navali di Lysandria</text:span> definisce chi può varare navi, imponendo anche sanzioni extragiuridiche.</text:p>
        </text:list-item>
        <text:list-item>
          <text:p text:style-name="P38">La <text:span text:style-name="T1">Confraternita degli Artigiani di Vallan</text:span> ha il potere di bloccare l’uso di materiali non approvati, come accaduto con l’“argento risonante”.</text:p>
        </text:list-item>
      </text:list>
      <text:p text:style-name="First_20_paragraph">Molte gilde impongono <text:span text:style-name="T1">riti d’ingresso, giuramenti e simboli d’appartenenza</text:span>, spesso sconosciuti all’esterno. Il loro potere è <text:span text:style-name="T1">trasversale agli stati</text:span>, e le città che provano a limitarle spesso vedono insorgere crisi economiche o scioperi tecnici prolungati.</text:p>
      <text:h text:style-name="Heading_20_4" text:outline-level="4"><text:bookmark-start text:name="ordini-spirituali-e-magici"/>Ordini spirituali e magici<text:bookmark-end text:name="ordini-spirituali-e-magici"/></text:h>
      <text:list text:style-name="L25">
        <text:list-item>
          <text:p text:style-name="P39">Gli <text:span text:style-name="T1">Ordini religiosi</text:span> (come i Druidi di Dimilalica o gli Sciamani di Shemshahva) hanno spesso funzioni parallele a quelle delle accademie.</text:p>
        </text:list-item>
        <text:list-item>
          <text:p text:style-name="P39">Alcuni <text:span text:style-name="T1">ordini magici</text:span> (es. l’Ordine dei Maghi di Thalassia) impongono codici di condotta magica e raccolgono registri di artefatti e incantatori.</text:p>
        </text:list-item>
        <text:list-item>
          <text:p text:style-name="P39">Le <text:span text:style-name="T1">società segrete</text:span> (es. la Mano Nera o la Fratellanza degli Assassini di Rashia) agiscono come potenze occulte, spesso legate a nobiltà o mercanti.</text:p>
        </text:list-item>
      </text:list>
      <text:p text:style-name="P40"><text:span text:style-name="T2">Nota censurata nei registri di Fahya: </text:span>“<text:span text:style-name="T2">Durante il Concilio del Rame, fu un alchimista — non un generale — a dettare le condizioni del trattato.</text:span>”</text:p>
      <text:h text:style-name="Heading_20_3" text:outline-level="3"><text:bookmark-start text:name="tradizione-orale-accademia-e-potere-del-sapere"/>Tradizione orale, accademia e potere del sapere<text:bookmark-end text:name="tradizione-orale-accademia-e-potere-del-sapere"/></text:h>
      <text:p text:style-name="First_20_paragraph">Il Marethar è un continente in cui la <text:span text:style-name="T1">trasmissione del sapere</text:span> non è uniforme. In alcune regioni, la conoscenza è orale e affidata ad anziani, sacerdoti o viandanti. In altre, è <text:span text:style-name="T1">accademizzata, conservata in biblioteche e trattati</text:span>, spesso inaccessibili ai non iniziati.</text:p>
      <text:h text:style-name="Heading_20_4" text:outline-level="4"><text:bookmark-start text:name="esempi-e-tensioni"/>Esempi e tensioni<text:bookmark-end text:name="esempi-e-tensioni"/></text:h>
      <text:list text:style-name="L26">
        <text:list-item>
          <text:p text:style-name="P41">A Premia, il <text:span text:style-name="T1">Collegio dei Filosofi di Preiacoria</text:span> impone standard linguistici e interpretativi per i testi storici.</text:p>
        </text:list-item>
        <text:list-item>
          <text:p text:style-name="P41">A Fahya, l’<text:span text:style-name="T1">Università Magica</text:span> regola chi può praticare e insegnare magia — e quali formule sono vietate.</text:p>
        </text:list-item>
        <text:list-item>
          <text:p text:style-name="P41">In Aridonia e Naharim, <text:span text:style-name="T1">le leggende vengono trasmesse in forma poetica</text:span>, spesso con varianti locali contraddittorie.</text:p>
        </text:list-item>
      </text:list>
      <text:h text:style-name="Heading_20_4" text:outline-level="4"><text:bookmark-start text:name="temi-ricorrenti"/>Temi ricorrenti<text:bookmark-end text:name="temi-ricorrenti"/></text:h>
      <text:list text:style-name="L27">
        <text:list-item>
          <text:p text:style-name="P42"><text:span text:style-name="T1">Chi ha il diritto di scrivere?</text:span> Alcune culture non trascrivono mai le visioni. Altre le ritualizzano solo dopo conferma collettiva.</text:p>
        </text:list-item>
        <text:list-item>
          <text:p text:style-name="P42"><text:span text:style-name="T1">Chi ha il diritto di leggere?</text:span> Le accademie impongono esami, giuramenti, censure. In molte regioni, il sapere è proprietà politica.</text:p>
        </text:list-item>
        <text:list-item>
          <text:p text:style-name="P42"><text:span text:style-name="T1">Quali verità sopravvivono?</text:span> Le gilde distruggono ricette concorrenti. I culti riscrivono cronologie. Le leggende cancellano fatti imbarazzanti.</text:p>
        </text:list-item>
      </text:list>
      <text:p text:style-name="P43"><text:span text:style-name="T2">Epigrafe incisa su un frammento di statua a Lurocedina:</text:span> “Una verità dimenticata è una menzogna concessa.”</text:p>
      <text:h text:style-name="Heading_20_2" text:outline-level="2"><text:bookmark-start text:name="magia-alchimia-sapere"/>🝗 Magia, alchimia, sapere<text:bookmark-end text:name="magia-alchimia-sapere"/></text:h>
      <text:p text:style-name="First_20_paragraph"><text:span text:style-name="T2">Forze che non si lasciano addomesticare</text:span></text:p>
      <text:p text:style-name="Text_20_body">In Marethar, il sapere è frammentato, conteso, stratificato. La magia, l’alchimia e la conoscenza ancestrale non sono mai state un patrimonio unitario, né accessibile a tutti. Ogni cultura l’ha codificata secondo le proprie necessità, ogni ordine ha cercato di delimitarla, ogni potere ha tentato di piegarla ai propri fini. Nessuna forma di sapere è neutra. Ogni conoscenza è anche un gesto politico.</text:p>
      <text:h text:style-name="Heading_20_3" text:outline-level="3"><text:bookmark-start text:name="le-quattro-vie-della-potenza-arcana"/>Le quattro vie della potenza arcana<text:bookmark-end text:name="le-quattro-vie-della-potenza-arcana"/></text:h>
      <text:p text:style-name="First_20_paragraph">Benché la terminologia vari, si riconoscono quattro assi maggiori lungo cui si dispiegano le pratiche magiche nel Marethar. Esse non si escludono, ma raramente convivono nello stesso individuo o istituzione.</text:p>
      <text:h text:style-name="Heading_20_4" text:outline-level="4"><text:bookmark-start text:name="magia-elementale"/>Magia Elementale<text:bookmark-end text:name="magia-elementale"/></text:h>
      <text:p text:style-name="First_20_paragraph"><text:span text:style-name="T1">Origine e diffusione</text:span>: È la più antica, e in molte zone anche la più diffusa. Radicata nei culti arcaici e nei rituali sciamanici, si fonda sul dominio simbolico e pratico degli elementi naturali: fuoco, acqua, terra, aria. <text:span text:style-name="T1">Modalità d’uso</text:span>: Richiede un rapporto diretto con l’ambiente. Gli sciamani aridoniani controllano il fuoco cerimoniale. I sacerdoti di Dor usano l’acqua per la purificazione. I druidi di Dimilalica celebrano i venti stagionali e i moti tellurici. <text:span text:style-name="T1">Tensioni</text:span>: Alcuni ordini accademici considerano questa forma rozza e incontrollabile. Alcune città la vietano, temendone l’uso distruttivo nei rituali di vendetta.</text:p>
      <text:h text:style-name="Heading_20_4" text:outline-level="4"><text:bookmark-start text:name="magia-divina"/>Magia Divina<text:bookmark-end text:name="magia-divina"/></text:h>
      <text:p text:style-name="First_20_paragraph"><text:span text:style-name="T1">Origine e diffusione</text:span>: Deriva dall’invocazione di divinità o spiriti superiori. È strettamente legata alla struttura religiosa locale e alla legittimità dei suoi officianti. <text:span text:style-name="T1">Modalità d’uso</text:span>: Passa attraverso rituali, offerte, canti, prostrazioni. Solo i fedeli riconosciuti possono accedere ai suoi poteri. In Aridonia, le sacerdotesse di Shahin curano con la linfa consacrata. In Orethia, i seguaci di Tudeshkhast usano la magia per riti di equilibrio. <text:span text:style-name="T1">Tensioni</text:span>: Le autorità religiose controllano l’accesso ai rituali. Le eresie (come la Setta del Bufalo della Vittoria) vengono perseguitate per uso “improprio” della magia. Alcune fedi si contendono il medesimo dominio (es. sulla guarigione o sulle visioni).</text:p>
      <text:h text:style-name="Heading_20_4" text:outline-level="4"><text:bookmark-start text:name="magia-sciamanica"/>Magia Sciamanica<text:bookmark-end text:name="magia-sciamanica"/></text:h>
      <text:p text:style-name="First_20_paragraph"><text:span text:style-name="T1">Origine e diffusione</text:span>: Appartiene alle culture tribali e marginali. Basata su trance, sogni, possessione, dialogo con spiriti e antenati. <text:span text:style-name="T1">Modalità d’uso</text:span>: Non si apprende in accademia. Si riceve attraverso visioni, riti di passaggio, contatti con il mondo invisibile. Gli sciamani di Shemshahva, ad esempio, tramandano canti che modificano la percezione del tempo. <text:span text:style-name="T1">Tensioni</text:span>: È ritenuta inaffidabile da molte autorità. In alcune città viene tollerata come folklore; in altre, repressa come eresia o truffa. Tuttavia, il suo potere effettivo è riconosciuto anche da chi la teme.</text:p>
      <text:h text:style-name="Heading_20_4" text:outline-level="4"><text:bookmark-start text:name="magia-alchemica"/>Magia Alchemica<text:bookmark-end text:name="magia-alchemica"/></text:h>
      <text:p text:style-name="First_20_paragraph"><text:span text:style-name="T1">Origine e diffusione</text:span>: Nasce nei laboratori, nelle accademie e tra le gilde. Combina sapere empirico, simbolico e mistico. <text:span text:style-name="T1">Modalità d’uso</text:span>: Richiede tecniche, strumenti, conoscenza di sostanze rare e codici cifrati. A Linia e Premia gli alchimisti lavorano sotto contratto per l’élite, creando pozioni, esplosivi, sigilli, meccanismi arcani. <text:span text:style-name="T1">Tensioni</text:span>: La sua efficacia è temuta tanto quanto la sua opacità. Alcuni la confondono con la scienza pura, altri la vedono come una minaccia sociale. Le formule sono gelosamente custodite; le frodi, frequenti.</text:p>
      <text:h text:style-name="Heading_20_3" text:outline-level="3"><text:bookmark-start text:name="chi-ha-accesso-al-potere-a-quale-prezzo"/>Chi ha accesso al potere? A quale prezzo?<text:bookmark-end text:name="chi-ha-accesso-al-potere-a-quale-prezzo"/></text:h>
      <text:p text:style-name="First_20_paragraph">La magia non è per tutti. Non lo è mai stata. In alcune culture è ereditaria; in altre, concessa dai culti; altrove, frutto di studio. Ma ovunque, il suo uso implica un <text:span text:style-name="T1">costo materiale, sociale o esistenziale</text:span>.</text:p>
      <text:h text:style-name="Heading_20_4" text:outline-level="4"><text:bookmark-start text:name="strutture-di-controllo"/>Strutture di controllo<text:bookmark-end text:name="strutture-di-controllo"/></text:h>
      <text:list text:style-name="L28">
        <text:list-item>
          <text:p text:style-name="P44"><text:span text:style-name="T1">Templi</text:span>: autorizzano o vietano determinati rituali. In certi luoghi, solo sacerdoti consacrati possono evocare.</text:p>
        </text:list-item>
        <text:list-item>
          <text:p text:style-name="P44"><text:span text:style-name="T1">Accademie</text:span>: formano ufficialmente maghi, ma pongono filtri d’ingresso economici e politici. A Fahya, l’università magica ha un esame di accesso che solo un decimo dei candidati supera.</text:p>
        </text:list-item>
        <text:list-item>
          <text:p text:style-name="P44"><text:span text:style-name="T1">Ordini e gilde</text:span>: decidono chi può vendere, insegnare, ereditare formule. I trasgressori possono essere perseguiti legalmente… o con altri mezzi.</text:p>
        </text:list-item>
      </text:list>
      <text:h text:style-name="Heading_20_4" text:outline-level="4"><text:bookmark-start text:name="costi-comuni"/>Costi comuni<text:bookmark-end text:name="costi-comuni"/></text:h>
      <text:list text:style-name="L29">
        <text:list-item>
          <text:p text:style-name="P45"><text:span text:style-name="T1">Fisici</text:span>: l’uso prolungato può consumare il corpo o la mente. Alcuni maghi accusano mutazioni sottili, emorragie spirituali, cecità progressiva.</text:p>
        </text:list-item>
        <text:list-item>
          <text:p text:style-name="P45"><text:span text:style-name="T1">Sociali</text:span>: molti praticanti sono temuti, isolati, esiliati. Alcuni accettano la fama in cambio dell’emarginazione.</text:p>
        </text:list-item>
        <text:list-item>
          <text:p text:style-name="P45"><text:span text:style-name="T1">Rituali</text:span>: alcuni poteri richiedono offerte, sacrifici, isolamento. Alcuni riti devono essere svolti da soli, altri mai due volte nello stesso luogo.</text:p>
        </text:list-item>
      </text:list>
      <text:p text:style-name="P46"><text:span text:style-name="T2">Nota rituale trovata nel Collegio dei Filosofi</text:span>: “Ogni formula ha un prezzo. Se non sai qual è, sei solo in ritardo nel pagarlo.”</text:p>
      <text:h text:style-name="Heading_20_3" text:outline-level="3"><text:bookmark-start text:name="luoghi-di-potere-concentrazione-e-anomalia"/>Luoghi di potere, concentrazione e anomalia<text:bookmark-end text:name="luoghi-di-potere-concentrazione-e-anomalia"/></text:h>
      <text:p text:style-name="First_20_paragraph">Alcuni luoghi nel Marethar mostrano concentrazioni anomale di energia arcana. A volte sono considerati <text:span text:style-name="T1">sacri o interditti</text:span>. In altri casi, sono <text:span text:style-name="T1">zone di conflitto, studio o leggenda</text:span>.</text:p>
      <text:h text:style-name="Heading_20_4" text:outline-level="4"><text:bookmark-start text:name="luoghi-rituali"/>Luoghi rituali<text:bookmark-end text:name="luoghi-rituali"/></text:h>
      <text:list text:style-name="L30">
        <text:list-item>
          <text:p text:style-name="P47"><text:span text:style-name="T1">Le cripte di Shahin</text:span> a Nabad</text:p>
        </text:list-item>
        <text:list-item>
          <text:p text:style-name="P47"><text:span text:style-name="T1">Le radure cerimoniali</text:span> della Foresta di Aurel</text:p>
        </text:list-item>
        <text:list-item>
          <text:p text:style-name="P47"><text:span text:style-name="T1">I santuari fluviali</text:span> lungo il Dor, dove l’acqua è detta “cantante”</text:p>
        </text:list-item>
      </text:list>
      <text:p text:style-name="First_20_paragraph">Spazi ancora attivi, legati a cerimonie stagionali, solstizi, apparizioni.</text:p>
      <text:h text:style-name="Heading_20_4" text:outline-level="4"><text:bookmark-start text:name="laboratori-e-centri-di-sapere"/>Laboratori e centri di sapere<text:bookmark-end text:name="laboratori-e-centri-di-sapere"/></text:h>
      <text:list text:style-name="L31">
        <text:list-item>
          <text:p text:style-name="P48"><text:span text:style-name="T1">Le torri isolate</text:span> degli alchimisti di Linia</text:p>
        </text:list-item>
        <text:list-item>
          <text:p text:style-name="P48"><text:span text:style-name="T1">I laboratori profondi</text:span> dell’università di Fahya</text:p>
        </text:list-item>
        <text:list-item>
          <text:p text:style-name="P48"><text:span text:style-name="T1">Le camere delle sostanze proibite</text:span> a Preiacoria</text:p>
        </text:list-item>
      </text:list>
      <text:p text:style-name="First_20_paragraph">Qui si conducono esperimenti, ma anche <text:span text:style-name="T2">tentativi di mappare</text:span> il potere. Alcuni di questi luoghi sono tenuti segreti da secoli.</text:p>
      <text:h text:style-name="Heading_20_4" text:outline-level="4"><text:bookmark-start text:name="luoghi-ambigui-e-contesi"/>Luoghi ambigui e contesi<text:bookmark-end text:name="luoghi-ambigui-e-contesi"/></text:h>
      <text:list text:style-name="L32">
        <text:list-item>
          <text:p text:style-name="P49">Le <text:span text:style-name="T1">rovine sommerse</text:span> di Thalassia, visibili solo durante le maree inverse</text:p>
        </text:list-item>
        <text:list-item>
          <text:p text:style-name="P49">Le <text:span text:style-name="T1">miniere mute</text:span> di Vallan, da cui si estraggono metalli che “non fanno rumore”</text:p>
        </text:list-item>
        <text:list-item>
          <text:p text:style-name="P49">Le <text:span text:style-name="T1">grotte del Deserto di Suleiman</text:span>, che nessuna mappa riesce a fissare due volte</text:p>
        </text:list-item>
      </text:list>
      <text:p text:style-name="First_20_paragraph">Su questi luoghi non c’è consenso: alcuni li ritengono maledetti, altri luoghi di rivelazione. Gli studiosi si dividono tra chi vuole isolarli e chi vuole sfruttarli.</text:p>
      <text:h text:style-name="Heading_20_4" text:outline-level="4"><text:bookmark-start text:name="voci-e-frammenti"/>Voci e frammenti<text:bookmark-end text:name="voci-e-frammenti"/></text:h>
      <text:p text:style-name="P50">“C’è una stanza sotto la città di Allasia in cui l’aria non invecchia mai.” “I sogni ricorrenti dei fedeli della Setta del Bufalo corrispondono alla mappa di una roccaforte dimenticata.” “Un alambicco lasciato acceso troppo a lungo ha cantato per tre giorni nella torre di Premia.”</text:p>
      <text:h text:style-name="Heading_20_1" text:outline-level="1"><text:bookmark-start text:name="parte-ii-atlante-del-marethar"/>🜄 Parte II – Atlante del Marethar<text:bookmark-end text:name="parte-ii-atlante-del-marethar"/></text:h>
      <text:p text:style-name="First_20_paragraph"><text:span text:style-name="T2">Cartografie incerte, cronologie contese</text:span></text:p>
      <text:p text:style-name="P51">“<text:span text:style-name="T2">Le città hanno nomi ufficiali, e poi nomi che usano solo quelli che ci vivono.</text:span>”</text:p>
      <text:p text:style-name="First_20_paragraph">C’è chi ha cercato di misurare il Marethar: con mappe, date, simboli. C’è chi ha fallito, ma ha lasciato inchiostro e polvere come guida. Questo atlante raccoglie culture, stati, genealogie. Alcune sono ancora vive, altre sopravvivono nei proverbi. Alcune mentono. Quasi tutte hanno cercato di uccidere le altre almeno una volta.</text:p>
      <text:h text:style-name="Heading_20_2" text:outline-level="2"><text:bookmark-start text:name="cronologia-essenziale"/>🝱 Cronologia Essenziale<text:bookmark-end text:name="cronologia-essenziale"/></text:h>
      <text:p text:style-name="First_20_paragraph"><text:span text:style-name="T2">Riferimenti storici condivisi e divergenze interpretative</text:span></text:p>
      <text:p text:style-name="P52">“<text:span text:style-name="T2">I secoli si inseguono come eserciti in marcia: ordinati solo se visti dall’alto.</text:span>” – Proverbio liniano</text:p>
      <text:p text:style-name="First_20_paragraph">Il Marethar non possiede un’unica cronologia condivisa. Ogni cultura misura il tempo secondo i propri eventi fondanti: alcune dal primo Diluvio, altre dalla rivelazione di una divinità, altre ancora dalla fondazione di una città sacra. Tuttavia, studiosi, accademie e cronisti hanno costruito nel tempo una “<text:span text:style-name="T1">cronologia ponte</text:span>”, basata su fonti incrociate, oggetti datati, allineamenti astronomici e cicli agricoli.</text:p>
      <text:p text:style-name="Text_20_body">Tale cronologia è <text:span text:style-name="T1">imperfetta e contestata</text:span>, ma permette di leggere lo sviluppo storico del continente attraverso tre principali lenti:</text:p>
      <text:list text:style-name="L33">
        <text:list-item>
          <text:p text:style-name="P53"><text:span text:style-name="T1">Eventi politici e militari</text:span> (in rosso)</text:p>
        </text:list-item>
        <text:list-item>
          <text:p text:style-name="P53"><text:span text:style-name="T1">Eventi religiosi e culturali</text:span> (in oro)</text:p>
        </text:list-item>
        <text:list-item>
          <text:p text:style-name="P53"><text:span text:style-name="T1">Eventi tecnici, scientifici e magici</text:span> (in blu)</text:p>
        </text:list-item>
      </text:list>
      <text:h text:style-name="Heading_20_3" text:outline-level="3"><text:bookmark-start text:name="epoca-delle-prime-fedi"/><text:span text:style-name="T1">Epoca delle Prime Fedi</text:span><text:bookmark-end text:name="epoca-delle-prime-fedi"/></text:h>
      <text:p text:style-name="First_20_paragraph"><text:span text:style-name="T2">(dal tempo mitico fino a circa 800 anni fa)</text:span></text:p>
      <text:list text:style-name="L34">
        <text:list-item>
          <text:p text:style-name="P54"><text:span text:style-name="T1">Fondazione orale dei culti di Shahin, Pulbium, Shemshahva</text:span> – Le prime comunità rituali si organizzano attorno a simboli arborei, costellazioni e leggi non scritte. <text:span text:style-name="T2">(oro)</text:span></text:p>
        </text:list-item>
        <text:list-item>
          <text:p text:style-name="P54"><text:span text:style-name="T1">Inizio dell’agricoltura irrigua lungo il Dor</text:span> – Compattazione delle tribù naharim in comunità stabili. <text:span text:style-name="T2">(blu)</text:span></text:p>
        </text:list-item>
        <text:list-item>
          <text:p text:style-name="P54"><text:span text:style-name="T1">Guerre rituali tra clan aridoniani</text:span> – Le “Guerre del Leone” segnano il passaggio dalla narrazione mitica all’organizzazione politica. <text:span text:style-name="T2">(rosso)</text:span></text:p>
        </text:list-item>
        <text:list-item>
          <text:p text:style-name="P54"><text:span text:style-name="T1">Prima trascrizione di un poema sacro a Fahya</text:span> – Sopravvive in frammenti nella “Liturgia delle tre ombre”. <text:span text:style-name="T2">(oro/blu)</text:span></text:p>
        </text:list-item>
        <text:list-item>
          <text:p text:style-name="P54"><text:span text:style-name="T1">Contraddizione</text:span>: la cronologia aridoniana colloca la comparsa del Bufalo sacro due secoli prima della diffusione agricola; alcuni studiosi lo ritengono un anacronismo rituale.</text:p>
        </text:list-item>
      </text:list>
      <text:h text:style-name="Heading_20_3" text:outline-level="3"><text:bookmark-start text:name="epoca-delle-città-sovrane"/><text:span text:style-name="T1">Epoca delle Città Sovrane</text:span><text:bookmark-end text:name="epoca-delle-città-sovrane"/></text:h>
      <text:p text:style-name="First_20_paragraph"><text:span text:style-name="T2">(circa 800–400 anni fa)</text:span></text:p>
      <text:list text:style-name="L35">
        <text:list-item>
          <text:p text:style-name="P55"><text:span text:style-name="T1">Fondazione della Lega Rhithiana</text:span> – Le isole si uniscono sotto un patto commerciale, con un calendario comune. <text:span text:style-name="T2">(rosso)</text:span></text:p>
        </text:list-item>
        <text:list-item>
          <text:p text:style-name="P55"><text:span text:style-name="T1">Nascita delle prime gilde artigiane e mercantili</text:span> – Standardizzazione delle misure, codificazione di formule alchemiche. <text:span text:style-name="T2">(blu)</text:span></text:p>
        </text:list-item>
        <text:list-item>
          <text:p text:style-name="P55"><text:span text:style-name="T1">Prima Guerra Marittima tra Lysandria e Thalassia</text:span> – Le navi armate diventano vettori di culto e commercio. <text:span text:style-name="T2">(rosso/oro)</text:span></text:p>
        </text:list-item>
        <text:list-item>
          <text:p text:style-name="P55"><text:span text:style-name="T1">Incendio della Biblioteca Antica di Preiacoria</text:span> – Perduti molti testi rituali e le prime mappe celesti codificate. <text:span text:style-name="T2">(oro/blu)</text:span></text:p>
        </text:list-item>
        <text:list-item>
          <text:p text:style-name="P55"><text:span text:style-name="T1">Contraddizione</text:span>: la Cronaca di Aurel afferma che la Lega Rhithiana nacque dopo la guerra, ma ritrovamenti numismatici sembrano dimostrare il contrario.</text:p>
        </text:list-item>
      </text:list>
      <text:h text:style-name="Heading_20_3" text:outline-level="3"><text:bookmark-start text:name="epoca-delle-riforme-e-degli-ordini"/><text:span text:style-name="T1">Epoca delle Riforme e degli Ordini</text:span><text:bookmark-end text:name="epoca-delle-riforme-e-degli-ordini"/></text:h>
      <text:p text:style-name="First_20_paragraph"><text:span text:style-name="T2">(circa 400–120 anni fa)</text:span></text:p>
      <text:list text:style-name="L36">
        <text:list-item>
          <text:p text:style-name="P56"><text:span text:style-name="T1">Codificazione delle Dottrine di Shahin</text:span> – Primo testo sacro formalizzato, diviso in sei libri. <text:span text:style-name="T2">(oro)</text:span></text:p>
        </text:list-item>
        <text:list-item>
          <text:p text:style-name="P56"><text:span text:style-name="T1">Unificazione militare del Regno di Vallan</text:span> – Espansione a danno delle regioni minerarie e assimilazione forzata dei culti montani. <text:span text:style-name="T2">(rosso)</text:span></text:p>
        </text:list-item>
        <text:list-item>
          <text:p text:style-name="P56"><text:span text:style-name="T1">Fioritura dell’alchimia liniana</text:span> – Prime torri di distillazione, mappe dei metalli, studio delle proprietà trasmutative. <text:span text:style-name="T2">(blu)</text:span></text:p>
        </text:list-item>
        <text:list-item>
          <text:p text:style-name="P56"><text:span text:style-name="T1">Trattato delle Due Verità tra Premia e Ashania</text:span> – Accordo per la coesistenza di due fedi rivali. <text:span text:style-name="T2">(rosso/oro)</text:span></text:p>
        </text:list-item>
        <text:list-item>
          <text:p text:style-name="P56"><text:span text:style-name="T1">Contraddizione</text:span>: l’Accordo delle Due Verità risulta siglato “nell’anno dell’eclissi”, ma l’eclissi registrata corrisponde a due decenni dopo la data convenzionale.</text:p>
        </text:list-item>
      </text:list>
      <text:h text:style-name="Heading_20_3" text:outline-level="3"><text:bookmark-start text:name="epoca-delle-divergenze-attuali"/><text:span text:style-name="T1">Epoca delle Divergenze Attuali</text:span><text:bookmark-end text:name="epoca-delle-divergenze-attuali"/></text:h>
      <text:p text:style-name="First_20_paragraph"><text:span text:style-name="T2">(ultimi 120 anni)</text:span></text:p>
      <text:list text:style-name="L37">
        <text:list-item>
          <text:p text:style-name="P57"><text:span text:style-name="T1">Frattura tra le città del Golfo di Ral-Tesh</text:span> – Guerre ideologiche tra culti concorrenti. <text:span text:style-name="T2">(rosso/oro)</text:span></text:p>
        </text:list-item>
        <text:list-item>
          <text:p text:style-name="P57"><text:span text:style-name="T1">Scoperta delle terre orientali oltre le rotte proibite</text:span> – Generazione di nuovi culti sincretici e crisi commerciale nelle isole. <text:span text:style-name="T2">(blu/rosso)</text:span></text:p>
        </text:list-item>
        <text:list-item>
          <text:p text:style-name="P57"><text:span text:style-name="T1">Esplosione nel laboratorio di Fahya</text:span> – Scomparsa di tre alchimisti e apertura di un “varco silenzioso” (non confermato). <text:span text:style-name="T2">(blu)</text:span></text:p>
        </text:list-item>
        <text:list-item>
          <text:p text:style-name="P57"><text:span text:style-name="T1">Riemersione del Culto dell’Ombra Fissa</text:span> – Antica fede considerata estinta, riappare con nuovi testi apocrifi. <text:span text:style-name="T2">(oro)</text:span></text:p>
        </text:list-item>
        <text:list-item>
          <text:p text:style-name="P57"><text:span text:style-name="T1">Contraddizione</text:span>: le testimonianze sulla riemersione del culto riportano date discordanti di oltre trent’anni. Si sospetta una manipolazione delle fonti.</text:p>
        </text:list-item>
      </text:list>
      <text:h text:style-name="Heading_20_3" text:outline-level="3"><text:bookmark-start text:name="considerazioni-storiografiche"/>Considerazioni storiografiche<text:bookmark-end text:name="considerazioni-storiografiche"/></text:h>
      <text:p text:style-name="First_20_paragraph">L’elaborazione di una cronologia comune per il Marethar è un’impresa tanto necessaria quanto incerta. Ogni cultura del continente ha sviluppato nel tempo un proprio <text:span text:style-name="T1">sistema di riferimento temporale</text:span>, radicato in eventi fondanti — spesso mitici, a volte politici, quasi mai neutri.</text:p>
      <text:p text:style-name="Text_20_body"><text:span text:style-name="T1">Nessuna di queste cronologie è completa.</text:span> Anche le civiltà con tradizioni scritturali consolidate presentano <text:span text:style-name="T1">omissioni, riscritture, silenzi rituali</text:span>. Archivi perduti, incendi deliberati, interdetti religiosi e riforme calendariali hanno frammentato la memoria in modo irreversibile. In molte regioni, la trasmissione orale ha preceduto (e spesso sostituito) quella scritta, generando discrepanze anche gravi tra versioni diverse dello stesso evento.</text:p>
      <text:p text:style-name="Text_20_body"><text:span text:style-name="T1">I calendari religiosi non sono sincronizzati.</text:span> Una festività che in Premia segna l’inizio dell’anno può coincidere, in Ashania, con la chiusura di un ciclo di penitenza. Di conseguenza, <text:span text:style-name="T1">lo stesso avvenimento può risultare datato in due epoche diverse</text:span>, oppure ripetuto con significati opposti in contesti distinti. Questo è particolarmente evidente nei riti stagionali e nelle commemorazioni di apparizioni divine, che spesso “si adattano” alla liturgia locale.</text:p>
      <text:p text:style-name="Text_20_body"><text:span text:style-name="T1">Alcuni eventi sono simbolici, retrodatati o costruiti ex post.</text:span> Il “Risveglio di Shahin”, ad esempio, è collocato tradizionalmente sei secoli fa, ma nessun documento anteriore a tre secoli ne fa menzione. Allo stesso modo, la “Caduta dei Tredici Solchi” è attestata solo da fonti poetiche posteriori di almeno due generazioni all’evento stesso. In questi casi, la cronologia serve <text:span text:style-name="T1">più a legittimare un presente</text:span> che a descrivere un passato verificabile.</text:p>
      <text:p text:style-name="Text_20_body">Per tutti questi motivi, ogni datazione riportata nella cronologia essenziale deve essere considerata una <text:span text:style-name="T1">ipotesi operativa, non una verità assoluta</text:span>. Gli studiosi concordano nel trattare queste linee temporali come <text:span text:style-name="T1">strumenti di lettura culturale</text:span>, utili a comprendere la percezione che ogni popolo ha del proprio tempo, più che la sequenza oggettiva dei fatti accaduti.</text:p>
      <text:p text:style-name="P58">“<text:span text:style-name="T2">Le cronologie sono specchi. Riflettono ciò che una cultura vuole ricordare, e ciò che sceglie di dimenticare.</text:span>” – annotazione marginale, manoscritto anonimo della Scuola di Fahya</text:p>
      <text:h text:style-name="Heading_20_2" text:outline-level="2"><text:bookmark-start text:name="culture-del-marethar"/>🜄 Culture del Marethar<text:bookmark-end text:name="culture-del-marethar"/></text:h>
      <text:p text:style-name="First_20_paragraph"><text:span text:style-name="T2">Popoli, memorie e sistemi di senso</text:span></text:p>
      <text:h text:style-name="Heading_20_3" text:outline-level="3"><text:bookmark-start text:name="aridoniani"/>Aridoniani<text:bookmark-end text:name="aridoniani"/></text:h>
      <text:p text:style-name="First_20_paragraph"><text:span text:style-name="T2">Dove la vita è resistenza e la memoria è sabbia</text:span></text:p>
      <text:h text:style-name="Heading_20_4" text:outline-level="4"><text:bookmark-start text:name="origine-e-profilo-culturale"/>Origine e profilo culturale<text:bookmark-end text:name="origine-e-profilo-culturale"/></text:h>
      <text:p text:style-name="First_20_paragraph">Gli Aridoniani discendono da tribù nomadi stanziate nei deserti e negli altopiani del sud Marethar. Sebbene oggi vivano anche in città-oasi ben strutturate, <text:span text:style-name="T1">mantengono un forte legame con le pratiche ancestrali</text:span>, in particolare con il culto degli antenati, l’onore clanico e i ritmi del deserto.</text:p>
      <text:p text:style-name="Text_20_body">Sono noti per la loro <text:span text:style-name="T1">resilienza, struttura tribale, e un senso comunitario profondo</text:span>. La loro architettura è mobile o semi-permanente, le città sono fondate attorno a fonti d’acqua, e la vita è scandita da cicli solari, migrazioni rituali e celebrazioni collettive.</text:p>
      <text:h text:style-name="Heading_20_4" text:outline-level="4"><text:bookmark-start text:name="tag-identitari"/>Tag identitari<text:bookmark-end text:name="tag-identitari"/></text:h>
      <text:p text:style-name="First_20_paragraph">“Onorare gli antenati”, “Sopravvivere insieme”, “Non dimenticare mai un’offesa”</text:p>
      <text:h text:style-name="Heading_20_4" text:outline-level="4"><text:bookmark-start text:name="archetipi-giocabili"/>Archetipi giocabili<text:bookmark-end text:name="archetipi-giocabili"/></text:h>
      <text:list text:style-name="L38">
        <text:list-item>
          <text:p text:style-name="P59">Figlia della Sabbia, pronta a prendere il posto della madre come custode delle storie</text:p>
        </text:list-item>
        <text:list-item>
          <text:p text:style-name="P59">Guerriero delle carovane, in cerca di riscatto dopo aver rotto un giuramento</text:p>
        </text:list-item>
        <text:list-item>
          <text:p text:style-name="P59">Ex-sacerdote di Shahin, in esilio dopo un sogno eretico</text:p>
        </text:list-item>
        <text:list-item>
          <text:p text:style-name="P59">Capotribù giovane, in lotta contro l’ordine dei capi riuniti</text:p>
        </text:list-item>
      </text:list>
      <text:h text:style-name="Heading_20_4" text:outline-level="4"><text:bookmark-start text:name="dialettiche-interne-e-fratture"/>Dialettiche interne e fratture<text:bookmark-end text:name="dialettiche-interne-e-fratture"/></text:h>
      <text:list text:style-name="L39">
        <text:list-item>
          <text:p text:style-name="P60"><text:span text:style-name="T1">Tradizione vs innovazione</text:span>: Alcune oasi si aprono al commercio esterno, altre vogliono mantenere la purezza rituale.</text:p>
        </text:list-item>
        <text:list-item>
          <text:p text:style-name="P60"><text:span text:style-name="T1">Culto di Shahin vs Credenze di Golat</text:span>: la Setta di Shahin è dominante, ma nelle zone di confine il culto sciamanico della Pantera Gialla guadagna seguito.</text:p>
        </text:list-item>
        <text:list-item>
          <text:p text:style-name="P60"><text:span text:style-name="T1">Ruolo delle donne</text:span>: rispettate ovunque, ma in alcune tribù hanno pieno potere politico, in altre solo simbolico.</text:p>
        </text:list-item>
        <text:list-item>
          <text:p text:style-name="P60"><text:span text:style-name="T1">Clanicismo vs federazione</text:span>: il Consiglio dei Capi cerca l’unità, ma i clan più antichi vogliono autonomia.</text:p>
        </text:list-item>
      </text:list>
      <text:h text:style-name="Heading_20_4" text:outline-level="4"><text:bookmark-start text:name="simboli-proverbi-oggetti"/>Simboli, proverbi, oggetti<text:bookmark-end text:name="simboli-proverbi-oggetti"/></text:h>
      <text:list text:style-name="L40">
        <text:list-item>
          <text:p text:style-name="P61"><text:span text:style-name="T1">Simbolo</text:span>: l’Albero Scorticato, emblema del ciclo vita-morte-rigenerazione</text:p>
        </text:list-item>
        <text:list-item>
          <text:p text:style-name="P61"><text:span text:style-name="T1">Proverbio</text:span>: “Chi dimentica il nome del proprio nonno, perde l’ombra”</text:p>
        </text:list-item>
        <text:list-item>
          <text:p text:style-name="P61"><text:span text:style-name="T1">Oggetto sacro</text:span>: il Leone d’Argilla, simulacro del coraggio usato nelle Cerimonie della Sabbia</text:p>
        </text:list-item>
      </text:list>
      <text:h text:style-name="Heading_20_3" text:outline-level="3"><text:bookmark-start text:name="aureliani"/>Aureliani<text:bookmark-end text:name="aureliani"/></text:h>
      <text:p text:style-name="First_20_paragraph"><text:span text:style-name="T2">Discendenti dell’Impero, amanti della forma e dell’ordine</text:span></text:p>
      <text:h text:style-name="Heading_20_4" text:outline-level="4"><text:bookmark-start text:name="origine-e-profilo-culturale-1"/>Origine e profilo culturale<text:bookmark-end text:name="origine-e-profilo-culturale-1"/></text:h>
      <text:p text:style-name="First_20_paragraph">Gli Aureliani affondano le loro radici in un impero centrale che ha dominato Marethar secoli fa. Pur frammentatisi nel tempo, conservano una forte <text:span text:style-name="T1">identità imperiale, celebrativa e razionalista</text:span>. La loro cultura è stratificata e ordinata, con una netta divisione tra classi, ma con margini di mobilità sociale tramite servizio pubblico, carriera militare o accumulo di ricchezza.</text:p>
      <text:p text:style-name="Text_20_body">Sono celebrati per l’arte, l’ingegneria, la codificazione del diritto e l’organizzazione dello spazio urbano. La loro architettura mescola monumentalismo e precisione funzionale.</text:p>
      <text:h text:style-name="Heading_20_4" text:outline-level="4"><text:bookmark-start text:name="tag-identitari-1"/>Tag identitari<text:bookmark-end text:name="tag-identitari-1"/></text:h>
      <text:p text:style-name="First_20_paragraph">“Trasformare con la parola”, “Onorare gli dei e la gloria passata”, “Dare forma al caos”</text:p>
      <text:h text:style-name="Heading_20_4" text:outline-level="4"><text:bookmark-start text:name="archetipi-giocabili-1"/>Archetipi giocabili<text:bookmark-end text:name="archetipi-giocabili-1"/></text:h>
      <text:list text:style-name="L41">
        <text:list-item>
          <text:p text:style-name="P62">Architetta dell’Ordine, incaricata di costruire un ponte dove nessuno osa</text:p>
        </text:list-item>
        <text:list-item>
          <text:p text:style-name="P62">Oratrice del foro, la cui retorica minaccia un’intera fazione nobiliare</text:p>
        </text:list-item>
        <text:list-item>
          <text:p text:style-name="P62">Ex-gladiatore, divenuto custode delle tombe imperiali</text:p>
        </text:list-item>
        <text:list-item>
          <text:p text:style-name="P62">Filosofo errante, in cerca dei resti della vera legge</text:p>
        </text:list-item>
      </text:list>
      <text:h text:style-name="Heading_20_4" text:outline-level="4"><text:bookmark-start text:name="dialettiche-interne-e-fratture-1"/>Dialettiche interne e fratture<text:bookmark-end text:name="dialettiche-interne-e-fratture-1"/></text:h>
      <text:list text:style-name="L42">
        <text:list-item>
          <text:p text:style-name="P63"><text:span text:style-name="T1">Nobiltà vs nuova ricchezza</text:span>: i vecchi lignaggi aristocratici contro i cittadini arricchiti tramite commercio o tecnica</text:p>
        </text:list-item>
        <text:list-item>
          <text:p text:style-name="P63"><text:span text:style-name="T1">Fede di Pulbium vs Druidismo stagionale</text:span>: la religione imperiale è ufficiale, ma nei quartieri popolari si pratica il culto della natura</text:p>
        </text:list-item>
        <text:list-item>
          <text:p text:style-name="P63"><text:span text:style-name="T1">Repubblica o nostalgia imperiale</text:span>: alcuni vogliono restaurare la monarchia, altri difendono le istituzioni senatoriali</text:p>
        </text:list-item>
        <text:list-item>
          <text:p text:style-name="P63"><text:span text:style-name="T1">Arte come potere vs arte come diserzione</text:span>: artisti e filosofi sono al centro, ma anche spesso in esilio</text:p>
        </text:list-item>
      </text:list>
      <text:h text:style-name="Heading_20_4" text:outline-level="4"><text:bookmark-start text:name="simboli-proverbi-oggetti-1"/>Simboli, proverbi, oggetti<text:bookmark-end text:name="simboli-proverbi-oggetti-1"/></text:h>
      <text:list text:style-name="L43">
        <text:list-item>
          <text:p text:style-name="P64"><text:span text:style-name="T1">Simbolo</text:span>: il Sole Inciso, immagine di eternità e illuminazione</text:p>
        </text:list-item>
        <text:list-item>
          <text:p text:style-name="P64"><text:span text:style-name="T1">Proverbio</text:span>: “Solo l’imperfezione merita l’attenzione degli dèi”</text:p>
        </text:list-item>
        <text:list-item>
          <text:p text:style-name="P64"><text:span text:style-name="T1">Oggetto sacro</text:span>: il Bastone del Lupercale, portato durante i riti di purificazione e fertilità</text:p>
        </text:list-item>
      </text:list>
      <text:h text:style-name="Heading_20_3" text:outline-level="3"><text:bookmark-start text:name="lysandriani"/>Lysandriani<text:bookmark-end text:name="lysandriani"/></text:h>
      <text:p text:style-name="First_20_paragraph"><text:span text:style-name="T2">Figli del mare, maestri dell’inganno gentile</text:span></text:p>
      <text:h text:style-name="Heading_20_4" text:outline-level="4"><text:bookmark-start text:name="origine-e-profilo-culturale-2"/>Origine e profilo culturale<text:bookmark-end text:name="origine-e-profilo-culturale-2"/></text:h>
      <text:p text:style-name="First_20_paragraph">Discendenti da una confederazione di città-stato marittime, i Lysandriani hanno costruito il loro potere sulla navigazione, sul commercio e sull’arte della persuasione. La loro cultura <text:span text:style-name="T1">valorizza la mobilità, la diplomazia e la supremazia nautica</text:span>, ed è fortemente urbanizzata. Le rotte commerciali lysandriane toccano quasi ogni porto del Marethar, e i loro mercanti sono noti per sapere ciò che vogliono ancora prima di chiederlo.</text:p>
      <text:h text:style-name="Heading_20_4" text:outline-level="4"><text:bookmark-start text:name="tag-identitari-2"/>Tag identitari<text:bookmark-end text:name="tag-identitari-2"/></text:h>
      <text:p text:style-name="First_20_paragraph">“Navigare è decidere”, “Tutto ha un prezzo”, “Chi ascolta comanda”</text:p>
      <text:h text:style-name="Heading_20_4" text:outline-level="4"><text:bookmark-start text:name="archetipi-giocabili-2"/>Archetipi giocabili<text:bookmark-end text:name="archetipi-giocabili-2"/></text:h>
      <text:list text:style-name="L44">
        <text:list-item>
          <text:p text:style-name="P65">Cartografo della Gilda dei Porti, in possesso di una mappa perduta</text:p>
        </text:list-item>
        <text:list-item>
          <text:p text:style-name="P65">Contrattista navale, accusata di doppio gioco con nemici della città</text:p>
        </text:list-item>
        <text:list-item>
          <text:p text:style-name="P65">Orfana cresciuta tra i moli, divenuta ambasciatrice</text:p>
        </text:list-item>
        <text:list-item>
          <text:p text:style-name="P65">Mistico del culto di Thalassos, condannato per aver tradito la rotta sacra</text:p>
        </text:list-item>
      </text:list>
      <text:h text:style-name="Heading_20_4" text:outline-level="4"><text:bookmark-start text:name="dialettiche-interne-e-fratture-2"/>Dialettiche interne e fratture<text:bookmark-end text:name="dialettiche-interne-e-fratture-2"/></text:h>
      <text:list text:style-name="L45">
        <text:list-item>
          <text:p text:style-name="P66"><text:span text:style-name="T1">Oligarchia mercantile vs democrazia assembleare</text:span>: alcuni porti vogliono più rappresentanza politica</text:p>
        </text:list-item>
        <text:list-item>
          <text:p text:style-name="P66"><text:span text:style-name="T1">Fede di Thalassos vs Culto di Nautilos</text:span>: lo stesso mare ha due divinità, e due modi di affrontarlo</text:p>
        </text:list-item>
        <text:list-item>
          <text:p text:style-name="P66"><text:span text:style-name="T1">Città sorelle in guerra commerciale</text:span>: i conflitti più feroci sono interni</text:p>
        </text:list-item>
        <text:list-item>
          <text:p text:style-name="P66"><text:span text:style-name="T1">Commercio aperto vs segretezza strategica</text:span>: condividere rotte significa esporsi</text:p>
        </text:list-item>
      </text:list>
      <text:h text:style-name="Heading_20_4" text:outline-level="4"><text:bookmark-start text:name="simboli-proverbi-oggetti-2"/>Simboli, proverbi, oggetti<text:bookmark-end text:name="simboli-proverbi-oggetti-2"/></text:h>
      <text:list text:style-name="L46">
        <text:list-item>
          <text:p text:style-name="P67"><text:span text:style-name="T1">Simbolo</text:span>: la Spirale delle Correnti, emblema di mutamento e adattamento</text:p>
        </text:list-item>
        <text:list-item>
          <text:p text:style-name="P67"><text:span text:style-name="T1">Proverbio</text:span>: “Chi non sa mentire, non sa navigare”</text:p>
        </text:list-item>
        <text:list-item>
          <text:p text:style-name="P67"><text:span text:style-name="T1">Oggetto sacro</text:span>: l’Astrolabio Invertito, utilizzato nei riti per deviare le tempeste</text:p>
        </text:list-item>
      </text:list>
      <text:h text:style-name="Heading_20_3" text:outline-level="3"><text:bookmark-start text:name="orethiani"/>Orethiani<text:bookmark-end text:name="orethiani"/></text:h>
      <text:p text:style-name="First_20_paragraph"><text:span text:style-name="T2">Dove la pietra canta guerra e giustizia</text:span></text:p>
      <text:h text:style-name="Heading_20_4" text:outline-level="4"><text:bookmark-start text:name="origine-e-profilo-culturale-3"/>Origine e profilo culturale<text:bookmark-end text:name="origine-e-profilo-culturale-3"/></text:h>
      <text:p text:style-name="First_20_paragraph">Gli Orethiani sono una civiltà montana, nata attorno all’estrazione mineraria, alla metallurgia e alla strategia militare. <text:span text:style-name="T1">Valorizzano la disciplina, l’onore marziale e la continuità del sangue e della parola</text:span>. Le città sono scolpite nella roccia e difese da fortezze stratificate. Le famiglie di guerrieri convivono con caste di artigiani e minatori, in un equilibrio rigoroso.</text:p>
      <text:h text:style-name="Heading_20_4" text:outline-level="4"><text:bookmark-start text:name="tag-identitari-3"/>Tag identitari<text:bookmark-end text:name="tag-identitari-3"/></text:h>
      <text:p text:style-name="First_20_paragraph">“Custodire con forza”, “Giurare con il ferro”, “Farsi pietra”</text:p>
      <text:h text:style-name="Heading_20_4" text:outline-level="4"><text:bookmark-start text:name="archetipi-giocabili-3"/>Archetipi giocabili<text:bookmark-end text:name="archetipi-giocabili-3"/></text:h>
      <text:list text:style-name="L47">
        <text:list-item>
          <text:p text:style-name="P68">Capitano dell’Acciaio Nero, pronto a tradire per un’eredità</text:p>
        </text:list-item>
        <text:list-item>
          <text:p text:style-name="P68">Artigiana della Forgiatura Sacra, alla ricerca di metallo perduto</text:p>
        </text:list-item>
        <text:list-item>
          <text:p text:style-name="P68">Oratore militante della Fede di Tudeshkhast</text:p>
        </text:list-item>
        <text:list-item>
          <text:p text:style-name="P68">Stratega cieco, che vede oltre la montagna</text:p>
        </text:list-item>
      </text:list>
      <text:h text:style-name="Heading_20_4" text:outline-level="4"><text:bookmark-start text:name="dialettiche-interne-e-fratture-3"/>Dialettiche interne e fratture<text:bookmark-end text:name="dialettiche-interne-e-fratture-3"/></text:h>
      <text:list text:style-name="L48">
        <text:list-item>
          <text:p text:style-name="P69"><text:span text:style-name="T1">Guerra rituale vs guerra totale</text:span>: divergenze su come e quando combattere</text:p>
        </text:list-item>
        <text:list-item>
          <text:p text:style-name="P69"><text:span text:style-name="T1">Culto della guerra vs culto della memoria</text:span>: Tudeshkhast e Shemshahva offrono visioni opposte</text:p>
        </text:list-item>
        <text:list-item>
          <text:p text:style-name="P69"><text:span text:style-name="T1">Gerarchia rigida vs meritocrazia militare</text:span>: i clan tradizionalisti si scontrano con giovani generali</text:p>
        </text:list-item>
        <text:list-item>
          <text:p text:style-name="P69"><text:span text:style-name="T1">Risorse in esaurimento</text:span>: la ricchezza delle miniere è sempre meno sicura</text:p>
        </text:list-item>
      </text:list>
      <text:h text:style-name="Heading_20_4" text:outline-level="4"><text:bookmark-start text:name="simboli-proverbi-oggetti-3"/>Simboli, proverbi, oggetti<text:bookmark-end text:name="simboli-proverbi-oggetti-3"/></text:h>
      <text:list text:style-name="L49">
        <text:list-item>
          <text:p text:style-name="P70"><text:span text:style-name="T1">Simbolo</text:span>: il Martello Spezzato, icona della giustizia implacabile</text:p>
        </text:list-item>
        <text:list-item>
          <text:p text:style-name="P70"><text:span text:style-name="T1">Proverbio</text:span>: “Chi esce dalla roccia non ha più nome”</text:p>
        </text:list-item>
        <text:list-item>
          <text:p text:style-name="P70"><text:span text:style-name="T1">Oggetto sacro</text:span>: la Maschera del Giuramento, indossata solo per i voti vincolanti</text:p>
        </text:list-item>
      </text:list>
      <text:h text:style-name="Heading_20_3" text:outline-level="3"><text:bookmark-start text:name="thalassiani"/>Thalassiani<text:bookmark-end text:name="thalassiani"/></text:h>
      <text:p text:style-name="First_20_paragraph"><text:span text:style-name="T2">Tra le onde, il patto è legge</text:span></text:p>
      <text:h text:style-name="Heading_20_4" text:outline-level="4"><text:bookmark-start text:name="origine-e-profilo-culturale-4"/>Origine e profilo culturale<text:bookmark-end text:name="origine-e-profilo-culturale-4"/></text:h>
      <text:p text:style-name="First_20_paragraph">Discendenti delle genti costiere e insulari, i Thalassiani vivono nel cuore delle correnti e dei traffici marittimi. La loro cultura è fondata sulla <text:span text:style-name="T1">collaborazione pratica, l’efficienza portuale e la protezione del collettivo</text:span>, con una forte devozione per Thalaran, lo Spirito del Mare. I porti thalassiani sono aperti ma attentamente sorvegliati, e le città organizzate come reti più che come centri.</text:p>
      <text:h text:style-name="Heading_20_4" text:outline-level="4"><text:bookmark-start text:name="tag-identitari-4"/>Tag identitari<text:bookmark-end text:name="tag-identitari-4"/></text:h>
      <text:p text:style-name="First_20_paragraph">“Agire insieme, nuotare insieme”, “Il mare non perdona l’ego”, “Ogni vela ha un dovere”</text:p>
      <text:h text:style-name="Heading_20_4" text:outline-level="4"><text:bookmark-start text:name="archetipi-giocabili-4"/>Archetipi giocabili<text:bookmark-end text:name="archetipi-giocabili-4"/></text:h>
      <text:list text:style-name="L50">
        <text:list-item>
          <text:p text:style-name="P71">Maestra del Porto, accusata di corruzione rituale</text:p>
        </text:list-item>
        <text:list-item>
          <text:p text:style-name="P71">Navigatore d’altura che rifiuta ogni rotta scritta</text:p>
        </text:list-item>
        <text:list-item>
          <text:p text:style-name="P71">Capobarca devoto a Carthara, pronto a tutto per il carico</text:p>
        </text:list-item>
        <text:list-item>
          <text:p text:style-name="P71">Protettrice di una comunità costiera minacciata da un’alleanza commerciale</text:p>
        </text:list-item>
      </text:list>
      <text:h text:style-name="Heading_20_4" text:outline-level="4"><text:bookmark-start text:name="dialettiche-interne-e-fratture-4"/>Dialettiche interne e fratture<text:bookmark-end text:name="dialettiche-interne-e-fratture-4"/></text:h>
      <text:list text:style-name="L51">
        <text:list-item>
          <text:p text:style-name="P72"><text:span text:style-name="T1">Libero scambio vs protezione delle rotte</text:span>: cosa condividere, e con chi?</text:p>
        </text:list-item>
        <text:list-item>
          <text:p text:style-name="P72"><text:span text:style-name="T1">Fede di Thalaran vs culto di Carthara</text:span>: protezione spirituale o prosperità materiale?</text:p>
        </text:list-item>
        <text:list-item>
          <text:p text:style-name="P72"><text:span text:style-name="T1">Isolani vs portuali</text:span>: divergenze tra chi vive sul mare e chi ne gestisce l’economia</text:p>
        </text:list-item>
        <text:list-item>
          <text:p text:style-name="P72"><text:span text:style-name="T1">Fragilità ecologica</text:span>: le risorse ittiche e le maree cambiano, e il mare non dimentica</text:p>
        </text:list-item>
      </text:list>
      <text:h text:style-name="Heading_20_4" text:outline-level="4"><text:bookmark-start text:name="simboli-proverbi-oggetti-4"/>Simboli, proverbi, oggetti<text:bookmark-end text:name="simboli-proverbi-oggetti-4"/></text:h>
      <text:list text:style-name="L52">
        <text:list-item>
          <text:p text:style-name="P73"><text:span text:style-name="T1">Simbolo</text:span>: la Rete di Maree, rappresentazione delle relazioni tra clan navali</text:p>
        </text:list-item>
        <text:list-item>
          <text:p text:style-name="P73"><text:span text:style-name="T1">Proverbio</text:span>: “Chi non chiude il carico, chiude la bara”</text:p>
        </text:list-item>
        <text:list-item>
          <text:p text:style-name="P73"><text:span text:style-name="T1">Oggetto sacro</text:span>: la Lamina di Sale Benedetta, portata nelle stive come talismano</text:p>
        </text:list-item>
      </text:list>
      <text:h text:style-name="Heading_20_3" text:outline-level="3"><text:bookmark-start text:name="naharim"/>Naharim<text:bookmark-end text:name="naharim"/></text:h>
      <text:p text:style-name="First_20_paragraph"><text:span text:style-name="T2">Il fiume è il tempo che parla</text:span></text:p>
      <text:h text:style-name="Heading_20_4" text:outline-level="4"><text:bookmark-start text:name="origine-e-profilo-culturale-5"/>Origine e profilo culturale<text:bookmark-end text:name="origine-e-profilo-culturale-5"/></text:h>
      <text:p text:style-name="First_20_paragraph">Cultura fluviale per eccellenza, i Naharim si sono sviluppati lungo i grandi corsi d’acqua, costruendo una civiltà agricola avanzata e profondamente spirituale. <text:span text:style-name="T1">Il loro rapporto con la natura è simbiotico</text:span>, basato sulla celebrazione ciclica delle piene, dei raccolti, delle purificazioni. La loro vita sociale è comunitaria, egalitaria, e guidata da sacerdoti e anziane.</text:p>
      <text:h text:style-name="Heading_20_4" text:outline-level="4"><text:bookmark-start text:name="tag-identitari-5"/>Tag identitari<text:bookmark-end text:name="tag-identitari-5"/></text:h>
      <text:p text:style-name="First_20_paragraph">“Seguire il ritmo dell’acqua”, “Coltivare insieme”, “Offrire senza attendere”</text:p>
      <text:h text:style-name="Heading_20_4" text:outline-level="4"><text:bookmark-start text:name="archetipi-giocabili-5"/>Archetipi giocabili<text:bookmark-end text:name="archetipi-giocabili-5"/></text:h>
      <text:list text:style-name="L53">
        <text:list-item>
          <text:p text:style-name="P74">Custode delle Inondazioni, che non ha mai visto il fiume fermarsi</text:p>
        </text:list-item>
        <text:list-item>
          <text:p text:style-name="P74">Ceramista visionario, le cui opere influenzano i sogni del villaggio</text:p>
        </text:list-item>
        <text:list-item>
          <text:p text:style-name="P74">Matriarca rurale in lotta contro un canale deviato</text:p>
        </text:list-item>
        <text:list-item>
          <text:p text:style-name="P74">Sacerdote del Dio Dor, messo sotto accusa per eresia pacifica</text:p>
        </text:list-item>
      </text:list>
      <text:h text:style-name="Heading_20_4" text:outline-level="4"><text:bookmark-start text:name="dialettiche-interne-e-fratture-5"/>Dialettiche interne e fratture<text:bookmark-end text:name="dialettiche-interne-e-fratture-5"/></text:h>
      <text:list text:style-name="L54">
        <text:list-item>
          <text:p text:style-name="P75"><text:span text:style-name="T1">Dor vs Naiad</text:span>: il Dio del Fiume contro la Regina delle Sorgenti</text:p>
        </text:list-item>
        <text:list-item>
          <text:p text:style-name="P75"><text:span text:style-name="T1">Tradizione orale vs codificazione religiosa</text:span>: alcune preghiere non devono essere scritte</text:p>
        </text:list-item>
        <text:list-item>
          <text:p text:style-name="P75"><text:span text:style-name="T1">Fede e idraulica</text:span>: chi decide dove deve scorrere l’acqua?</text:p>
        </text:list-item>
        <text:list-item>
          <text:p text:style-name="P75"><text:span text:style-name="T1">Comunità vs individualismo urbano</text:span>: tensione tra villaggi e città-stato in crescita</text:p>
        </text:list-item>
      </text:list>
      <text:h text:style-name="Heading_20_4" text:outline-level="4"><text:bookmark-start text:name="simboli-proverbi-oggetti-5"/>Simboli, proverbi, oggetti<text:bookmark-end text:name="simboli-proverbi-oggetti-5"/></text:h>
      <text:list text:style-name="L55">
        <text:list-item>
          <text:p text:style-name="P76"><text:span text:style-name="T1">Simbolo</text:span>: la Spirale del Delta, forma sacra della distribuzione fertile</text:p>
        </text:list-item>
        <text:list-item>
          <text:p text:style-name="P76"><text:span text:style-name="T1">Proverbio</text:span>: “Il primo sorso spetta al fiume”</text:p>
        </text:list-item>
        <text:list-item>
          <text:p text:style-name="P76"><text:span text:style-name="T1">Oggetto sacro</text:span>: la Coppa delle Maree Interne, usata nei riti di iniziazione spirituale</text:p>
        </text:list-item>
      </text:list>
      <text:h text:style-name="Heading_20_2" text:outline-level="2"><text:bookmark-start text:name="religioni-e-credenze"/>🜨 Religioni e credenze<text:bookmark-end text:name="religioni-e-credenze"/></text:h>
      <text:p text:style-name="First_20_paragraph"><text:span text:style-name="T2">Nel Marethar, la fede è ciò che resta quando il mondo si spezza</text:span></text:p>
      <text:p text:style-name="P77">“<text:span text:style-name="T2">Si prega perché le ossa ricordino ciò che la bocca ha dimenticato.</text:span>” — Proverbio naharim</text:p>
      <text:h text:style-name="Heading_20_3" text:outline-level="3"><text:bookmark-start text:name="la-setta-di-shahin"/>La Setta di Shahin<text:bookmark-end text:name="la-setta-di-shahin"/></text:h>
      <text:p text:style-name="First_20_paragraph"><text:span text:style-name="T2">L’Albero che cammina nelle ossa</text:span></text:p>
      <text:p text:style-name="Text_20_body">Nessuno sa dove sia nato Shahin. Non è il nome di un uomo, né di un dio nel senso delle grandi teologie imperiali. Per gli Aridoniani, Shahin è <text:span text:style-name="T1">ciò che cresce quando la memoria mette radici</text:span>, un albero che si pianta nei luoghi del sangue versato e fiorisce nei cuori che non dimenticano.</text:p>
      <text:p text:style-name="Text_20_body">La Setta di Shahin non ha templi nel senso comune, ma <text:span text:style-name="T1">boschi sacri</text:span> che si estendono attorno a pozzi, altari di pietra grezza, o semplici fuochi perpetui. Le sue sacerdotesse non scrivono: <text:span text:style-name="T1">cantano genealogie, piantano alberi, versano acqua</text:span>, e parlano con le madri prima che con gli dèi.</text:p>
      <text:p text:style-name="Text_20_body">I suoi riti sono agricoli, ma anche funerari. Curano, ma sanno anche marchiare. Alcune delle più terribili maledizioni conosciute nell’estremo sud vengono da un sussurro intonato sotto un certo albero, in una certa ora.</text:p>
      <text:p text:style-name="Text_20_body">Shahin protegge, ma è lento. Non interviene per salvare i singoli, ma <text:span text:style-name="T1">affonda chi spezza i legami di sangue</text:span>.</text:p>
      <text:p text:style-name="P78">“Chi taglia l’albero della madre, cade sotto l’ombra del figlio.” — detto rituale inciso su foglia secca, bruciata durante il passaggio all’età adulta</text:p>
      <text:p text:style-name="First_20_paragraph">Eresie interne dividono il culto tra chi considera Shahin un’entità “materna” e chi lo interpreta come <text:span text:style-name="T1">processo spirituale impersonale</text:span>. Ciò ha causato fratture non solo dottrinali, ma militari. Alcune tribù intere hanno cambiato nome e lignaggio per non essere associate a versioni del culto considerate “sacrileghe”.</text:p>
      <text:h text:style-name="Heading_20_3" text:outline-level="3"><text:bookmark-start text:name="la-fede-di-shemshahva"/>La Fede di Shemshahva<text:bookmark-end text:name="la-fede-di-shemshahva"/></text:h>
      <text:p text:style-name="First_20_paragraph"><text:span text:style-name="T2">Il serpente ricorda più a lungo del tempo</text:span></text:p>
      <text:p text:style-name="Text_20_body">In alto tra le montagne orethiane, dove il freddo conserva i morti e le grotte portano echi di nomi antichi, vive la Fede di Shemshahva. Essa non venera un dio nel senso verticale del termine, ma <text:span text:style-name="T1">onora una linea ininterrotta di antenati</text:span> i cui spiriti sono tuttora attivi, giudicanti, affamati di verità.</text:p>
      <text:p text:style-name="Text_20_body">Shemshahva è rappresentata come <text:span text:style-name="T1">un cobra marrone che cambia pelle una volta ogni generazione</text:span>. La sua immagine si incide sul metallo, ma non si prega mai direttamente. Gli spiriti parlano solo quando sono ascoltati, e solo chi sa ascoltare può rimanere sano dopo.</text:p>
      <text:p text:style-name="Text_20_body">I riti si svolgono nelle cavità scavate dai morti stessi. Gli sciamani sono <text:span text:style-name="T1">archivisti del sangue</text:span>, cantastorie, giudici e, talvolta, carnefici rituali.</text:p>
      <text:p text:style-name="Text_20_body">Ma il culto non è solo montano: si è diffuso nei sobborghi delle città minerarie, tra i clan dispersi e nei campi di battaglia. <text:span text:style-name="T1">Portare il simbolo di Shemshahva al collo significa che qualcuno, da qualche parte, ti osserva ancora</text:span>.</text:p>
      <text:p text:style-name="P79">“Non cercare vendetta. Parla con il sangue: lui la sta già cercando per te.” — iscrizione su pugnale cerimoniale, trovato a Kal-Naruth</text:p>
      <text:p text:style-name="First_20_paragraph">Alcuni sostengono che Shemshahva e Tudeshkhast siano <text:span text:style-name="T1">lo stesso spirito, visto con occhi diversi</text:span>: uno come memoria, l’altro come destino. Nessuno ha ancora trovato il coraggio di scriverlo in un trattato ufficiale.</text:p>
      <text:h text:style-name="Heading_20_3" text:outline-level="3"><text:bookmark-start text:name="il-culto-di-carthara"/>Il Culto di Carthara<text:bookmark-end text:name="il-culto-di-carthara"/></text:h>
      <text:p text:style-name="First_20_paragraph"><text:span text:style-name="T2">Chi protegge le rotte, protegge i nomi</text:span></text:p>
      <text:p text:style-name="Text_20_body">Carthara non ha volto. O ne ha molti. È il nome che compare inciso sul legno delle stive, sulle vele cucite a mano, nei sogni dei naviganti. I Thalassiani dicono che Carthara <text:span text:style-name="T1">non è una divinità, ma un patto</text:span>. Un patto tra il mare e chi non lo tradisce.</text:p>
      <text:p text:style-name="Text_20_body">Ogni viaggio inizia con un’offerta a Carthara: una moneta, un frammento di corda, un piatto vuoto lasciato sull’acqua. Non esiste un clero formale. <text:span text:style-name="T1">Ogni capitano è sacerdote. Ogni marinaio può chiamare Carthara, ma solo una volta nella vita.</text:span></text:p>
      <text:p text:style-name="Text_20_body">Il suo culto si fonde spesso con quello di Thalaran, ma <text:span text:style-name="T1">ha un tono più pratico, più severo</text:span>. Mentre Thalaran parla di cicli e armonia, Carthara parla di sopravvivenza e fedeltà. Le sue preghiere sono contratti orali. I suoi miracoli, navi che non affondano quando dovrebbero.</text:p>
      <text:p text:style-name="P80">“Chi pronuncia il nome di Carthara due volte di seguito si dichiara pronto a morire per qualcun altro.” — regola non scritta tra i pescatori di Caladir</text:p>
      <text:p text:style-name="First_20_paragraph">Il culto si è diffuso oltre i Thalassiani: mercanti, contrabbandieri, contrattisti e perfino esploratori lo praticano in forma privata. Alcuni portano con sé <text:span text:style-name="T1">astrolabi rovesciati</text:span>, talismani d’acqua secca o corde spezzate in tre: segni che, secondo la leggenda, <text:span text:style-name="T1">Carthara riconosce al primo sguardo</text:span>.</text:p>
      <text:h text:style-name="Heading_20_3" text:outline-level="3"><text:bookmark-start text:name="le-credenze-di-golat"/>Le Credenze di Golat<text:bookmark-end text:name="le-credenze-di-golat"/></text:h>
      <text:p text:style-name="First_20_paragraph"><text:span text:style-name="T2">La Pantera non ha bisogno di templi</text:span></text:p>
      <text:p text:style-name="Text_20_body">Golat è presenza, non parola. È vista nelle sabbie che si muovono da sole, nelle notti senza vento, negli occhi gialli che appaiono e scompaiono ai margini del fuoco. Il culto di Golat <text:span text:style-name="T1">non possiede dogmi</text:span>, né testi, né gerarchie. È <text:span text:style-name="T1">trasmesso tramite segni, sogni, storie canticchiate e gesti tra iniziati</text:span>.</text:p>
      <text:p text:style-name="Text_20_body">Secondo i fedeli, Golat è una Pantera Gialla — spirito guardiano, antenata guerriera, forza liminale che osserva e protegge. Non giudica. Ma chi tradisce la sua fiducia, spesso muore <text:span text:style-name="T1">senza testimoni, senza ferite visibili, e con la bocca piena di sabbia</text:span>.</text:p>
      <text:p text:style-name="Text_20_body">I rituali si svolgono all’aperto, mai nello stesso luogo. Sciamani itineranti, spesso marginalizzati dagli stessi Aridoniani che venerano Shahin, <text:span text:style-name="T1">mantengono viva la pantera nei canti e nelle danze notturne</text:span>. Alcuni affermano che i sogni in cui appare Golat segnano un passaggio irreversibile: si diventa parte della sua ombra.</text:p>
      <text:p text:style-name="P81">“Golat non parla. Ma ascolta sempre.” — inciso su tamburo rituale di pelle umana, conservato a Falah-Sen</text:p>
      <text:p text:style-name="First_20_paragraph">Culti rivali la accusano di stregoneria, ma chi la invoca <text:span text:style-name="T1">lo fa per protezione, per guida, o per spegnere l’ira di uno spirito offeso</text:span>. Nessuna autorità è riuscita a eliminarla, né a controllarla.</text:p>
      <text:h text:style-name="Heading_20_3" text:outline-level="3"><text:bookmark-start text:name="gli-dei-di-ralertis"/>Gli Dei di Ralertis<text:bookmark-end text:name="gli-dei-di-ralertis"/></text:h>
      <text:p text:style-name="First_20_paragraph"><text:span text:style-name="T2">Il Mietitore di Zaffiro e la disciplina dell’immortalità</text:span></text:p>
      <text:p text:style-name="Text_20_body">Ralertis è potere ordinato. È il nome più pronunciato nelle corti imperiali, nei templi aureliani e nei tribunali laici. Non è un dio di grazia o clemenza, ma di <text:span text:style-name="T1">forma, misura e perfezione finale</text:span>.</text:p>
      <text:p text:style-name="Text_20_body">Si dice che chi muore nel nome di Ralertis non rinasca, ma <text:span text:style-name="T1">diventi principio eterno</text:span>, una nota incisa nel Cosmo. Per gli Aureliani, questo è desiderabile.</text:p>
      <text:p text:style-name="Text_20_body">Il suo culto è gerarchico, con riti scanditi da orologi cerimoniali, danze geometriche e letture sacre in lingue morte. I fedeli portano <text:span text:style-name="T1">simboli cuciti dentro gli abiti, mai visibili</text:span>, come segno di ordine interiore.</text:p>
      <text:p text:style-name="Text_20_body">Ralertis guida giudici, architetti, filosofi, ma anche assassini rituali e purificatori. I suoi templi sono <text:span text:style-name="T1">torri vuote al centro</text:span>, per ricordare che solo il vuoto ha forma perfetta.</text:p>
      <text:p text:style-name="P82">“Chi lascia ombre nel proprio angolo, non merita il tempio.” — codice morale della Confraternita di Ralertis (sezione orientale)</text:p>
      <text:p text:style-name="First_20_paragraph">Eresie cicliche sostengono che Ralertis sia <text:span text:style-name="T1">un demone dell’inerzia, non un dio</text:span>, e che la perfezione uccida. Questi movimenti sono sedati con rapidità e discrezione.</text:p>
      <text:h text:style-name="Heading_20_3" text:outline-level="3"><text:bookmark-start text:name="gli-spiriti-di-thalaran"/>Gli Spiriti di Thalaran<text:bookmark-end text:name="gli-spiriti-di-thalaran"/></text:h>
      <text:p text:style-name="First_20_paragraph"><text:span text:style-name="T2">Ogni onda ha una voce. Ogni morte un nome</text:span></text:p>
      <text:p text:style-name="Text_20_body">Thalaran è <text:span text:style-name="T1">il mare stesso, cosciente e frammentato</text:span>. I Thalassiani non lo adorano come un dio, ma <text:span text:style-name="T1">dialogano con le sue parti</text:span>: le correnti, i venti, le profondità, le creature che nessuno vede più.</text:p>
      <text:p text:style-name="Text_20_body">I riti di Thalaran sono collettivi, cantati, navigati. I villaggi costieri seguono il ritmo delle maree, e ogni generazione ha un “ascoltatore”, una figura scelta dal mare, che entra in trance durante le tempeste. Molti di questi non tornano mai lucidi, ma parlano con voce salata fino alla morte.</text:p>
      <text:p text:style-name="Text_20_body">Gli spiriti di Thalaran <text:span text:style-name="T1">non fanno promesse</text:span>. Proteggono chi li onora, ma possono capovolgere una nave solo per essere stati dimenticati per tre giorni. Alcuni li descrivono come <text:span text:style-name="T1">memorie fuse con l’acqua</text:span>, coscienze ancestrali che si riattivano.</text:p>
      <text:p text:style-name="P83">“Quando affondi, non sei solo. Sei con chi ti ricorda.” — iscrizione rituale su remi funebri</text:p>
      <text:p text:style-name="First_20_paragraph">Thalaran si confonde spesso con Carthara, ma mentre quest’ultimo è patto, Thalaran è <text:span text:style-name="T1">reazione e eco</text:span>. Più antico. Più imprevedibile. E più difficile da ingannare.</text:p>
      <text:h text:style-name="Heading_20_3" text:outline-level="3"><text:bookmark-start text:name="i-druidismi-di-dimilalica"/>I Druidismi di Dimilalica<text:bookmark-end text:name="i-druidismi-di-dimilalica"/></text:h>
      <text:p text:style-name="First_20_paragraph"><text:span text:style-name="T2">Il ciclo che respira sotto la pietra</text:span></text:p>
      <text:p text:style-name="Text_20_body">Dimilalica non è una divinità. È un concetto, un sistema, un modo di percepire <text:span text:style-name="T1">la simmetria nascosta nelle stagioni, negli animali, nei minerali</text:span>. I suoi druidi non cercano potere: cercano equilibrio. Ma nel Marethar, ogni equilibrio è anche tensione politica.</text:p>
      <text:p text:style-name="Text_20_body">La dottrina ufficiale è diffusa tra le culture rurali e alcune comunità autonome dell’interno. I druidi vivono in gruppi mobili, interpretano i segni del vento, leggono le crepe nella terra, e <text:span text:style-name="T1">conservano rituali in forma orale, spesso in versi cifrati</text:span>.</text:p>
      <text:p text:style-name="Text_20_body">Molti di loro rifiutano la scrittura. I cosiddetti <text:span text:style-name="T1">Apocrifi di Dimilalica</text:span> sostengono che ogni sapere trascritto perde forza. Altri tentano una codifica “di emergenza”, temendo che i saperi vadano perduti.</text:p>
      <text:p text:style-name="P84">“Chi scrive una preghiera, la uccide. Ma chi non la tramanda, la seppellisce.” — motto apocrifo tramandato tra i boschi di Velhan</text:p>
      <text:p text:style-name="First_20_paragraph">In tempi recenti, alcuni druidi si sono legati a movimenti radicali, opponendosi alle opere pubbliche, alle dighe, alle accademie magiche. Ma <text:span text:style-name="T1">nessuno può dire dove finisce la fede e comincia la guerriglia</text:span>.</text:p>
      <text:h text:style-name="Heading_20_3" text:outline-level="3"><text:bookmark-start text:name="eresie-sincretismi-correnti-alternative"/>Eresie, sincretismi, correnti alternative<text:bookmark-end text:name="eresie-sincretismi-correnti-alternative"/></text:h>
      <text:p text:style-name="First_20_paragraph">Nel Marethar, <text:span text:style-name="T1">ogni verità religiosa è contestata. Ogni culto, attraversato da divergenze</text:span>.</text:p>
      <text:list text:style-name="L56">
        <text:list-item>
          <text:p text:style-name="P85">Il <text:span text:style-name="T1">Bufalo della Vittoria</text:span>, adorato tra alcuni clan thalassiani, è una forma bellica del Creatore Adrarad. Le sue cerimonie prevedono l’ingestione di sangue e urla rituali.</text:p>
        </text:list-item>
        <text:list-item>
          <text:p text:style-name="P85">I <text:span text:style-name="T1">Circoli della Doppia Luce</text:span>, attivi tra i pellegrini di Shahin, sostengono che la vita e la morte non siano opposte ma identiche. Alcuni praticano la piantumazione su tombe umane.</text:p>
        </text:list-item>
        <text:list-item>
          <text:p text:style-name="P85">I <text:span text:style-name="T1">Frammentisti</text:span>, gruppo mistico nato a Fahya, credono che ogni dio sia parte di una sola entità spezzata. Accusati di sincretismo anarchico, molti sono stati espulsi dalle città-stato.</text:p>
        </text:list-item>
        <text:list-item>
          <text:p text:style-name="P85">Il <text:span text:style-name="T1">Culto dell’Ombra Fissa</text:span>, bandito in tre regioni, sostiene che i miracoli siano eco di un evento primordiale già concluso: tutto ciò che accade è solo ripetizione. I suoi riti si celebrano al buio, in silenzio, davanti a specchi.</text:p>
        </text:list-item>
      </text:list>
      <text:h text:style-name="Heading_20_4" text:outline-level="4"><text:bookmark-start text:name="influenza-e-geografia-della-fede"/>Influenza e geografia della fede<text:bookmark-end text:name="influenza-e-geografia-della-fede"/></text:h>
      <text:p text:style-name="First_20_paragraph"><text:span text:style-name="T2">Il Marethar non ha un solo cielo, ma molti riflessi</text:span></text:p>
      <text:p text:style-name="Text_20_body">Le religioni del Marethar non si distribuiscono come confini politici, ma come <text:span text:style-name="T1">vene culturali</text:span>: attraversano stati, si addensano in città, si prosciugano in certe campagne. Alcune fedi sono dominanti per legge. Altre sopravvivono per consuetudine. Altre ancora si insinuano dove le prime falliscono.</text:p>
      <text:p text:style-name="Text_20_body">Nel sud aridoniano, la Setta di Shahin <text:span text:style-name="T1">organizza la vita rurale e la gestione del territorio</text:span>: ogni villaggio ha un bosco sacro, ogni mercato inizia con una benedizione vegetale. Tuttavia, ai margini desertici e lungo le rotte nomadi, la Pantera Gialla — Golat — <text:span text:style-name="T1">offre una protezione più diretta, meno codificata</text:span>, più adatta ai clan mobili e ai commerci rischiosi.</text:p>
      <text:p text:style-name="Text_20_body">In Rashia, il culto di Shemshahva <text:span text:style-name="T1">fonda l’autorità delle dinastie montane</text:span>: i giuramenti vengono sanciti con offerte agli antenati e interpretati da sciamani ufficiali. Ma nelle corti dell’impero, è Tudeshkhast — dio delle gerarchie e della guerra — a determinare il diritto, spesso ignorando i legami di sangue in favore del potere consolidato.</text:p>
      <text:p text:style-name="Text_20_body">Nel centro imperiale, la religione di Ralertis <text:span text:style-name="T1">è ufficiale, scolpita nei codici e nei riti civili</text:span>. È presente nei tribunali, nei templi del potere, nei trattati. Tuttavia, nei porti di Linia e nei quartieri poveri di Marnorum, il culto è percepito come distante: lì si diffondono pratiche sincretiche, culti semi-clandestini del Vuoto Ordinato o riti devoti al Frammento, forma eversiva della perfezione.</text:p>
      <text:p text:style-name="Text_20_body">Sulle coste thalassiane, <text:span text:style-name="T1">Thalaran non ha templi, ma voce</text:span>: la sua fede si tramanda nei canti, nei turni di pesca, nelle tempeste evitate. Ma è Carthara, spirito del patto navale, ad essere invocato per ogni contratto commerciale — anche in porti non thalassiani, dove il suo nome viene pronunciato come gesto di garanzia tra stranieri.</text:p>
      <text:p text:style-name="Text_20_body">Infine, a Fahya, dove sapere e magia si intrecciano, <text:span text:style-name="T1">le fedi diventano scuola e censura</text:span>. Il culto della Visione Interna, una forma deviante del druidismo di Dimilalica, sopravvive come corrente non registrata, tollerata solo se non parla troppo forte. A Premia, invece, <text:span text:style-name="T1">la laicità è un patto fragile</text:span>: il Senato non riconosce ufficialmente alcuna divinità, ma ogni senatore ha un altare privato. E ogni legge, dicono, è solo una preghiera incisa in pietra anziché su papiro.</text:p>
      <text:h text:style-name="Heading_20_3" text:outline-level="3"><text:bookmark-start text:name="cosa-è-vero-e-per-chi"/>Cosa è vero, e per chi?<text:bookmark-end text:name="cosa-è-vero-e-per-chi"/></text:h>
      <text:p text:style-name="First_20_paragraph">Non esistono risposte condivise nel Marethar. Alcuni affermano che le divinità esistano solo in quanto venerate. Altri dicono che <text:span text:style-name="T1">le divinità esistono, ma mentono</text:span>. I più anziani, semplicemente, <text:span text:style-name="T1">tacciono quando si nomina un dio assente</text:span>.</text:p>
      <text:p text:style-name="P86">“Chi ha bisogno di sapere se esiste, non ha mai invocato per davvero.” — detto naharim, attribuito a nessuno</text:p>
      <text:h text:style-name="Heading_20_2" text:outline-level="2"><text:bookmark-start text:name="geografia-viva"/>🝇 Geografia viva<text:bookmark-end text:name="geografia-viva"/></text:h>
      <text:p text:style-name="First_20_paragraph"><text:span text:style-name="T2">Tutto ciò che non si muove, ma ti costringe a muoverti</text:span></text:p>
      <text:p text:style-name="P87">“<text:span text:style-name="T2">Il Marethar non è fatto solo di acque e terre. È fatto di confini che mentono, e di territori che ricordano.</text:span>” — Tavola d’apertura del Codice Topografico di Fahya</text:p>
      <text:h text:style-name="Heading_20_3" text:outline-level="3"><text:bookmark-start text:name="il-marethar"/>Il Marethar<text:bookmark-end text:name="il-marethar"/></text:h>
      <text:p text:style-name="First_20_paragraph"><text:span text:style-name="T2">Un ventre salato e tranquillo… finché decide di non esserlo</text:span></text:p>
      <text:p text:style-name="P88"><text:span text:style-name="T1">Se chiudi gli occhi al crepuscolo sul Marethar:</text:span><text:line-break/>Il vento porta l’odore salmastro e il canto lontano dei gabbiani.<text:line-break/>Le onde lambiscono le carene con un ritmo antico.<text:line-break/>Il sole morente tinge l’acqua di riflessi dorati e purpurei.<text:line-break/>Senti il sussurro delle profondità che custodiscono segreti dimenticati.</text:p>
      <text:p text:style-name="First_20_paragraph">Il Marethar è un <text:span text:style-name="T1">mare interno</text:span>, vasto e apparentemente placido, ma non fidatevi della superficie. Le sue acque, profonde e ricche di sali minerali, sono punteggiate da <text:span text:style-name="T1">isole fortificate, scogli sommersi e rovine sommerse</text:span>. La navigazione è facile — per chi possiede le mappe giuste. Le tempeste, sebbene rare, <text:span text:style-name="T1">appaiono con presagi e scompaiono senza lasciare prigionieri</text:span>.</text:p>
      <text:p text:style-name="Text_20_body">Le sue acque collegano tutte le sponde del continente, rendendolo <text:span text:style-name="T1">arteria commerciale, spirituale e militare</text:span>. Ma il mare non è neutrale: ogni nazione tenta di controllarne tratti, promontori, strettoie invisibili. Chi controlla un porto, controlla una stagione.</text:p>
      <text:list text:style-name="L57">
        <text:list-item>
          <text:p text:style-name="P89"><text:span text:style-name="T1">Risorse</text:span>: pesce, molluschi, alghe, rotte</text:p>
        </text:list-item>
        <text:list-item>
          <text:p text:style-name="P89"><text:span text:style-name="T1">Tensioni</text:span>: pirateria, diritti di pesca, fortificazioni costiere</text:p>
        </text:list-item>
        <text:list-item>
          <text:p text:style-name="P89"><text:span text:style-name="T1">Gioco</text:span>: blocchi navali, scomparse misteriose, tempeste animate da forze antiche</text:p>
        </text:list-item>
      </text:list>
      <text:p text:style-name="P90">Alcune carte nautiche segnano isole che non esistono più — o che esistono solo in certe maree.</text:p>
      <text:h text:style-name="Heading_20_3" text:outline-level="3"><text:bookmark-start text:name="le-montagne"/>Le Montagne<text:bookmark-end text:name="le-montagne"/></text:h>
      <text:p text:style-name="First_20_paragraph"><text:span text:style-name="T2">I guardiani silenziosi, e spesso affilati</text:span></text:p>
      <text:h text:style-name="Heading_20_4" text:outline-level="4"><text:bookmark-start text:name="le-montagne-occidentali"/>Le Montagne Occidentali<text:bookmark-end text:name="le-montagne-occidentali"/></text:h>
      <text:p text:style-name="P91"><text:span text:style-name="T1">Se chiudi gli occhi tra i picchi delle Montagne Occidentali:</text:span><text:line-break/>L’aria è rarefatta, con un sentore di resina e pietra umida.<text:line-break/>Il silenzio è rotto solo dal fruscio del vento tra le rocce.<text:line-break/>Ogni passo risuona come un’eco di storie antiche.<text:line-break/>Il freddo punge la pelle, ma il cuore si scalda al pensiero delle leggende locali.</text:p>
      <text:p text:style-name="First_20_paragraph">Separano l’Impero Doriano dalla Repubblica di Premia. Viste da lontano, sono un muro. Da vicino, un <text:span text:style-name="T1">labirinto verticale di sentieri dimenticati e miniere abbandonate</text:span>. Ricche di <text:span text:style-name="T1">oro, ferro e altri metalli</text:span>, sono anche il rifugio di banditi, eremiti e popoli che hanno scelto di non obbedire a nessun re.</text:p>
      <text:list text:style-name="L58">
        <text:list-item>
          <text:p text:style-name="P92"><text:span text:style-name="T1">Risorse</text:span>: oro, ferro, carbone</text:p>
        </text:list-item>
        <text:list-item>
          <text:p text:style-name="P92"><text:span text:style-name="T1">Tensioni</text:span>: contese di confine, diritto di scavo, accesso alle sorgenti</text:p>
        </text:list-item>
        <text:list-item>
          <text:p text:style-name="P92"><text:span text:style-name="T1">Gioco</text:span>: esplorazione sotterranea, frontiere mobili, faide minerarie</text:p>
        </text:list-item>
      </text:list>
      <text:h text:style-name="Heading_20_4" text:outline-level="4"><text:bookmark-start text:name="le-montagne-rashiane"/>Le Montagne Rashiane<text:bookmark-end text:name="le-montagne-rashiane"/></text:h>
      <text:p text:style-name="P93"><text:span text:style-name="T1">Se chiudi gli occhi all’alba sulle pendici rashiane:</text:span><text:line-break/>L’aria punge le narici con l’odore acre della pietra viva.<text:line-break/>Il suono del piccone è ritmico, ma non umano.<text:line-break/>Il respiro sa di rame e polvere fredda.<text:line-break/>E quando il vento cambia, porta con sé una preghiera incisa, non detta.</text:p>
      <text:p text:style-name="First_20_paragraph">A nord-ovest, <text:span text:style-name="T1">culla dell’Impero Rashiano</text:span>, sono più fredde e più alte. Le miniere qui <text:span text:style-name="T1">non dormono mai</text:span>: si estraggono gemme, polveri rare e leghe alchemiche. I rituali montani raschiano la roccia, i sacerdoti tatuano il granito. Chi nasce qui, cammina con i piedi duri e la lingua affilata.</text:p>
      <text:list text:style-name="L59">
        <text:list-item>
          <text:p text:style-name="P94"><text:span text:style-name="T1">Risorse</text:span>: pietre preziose, metalli rari</text:p>
        </text:list-item>
        <text:list-item>
          <text:p text:style-name="P94"><text:span text:style-name="T1">Tensioni</text:span>: traffico di minerali proibiti, controllo militare, tensioni ambientali</text:p>
        </text:list-item>
        <text:list-item>
          <text:p text:style-name="P94"><text:span text:style-name="T1">Gioco</text:span>: sabotaggio economico, mappe di gallerie proibite, culti ipogei</text:p>
        </text:list-item>
      </text:list>
      <text:h text:style-name="Heading_20_3" text:outline-level="3"><text:bookmark-start text:name="foreste-sacre-e-viventi"/>Foreste sacre e viventi<text:bookmark-end text:name="foreste-sacre-e-viventi"/></text:h>
      <text:p text:style-name="First_20_paragraph"><text:span text:style-name="T2">Non crescono. Ascoltano.</text:span></text:p>
      <text:p text:style-name="P95"><text:span text:style-name="T1">Se chiudi gli occhi tra i tronchi di Mirath:</text:span><text:line-break/>L’umidità si attacca alla pelle come un rimorso.<text:line-break/>Il muschio odora di fermento dolce e corteccia bagnata.<text:line-break/>Ogni suono è vicino, ma nessuno si lascia vedere.<text:line-break/>Sotto i piedi, la terra non è mai ferma: pulsa, ricorda.</text:p>
      <text:p text:style-name="First_20_paragraph">Le foreste che costeggiano il Marethar — da Ashania fino alle valli interne doriane — non sono mai solo vegetazione. <text:span text:style-name="T1">Ogni bosco ha un nome segreto e una voce</text:span>: gli alberi parlano per accumulo, per inclinazione, per silenzi mantenuti. Alcune fronde rispondono ai rituali. Altre ignorano chi non è nato nei villaggi limitrofi.</text:p>
      <text:p text:style-name="Text_20_body">A Mirath, i tronchi sono marchiati con simboli druidici e genealogie familiari. In Aridonia, ci sono alberi che si piegano solo una volta all’anno, per indicare dove è sepolto l’ultimo dei cantori. In Doria, alcuni sentieri forestali appaiono solo con la nebbia, e portano a templi che nessuno costruì.</text:p>
      <text:list text:style-name="L60">
        <text:list-item>
          <text:p text:style-name="P96"><text:span text:style-name="T1">Risorse</text:span>: legname rituale, erbe rare, funghi psicotropi, segreti non codificati</text:p>
        </text:list-item>
        <text:list-item>
          <text:p text:style-name="P96"><text:span text:style-name="T1">Tensioni</text:span>: diritto di passaggio, conflitti tra druidi e ingegneri, scomparse ricorrenti</text:p>
        </text:list-item>
        <text:list-item>
          <text:p text:style-name="P96"><text:span text:style-name="T1">Gioco</text:span>: mappe viventi, boschi mutevoli, alberi che portano sogni o amnesia</text:p>
        </text:list-item>
      </text:list>
      <text:h text:style-name="Heading_20_3" text:outline-level="3"><text:bookmark-start text:name="le-pianure-e-le-colline"/>Le Pianure e le Colline<text:bookmark-end text:name="le-pianure-e-le-colline"/></text:h>
      <text:p text:style-name="First_20_paragraph"><text:span text:style-name="T2">Dove si semina pace e si raccoglie guerra</text:span></text:p>
      <text:h text:style-name="Heading_20_4" text:outline-level="4"><text:bookmark-start text:name="le-pianure-di-vallan"/>Le Pianure di Vallan<text:bookmark-end text:name="le-pianure-di-vallan"/></text:h>
      <text:p text:style-name="P97"><text:span text:style-name="T1">Se chiudi gli occhi nelle Pianure di Vallan:</text:span><text:line-break/>Il profumo del grano maturo si mescola a quello della terra fertile.<text:line-break/>Il canto degli uccelli accompagna il fruscio delle spighe al vento.<text:line-break/>Il sole accarezza la pelle con calore rassicurante.<text:line-break/>Senti la vita pulsare sotto ogni zolla, promessa di raccolti abbondanti.</text:p>
      <text:p text:style-name="First_20_paragraph">Il granaio del Marethar. Qui la <text:span text:style-name="T1">terra è nera e rotonda</text:span>, spezzata solo da <text:span text:style-name="T1">canali irrigui come vene su una pelle fertile</text:span>. La sicurezza è un’illusione: chi controlla le pianure, controlla il pane. E il pane vale più dell’oro.</text:p>
      <text:list text:style-name="L61">
        <text:list-item>
          <text:p text:style-name="P98"><text:span text:style-name="T1">Risorse</text:span>: cereali, ortaggi, forza lavoro rurale</text:p>
        </text:list-item>
        <text:list-item>
          <text:p text:style-name="P98"><text:span text:style-name="T1">Tensioni</text:span>: tassazione, rivolte agrarie, manipolazioni fluviali</text:p>
        </text:list-item>
        <text:list-item>
          <text:p text:style-name="P98"><text:span text:style-name="T1">Gioco</text:span>: dispute tra signorie, incendi rituali, profezie contadine</text:p>
        </text:list-item>
      </text:list>
      <text:h text:style-name="Heading_20_4" text:outline-level="4"><text:bookmark-start text:name="le-colline-di-ashania"/>Le Colline di Ashania<text:bookmark-end text:name="le-colline-di-ashania"/></text:h>
      <text:p text:style-name="P99"><text:span text:style-name="T1">Se chiudi gli occhi tra le vigne di Ashania:</text:span><text:line-break/>L’aroma del mosto fermentato si diffonde nell’aria.<text:line-break/>Le cicale cantano in coro sotto il sole cocente.<text:line-break/>Il terreno calcareo scricchiola sotto i piedi.<text:line-break/>Ogni sorso di vino racconta storie di famiglie e tradizioni secolari.</text:p>
      <text:p text:style-name="First_20_paragraph">Dolci solo per chi non deve scalarle a piedi. Famosissime per i <text:span text:style-name="T1">vini acidi e gli ulivi lunari</text:span>, ma anche per i <text:span text:style-name="T1">duelli silenziosi tra famiglie nobili rivali</text:span>. Dietro ogni vigna, una vendetta antica.</text:p>
      <text:list text:style-name="L62">
        <text:list-item>
          <text:p text:style-name="P100"><text:span text:style-name="T1">Risorse</text:span>: vino, olio, aromi rari</text:p>
        </text:list-item>
        <text:list-item>
          <text:p text:style-name="P100"><text:span text:style-name="T1">Tensioni</text:span>: confini tra tenute, retorica e diritto consuetudinario</text:p>
        </text:list-item>
        <text:list-item>
          <text:p text:style-name="P100"><text:span text:style-name="T1">Gioco</text:span>: scandali agricoli, sabotaggi di raccolti, alleanze segrete tra vignaioli</text:p>
        </text:list-item>
      </text:list>
      <text:h text:style-name="Heading_20_3" text:outline-level="3"><text:bookmark-start text:name="montagne-giurate"/>Montagne giurate<text:bookmark-end text:name="montagne-giurate"/></text:h>
      <text:p text:style-name="First_20_paragraph"><text:span text:style-name="T2">Ogni vetta ha un nome che non si pronuncia più. Ogni gola, un giuramento mai revocato.</text:span></text:p>
      <text:p text:style-name="P101"><text:span text:style-name="T1">Se chiudi gli occhi nella fucina di Natzrel:</text:span><text:line-break/>Il metallo canta prima di essere battuto.<text:line-break/>L’aria è spessa, odorosa di carbone, promessa e orgoglio.<text:line-break/>Il sudore non è umano: è parte del rituale.<text:line-break/>E anche il silenzio pesa, come un giuramento non detto.</text:p>
      <text:p text:style-name="First_20_paragraph">Le montagne del Marethar <text:span text:style-name="T1">non sono solo barriere naturali</text:span>: sono <text:span text:style-name="T1">scrigni di memoria vincolante</text:span>. A differenza delle alte creste rashiane, dominate dalle miniere imperiali, queste alture si innalzano nel cuore di Vallan, dove ogni pietra porta un nome e ogni sentiero ha memoria. I Vallan, in particolare, considerano ogni picco una sentinella e ogni valle un tribunale. Nelle gole di confine, <text:span text:style-name="T1">le faide si tramandano come vocazioni religiose</text:span>. Le armi forgiate nelle fucine delle alture vengono benedette più volte: all’inizio, alla fine, e alla prima uccisione.</text:p>
      <text:p text:style-name="Text_20_body">Alcune miniere sono ancora in uso. Altre sono state sigillate <text:span text:style-name="T2">non per esaurimento</text:span>, ma perché si dice che abbiano “trovato qualcosa che non era pietra”. I sentieri cambiano lentamente, ma quando lo fanno, è come se stessero <text:span text:style-name="T2">decidendo</text:span>.</text:p>
      <text:p text:style-name="Text_20_body">I santuari in quota sono silenziosi. E sorvegliati.</text:p>
      <text:list text:style-name="L63">
        <text:list-item>
          <text:p text:style-name="P102"><text:span text:style-name="T1">Risorse</text:span>: ferro, stagno, rame nero, pietra rituale</text:p>
        </text:list-item>
        <text:list-item>
          <text:p text:style-name="P102"><text:span text:style-name="T1">Tensioni</text:span>: giuramenti di confine, casate armate, sentieri contesi</text:p>
        </text:list-item>
        <text:list-item>
          <text:p text:style-name="P102"><text:span text:style-name="T1">Gioco</text:span>: armi che parlano, monaci-forgiatori, santuari che rifiutano chi non ha sangue vallaniano</text:p>
        </text:list-item>
      </text:list>
      <text:h text:style-name="Heading_20_3" text:outline-level="3"><text:bookmark-start text:name="le-isole"/>Le Isole<text:bookmark-end text:name="le-isole"/></text:h>
      <text:p text:style-name="First_20_paragraph"><text:span text:style-name="T2">Rifugi, frontiere e menzogne galleggianti</text:span></text:p>
      <text:p text:style-name="P103"><text:span text:style-name="T1">Se chiudi gli occhi sotto le mura di Alasia:</text:span><text:line-break/>Il vento sa di rame salato e promesse non firmate.<text:line-break/>I gabbiani gridano come sentinelle stanche.<text:line-break/>L’aria vibra tra gli archi e le torri, come se aspettasse un verdetto.<text:line-break/>E ogni onda che batte contro le fondamenta sembra chiedere: “Sei tornato, o sei nuovo?”</text:p>
      <text:p text:style-name="First_20_paragraph">Alasia è <text:span text:style-name="T1">roccaforte, università e porto</text:span>. Le isole vicine servono a chi può pagarle: basi militari, santuari esiliati, covi commerciali. Nulla è neutro tra queste coste.</text:p>
      <text:list text:style-name="L64">
        <text:list-item>
          <text:p text:style-name="P104"><text:span text:style-name="T1">Risorse</text:span>: porti, sapere, posizione strategica</text:p>
        </text:list-item>
        <text:list-item>
          <text:p text:style-name="P104"><text:span text:style-name="T1">Tensioni</text:span>: guerre d’influenza, sabotaggi diplomatici, eredità navali</text:p>
        </text:list-item>
        <text:list-item>
          <text:p text:style-name="P104"><text:span text:style-name="T1">Gioco</text:span>: spionaggio marittimo, accademie segrete, commerci proibiti</text:p>
        </text:list-item>
      </text:list>
      <text:h text:style-name="Heading_20_3" text:outline-level="3"><text:bookmark-start text:name="le-coste"/>Le coste<text:bookmark-end text:name="le-coste"/></text:h>
      <text:p text:style-name="First_20_paragraph"><text:span text:style-name="T2">Ogni porto è una promessa. Ogni isola, un debito.</text:span></text:p>
      <text:p text:style-name="P105"><text:span text:style-name="T1">Se chiudi gli occhi in una cala allasiana all’alba:</text:span><text:line-break/>L’odore è salmastro e untuoso.<text:line-break/>Il vento parla troppe lingue.<text:line-break/>Le onde arrivano stanche, come chi ha troppo da dire. E il mare, oggi, finge di dormire.</text:p>
      <text:p text:style-name="First_20_paragraph">Le coste thalassiane che circondano il Marethar sono <text:span text:style-name="T1">meno lineari di quanto la mappa suggerisca</text:span>. Frastagliate, punteggiate da porti che fingono neutralità e da calette che cambiano nome a ogni capitano, sono <text:span text:style-name="T1">teatri mobili</text:span>: diplomazia, guerra, superstizione e commercio si intrecciano a ogni marea.</text:p>
      <text:p text:style-name="Text_20_body">Le città marittime, come Allasia e i porti della Lega Rhithiana, <text:span text:style-name="T1">non vivono sul mare: vivono del mare</text:span>. Le rotte non sono solo commerciali: sono giuramenti. Le secche vengono evitate più per superstizione che per navigazione. Alcuni fari si accendono solo se il capitano è atteso. Alcuni scogli <text:span text:style-name="T2">scelgono</text:span> cosa distruggere.</text:p>
      <text:p text:style-name="Text_20_body">Sotto la superficie, relitti antichi trattengono oggetti che nessuno reclama. E a volte li restituiscono.</text:p>
      <text:list text:style-name="L65">
        <text:list-item>
          <text:p text:style-name="P106"><text:span text:style-name="T1">Risorse</text:span>: rotte, informazioni, sale, pesce, debiti antichi</text:p>
        </text:list-item>
        <text:list-item>
          <text:p text:style-name="P106"><text:span text:style-name="T1">Tensioni</text:span>: pirateria legalizzata, concessioni navali contese, culto delle maree</text:p>
        </text:list-item>
        <text:list-item>
          <text:p text:style-name="P106"><text:span text:style-name="T1">Gioco</text:span>: traversate pericolose, porti chiusi da faide, messaggi lasciati tra gli scogli</text:p>
        </text:list-item>
      </text:list>
      <text:h text:style-name="Heading_20_3" text:outline-level="3"><text:bookmark-start text:name="le-praterie-e-le-paludi"/>Le Praterie e le Paludi<text:bookmark-end text:name="le-praterie-e-le-paludi"/></text:h>
      <text:p text:style-name="First_20_paragraph"><text:span text:style-name="T2">Dove l’acqua comanda, e l’erba ascolta</text:span></text:p>
      <text:h text:style-name="Heading_20_4" text:outline-level="4"><text:bookmark-start text:name="le-praterie-di-dajilia"/>Le Praterie di Dajilia<text:bookmark-end text:name="le-praterie-di-dajilia"/></text:h>
      <text:p text:style-name="P107"><text:span text:style-name="T1">Se chiudi gli occhi nelle Praterie di Dajilia:</text:span><text:line-break/>Il vento porta con sé l’odore dell’erba alta e dei fiori selvatici.<text:line-break/>Il galoppo lontano di cavalli si confonde con il battito del cuore.<text:line-break/>Il cielo infinito abbraccia la terra in un silenzio sacro.<text:line-break/>Ogni respiro è un inno alla libertà e alla vastità.</text:p>
      <text:p text:style-name="First_20_paragraph">Oceani d’erba, mandrie in migrazione, tribù a cavallo che <text:span text:style-name="T1">non lasciano tracce, ma lasciano leggi</text:span>. Qui la parola data vale quanto un trattato inciso sulla pietra. E costa di più.</text:p>
      <text:list text:style-name="L66">
        <text:list-item>
          <text:p text:style-name="P108"><text:span text:style-name="T1">Risorse</text:span>: bestiame, lana, cuoio</text:p>
        </text:list-item>
        <text:list-item>
          <text:p text:style-name="P108"><text:span text:style-name="T1">Tensioni</text:span>: rotte di pascolo, dispute orali tra clan</text:p>
        </text:list-item>
        <text:list-item>
          <text:p text:style-name="P108"><text:span text:style-name="T1">Gioco</text:span>: duelli rituali, corse sacre, trattative tra capi nomadi</text:p>
        </text:list-item>
      </text:list>
      <text:h text:style-name="Heading_20_4" text:outline-level="4"><text:bookmark-start text:name="le-paludi-di-meshdad"/>Le Paludi di Meshdad<text:bookmark-end text:name="le-paludi-di-meshdad"/></text:h>
      <text:p text:style-name="P109"><text:span text:style-name="T1">Se chiudi gli occhi nelle Paludi di Meshdad:</text:span><text:line-break/>L’aria è densa di umidità e profumi di piante acquatiche.<text:line-break/>Gli insetti cantano melodie ipnotiche.<text:line-break/>Il terreno cede sotto i piedi, rivelando acque nascoste.<text:line-break/>Ogni suono è un enigma, ogni ombra una possibile minaccia.</text:p>
      <text:p text:style-name="First_20_paragraph">Morbide e umide come il ventre di un dio stanco. Le paludi nutrono, ma anche <text:span text:style-name="T1">nascondono e avvelenano</text:span>. Ogni villaggio ha una regola che non si può spiegare. E tutti dicono di non avere paura.</text:p>
      <text:list text:style-name="L67">
        <text:list-item>
          <text:p text:style-name="P110"><text:span text:style-name="T1">Risorse</text:span>: piante rare, erbe curative, pesce</text:p>
        </text:list-item>
        <text:list-item>
          <text:p text:style-name="P110"><text:span text:style-name="T1">Tensioni</text:span>: sovrapposizione di poteri, bonifiche armate</text:p>
        </text:list-item>
        <text:list-item>
          <text:p text:style-name="P110"><text:span text:style-name="T1">Gioco</text:span>: riti di passaggio, esseri che imitano voci, mappe che cambiano</text:p>
        </text:list-item>
      </text:list>
      <text:h text:style-name="Heading_20_3" text:outline-level="3"><text:bookmark-start text:name="deserti-rituali-e-sabbie-mobili"/>Deserti rituali e sabbie mobili<text:bookmark-end text:name="deserti-rituali-e-sabbie-mobili"/></text:h>
      <text:p text:style-name="First_20_paragraph"><text:span text:style-name="T2">Non separano. Proteggono ciò che non vuole essere trovato.</text:span></text:p>
      <text:p text:style-name="P111"><text:span text:style-name="T1">Se chiudi gli occhi in pieno giorno nel Deserto di Qadmath:</text:span><text:line-break/>La luce ti punge. L’aria ha odore di roccia surriscaldata e pelle secca.<text:line-break/>Il silenzio fa rumore, ma non è mai lo stesso.<text:line-break/>Quando respiri, senti sabbia tra i denti.<text:line-break/>E ogni tanto… sembra che il vento ti faccia una domanda.</text:p>
      <text:p text:style-name="First_20_paragraph">I deserti del Marethar non sono territori di transito: <text:span text:style-name="T1">sono confini viventi</text:span>, che si piegano, si ritirano, si vendicano. Il più noto è il <text:span text:style-name="T1">Deserto di Qadmath</text:span>, considerato una zona iniziatica per maghi e asceti: le sue dune cambiano direzione, alcune caverne scompaiono e tornano in luoghi diversi, e certi pozzi “ascoltano”.</text:p>
      <text:p text:style-name="Text_20_body">Più a sud-est si estendono le Sabbie di Suleiman (vedi anche Zone non cartografate), il cui canto, si dice, svela colpe nascoste. I viandanti più esperti si fermano ogni ora, anche senza motivo, per “rassicurare il terreno”. Gli scorpioni lasciano simboli. Le carovane non usano mappe: usano frasi tramandate.</text:p>
      <text:list text:style-name="L68">
        <text:list-item>
          <text:p text:style-name="P112"><text:span text:style-name="T1">Risorse</text:span>: sale, rame, fiori notturni, silenzi ad alto valore spirituale</text:p>
        </text:list-item>
        <text:list-item>
          <text:p text:style-name="P112"><text:span text:style-name="T1">Tensioni</text:span>: dispute tra culti, sparizioni rituali, santuari mobili</text:p>
        </text:list-item>
        <text:list-item>
          <text:p text:style-name="P112"><text:span text:style-name="T1">Gioco</text:span>: piste che mutano, enigmi legati al vento, prove iniziatiche dove si deve dimenticare per passare</text:p>
        </text:list-item>
      </text:list>
      <text:h text:style-name="Heading_20_3" text:outline-level="3"><text:bookmark-start text:name="città-verticali-e-labirinti-di-potere"/>Città verticali e labirinti di potere<text:bookmark-end text:name="città-verticali-e-labirinti-di-potere"/></text:h>
      <text:p text:style-name="First_20_paragraph"><text:span text:style-name="T2">I luoghi dove i piani superiori non ascoltano quelli inferiori. Ma li controllano.</text:span></text:p>
      <text:p text:style-name="P113"><text:span text:style-name="T1">Se chiudi gli occhi nei corridoi di Marnorum:</text:span><text:line-break/>Le pareti sanno di pietra levigata e cera bruciata.<text:line-break/>Il silenzio è geometrico. Se cade una parola, è un errore di simmetria.<text:line-break/>L’aria è filtrata, codificata, riscritta.<text:line-break/>E ogni cosa ha il sapore di qualcosa già approvato.</text:p>
      <text:p text:style-name="First_20_paragraph">Non tutte le città del Marethar si estendono in larghezza. Alcune <text:span text:style-name="T1">crescono per livelli, reticoli, cerchi concentrici e piani non comunicanti</text:span>. Marnorum, la capitale liniana, è un esempio perfetto: le vie alte non toccano mai le basse. Le decisioni si prendono in cima, ma si sentono solo sotto forma di decreto.</text:p>
      <text:p text:style-name="Text_20_body">A Fahya, la città cresce <text:span text:style-name="T1">verso l’interno della montagna</text:span>: le università magiche sono scavate nei crateri, protette da cancelli di pietra che si aprono solo con parole ormai dimenticate. Nessuna pianta cresce in superficie, ma l’intera città è un vivaio di formule e controllo.</text:p>
      <text:p text:style-name="Text_20_body">Questi luoghi sono più che spazi: sono <text:span text:style-name="T1">ideologie rese pietra</text:span>. Ogni scala è un confine. Ogni finestra, una gerarchia.</text:p>
      <text:list text:style-name="L69">
        <text:list-item>
          <text:p text:style-name="P114"><text:span text:style-name="T1">Risorse</text:span>: archivi, sapere occultato, controllo urbanistico, carceri invisibili</text:p>
        </text:list-item>
        <text:list-item>
          <text:p text:style-name="P114"><text:span text:style-name="T1">Tensioni</text:span>: insurrezioni verticali, lotte tra livelli, accesso negato a luoghi “civici”</text:p>
        </text:list-item>
        <text:list-item>
          <text:p text:style-name="P114"><text:span text:style-name="T1">Gioco</text:span>: fuga da piani proibiti, mappe tridimensionali, piani dove il tempo scorre diversamente</text:p>
        </text:list-item>
      </text:list>
      <text:h text:style-name="Heading_20_3" text:outline-level="3"><text:bookmark-start text:name="zone-non-cartografate-e-aree-contese"/>Zone non cartografate e aree contese<text:bookmark-end text:name="zone-non-cartografate-e-aree-contese"/></text:h>
      <text:p text:style-name="First_20_paragraph"><text:span text:style-name="T2">Menzionarle è pericoloso. Nominarle, peggio ancora</text:span></text:p>
      <text:p text:style-name="P115"><text:span text:style-name="T1">Se chiudi gli occhi nei pressi delle Sorgenti Bianche:</text:span><text:line-break/>Il suono dell’acqua che sgorga è puro e cristallino.<text:line-break/>L’aria è fresca, con un sentore di muschio e pietra bagnata.<text:line-break/>Il paesaggio muta impercettibilmente, sfuggendo alla comprensione.<text:line-break/>Ogni passo è un’incursione nell’ignoto, ogni respiro una scoperta.</text:p>
      <text:list text:style-name="L70">
        <text:list-item>
          <text:p text:style-name="P116"><text:span text:style-name="T1">Le Sorgenti Bianche</text:span>: si dice siano la vera origine del Fiume Doriano. Nessuno le ha mai viste due volte nello stesso punto.</text:p>
        </text:list-item>
        <text:list-item>
          <text:p text:style-name="P116"><text:span text:style-name="T1">Il Deserto di Suleiman</text:span>: a sud-est, la sabbia canta. A volte chiede indietro ciò che non le è stato dato.</text:p>
        </text:list-item>
        <text:list-item>
          <text:p text:style-name="P116"><text:span text:style-name="T1">L’Isola che Si Muove</text:span>: compare in mappe commerciali di tre secoli fa, poi in racconti per bambini, poi — dicono — nei sogni di alcuni capitani.</text:p>
        </text:list-item>
      </text:list>
      <text:p text:style-name="First_20_paragraph"><text:span text:style-name="T1">Aree di contesa:</text:span></text:p>
      <text:list text:style-name="L71">
        <text:list-item>
          <text:p text:style-name="P117"><text:span text:style-name="T1">La Dorsale Rashiano-Premiana</text:span>: ogni mappa ufficiale la piega a proprio vantaggio. In realtà, <text:span text:style-name="T1">le famiglie lì vivono sotto due leggi e tre codici morali</text:span>.</text:p>
        </text:list-item>
        <text:list-item>
          <text:p text:style-name="P117"><text:span text:style-name="T1">Delta di Meshdad</text:span>: pescatori, alchimisti e contrabbandieri litigano per lo stesso specchio d’acqua. Spesso di notte.</text:p>
        </text:list-item>
      </text:list>
      <text:h text:style-name="Heading_20_2" text:outline-level="2"><text:bookmark-start text:name="le-grandi-nazioni"/>🝣 Le Grandi Nazioni<text:bookmark-end text:name="le-grandi-nazioni"/></text:h>
      <text:p text:style-name="First_20_paragraph"><text:span text:style-name="T2">Frontiere, orgogli e tensioni radicate</text:span></text:p>
      <text:p text:style-name="P118">“<text:span text:style-name="T2">Ogni nazione si crede l’unica voce vera. Ma la storia, come la terra, è fatta di strati sovrapposti.</text:span>” – epigrafe incisa su un portale dimenticato a Preiacoria</text:p>
      <text:h text:style-name="Heading_20_3" text:outline-level="3"><text:bookmark-start text:name="la-repubblica-di-premia"/>La Repubblica di Premia<text:bookmark-end text:name="la-repubblica-di-premia"/></text:h>
      <text:p text:style-name="First_20_paragraph"><text:span text:style-name="T2">La voce della legge, il cuore delle riforme</text:span></text:p>
      <text:p text:style-name="Text_20_body">Premia si presenta come <text:span text:style-name="T1">una repubblica di principi e senatori</text:span>, una terra ordinata e razionale dove il potere si trasmette per elezione e consenso. Ma sotto i marmi della capitale, le radici sono più antiche, più guerriere. Nata da una rivolta contro una monarchia decadente, Premia <text:span text:style-name="T1">non ha mai smesso di temere la tirannide</text:span> — e per questo cerca di controllare tutto, anche sé stessa.</text:p>
      <text:p text:style-name="P119"><text:span text:style-name="T1">Se chiudi gli occhi in un campo alle porte di Preiacoria:</text:span><text:line-break/>L’odore è di grano tagliato troppo presto e pergamena riscritta.<text:line-break/>I passi sul selciato fanno rumore solo per chi li teme.<text:line-break/>L’aria sa di ferro tenue e d’attesa.<text:line-break/>Si sentono i voti: non parole, ma pesi, che cadono uno per volta.</text:p>
      <text:p text:style-name="First_20_paragraph">Il Senato di Preiacoria governa le vaste piane, le colline coltivate e le foreste sacre con un rigore quasi matematico. Le legioni repubblicane sono disciplinate e usate con parsimonia. L’economia, mista tra agricoltura, metalli e artigianato, è tra le più solide.</text:p>
      <text:p text:style-name="Text_20_body">Ma la stabilità ha un prezzo: <text:span text:style-name="T1">la crescente distanza tra patrizi e popolani, tra città e campagna, tra centro e margini</text:span>. Le tensioni interne, finora contenute, iniziano a generare crepe nei corridoi del potere.</text:p>
      <text:p text:style-name="Text_20_body">Preiacoria è il cuore istituzionale e simbolico della repubblica: un dedalo di portici e senato, dove le parole si pesano più dei decreti. A nord, Livia si distende tra vigne e giardini scolastici, famosa per le sue accademie civili dove il sapere si discute in metrica e le dispute filosofiche durano più delle elezioni. Più a sud, Aurelinum custodisce un equilibrio precario tra ruralità e tradizione, offrendo asilo a culti minori e scuole di diritto consuetudinario che sfidano, in silenzio, l’ortodossia repubblicana.</text:p>
      <text:list text:style-name="L72">
        <text:list-item>
          <text:p text:style-name="P120"><text:span text:style-name="T1">Contraddizioni</text:span>: Uguaglianza formale e disuguaglianza reale; riformismo culturale e conservatorismo sociale</text:p>
        </text:list-item>
        <text:list-item>
          <text:p text:style-name="P120"><text:span text:style-name="T1">Pressioni esterne</text:span>: Rivalità economica con Meshdad, sospetti politici da Hamania</text:p>
        </text:list-item>
        <text:list-item>
          <text:p text:style-name="P120"><text:span text:style-name="T1">Mini aggancio</text:span>: Un console scompare misteriosamente prima del voto su una nuova legge agraria. Il Senato chiede discrezione, ma la piazza già grida “tradimento”.</text:p>
        </text:list-item>
      </text:list>
      <text:h text:style-name="Heading_20_3" text:outline-level="3"><text:bookmark-start text:name="la-diarchia-di-ashania"/>La Diarchia di Ashania<text:bookmark-end text:name="la-diarchia-di-ashania"/></text:h>
      <text:p text:style-name="First_20_paragraph"><text:span text:style-name="T2">Due corone, un popolo incerto</text:span></text:p>
      <text:p text:style-name="Text_20_body">Ashania è una terra elegante e contraddittoria, <text:span text:style-name="T1">governata da una diarchia che alterna armonia a gelo strategico</text:span>. Il re Athelstan e la regina Elara regnano insieme… ma raramente dalla stessa sala. Il loro dualismo, celebrato nei riti stagionali, riflette un equilibrio instabile tra nobiltà rurale e ceti cittadini, tra tradizione e pragmatismo.</text:p>
      <text:p text:style-name="Text_20_body">La Diarchia vive di <text:span text:style-name="T1">erboristeria, legname, miniere leggere</text:span>, ma anche di alleanze ben intrecciate. Le sue foreste sono dense, sacre e pericolose; le sue valli producono vini leggeri e tensioni più pesanti. La Guardia Reale è piccola ma tenace, sostenuta da milizie locali legate a signorie e casati.</text:p>
      <text:p text:style-name="P121"><text:span text:style-name="T1">Se chiudi gli occhi tra i tronchi di Mirath:</text:span><text:line-break/>L’umidità si attacca alla pelle come un rimorso.<text:line-break/>Il muschio odora di fermento dolce e corteccia bagnata.<text:line-break/>Ogni suono è vicino, ma nessuno si lascia vedere.<text:line-break/>Sotto i piedi, la terra non è mai ferma: pulsa, ricorda.</text:p>
      <text:p text:style-name="First_20_paragraph">Ashania ha costruito la sua fama sulla diplomazia, ma la sua realtà quotidiana è fatta di <text:span text:style-name="T1">trattative silenziose e patti non scritti</text:span>. E sotto le radici delle foreste di Mirath, alcuni dicono che crescano cose che i re non hanno mai osato nominare.</text:p>
      <text:p text:style-name="Text_20_body">Durtus, centro cerimoniale della Diarchia, alterna stagioni di silenzio e di festa come il ritmo stesso del governo. Sotto i rami contorti delle foreste sacre, Mirath cresce lentamente attorno a pozioni e patti, laboratorio di guaritori, druidi e diplomatici che parlano poco ma incidono molto. A Elaranor, incastonata tra le colline boscose, i casati minori si scambiano favori in pubblico e veleni in privato.</text:p>
      <text:list text:style-name="L73">
        <text:list-item>
          <text:p text:style-name="P122"><text:span text:style-name="T1">Contraddizioni</text:span>: Sovranità condivisa e ambizioni personali; apertura commerciale e diffidenza ancestrale</text:p>
        </text:list-item>
        <text:list-item>
          <text:p text:style-name="P122"><text:span text:style-name="T1">Pressioni esterne</text:span>: Espansionismo liniano, richieste di protezione da villaggi frontalieri</text:p>
        </text:list-item>
        <text:list-item>
          <text:p text:style-name="P122"><text:span text:style-name="T1">Mini aggancio</text:span>: Un’antica lapide trovata nei Monti Elara mostra i volti di tre sovrani. Ma Ashania ha sempre avuto solo due corone. Sempre?</text:p>
        </text:list-item>
      </text:list>
      <text:h text:style-name="Heading_20_3" text:outline-level="3"><text:bookmark-start text:name="limpero-di-linia"/>L’Impero di Linia<text:bookmark-end text:name="limpero-di-linia"/></text:h>
      <text:p text:style-name="First_20_paragraph"><text:span text:style-name="T2">L’ordine che non chiede il permesso</text:span></text:p>
      <text:p text:style-name="Text_20_body">Linia <text:span text:style-name="T1">non si definisce una nazione. Si definisce la misura di ciò che è giusto.</text:span> Il suo imperatore, Valerian III, governa con pugno fermo e retorica impeccabile. Ogni cittadino sa cosa deve fare. Ogni strada sa dove porta. Ogni vino imperiale sa quando deve essere versato.</text:p>
      <text:p text:style-name="Text_20_body">La capitale, Marnorum, è un colosso di marmo e metallo. Le pianure e i monti che la circondano sono ricchi di cereali, minerali, e soprattutto <text:span text:style-name="T1">retorica codificata</text:span>. L’economia è ampia e diversificata, fondata su agricoltura intensiva, commercio e ingegneria civile.</text:p>
      <text:p text:style-name="P123"><text:span text:style-name="T1">Se chiudi gli occhi nei corridoi di Marnorum:</text:span><text:line-break/>Le pareti sanno di pietra levigata e cera bruciata.<text:line-break/>Il silenzio è geometrico. Se cade una parola, è un errore di simmetria.<text:line-break/>L’aria è filtrata, codificata, riscritta.<text:line-break/>E ogni cosa ha il sapore di qualcosa già approvato.</text:p>
      <text:p text:style-name="First_20_paragraph">Ma l’ordine non è solo infrastruttura: è imposizione. Il senato, consultivo, serve più per riflettere il volere dell’imperatore che per bilanciarlo. <text:span text:style-name="T1">Le legioni di Linia sono le più numerose e meglio equipaggiate del Marethar</text:span>, pronte a difendere o “normalizzare” ciò che turba la simmetria.</text:p>
      <text:p text:style-name="Text_20_body">Internamente, l’Impero fatica a contenere le rivalità nobiliari, la crescente influenza dei collegi magici, e un popolo che <text:span text:style-name="T1">inizia a dubitare dell’infallibilità come fondamento dello Stato</text:span>.</text:p>
      <text:p text:style-name="Text_20_body">Marnorum è il cuore dell’Impero: marmo, simmetria e archivi vivi dove le leggi si correggono da sole prima ancora di essere promulgate. Corvalis, meno visibile ma non meno centrale, è città di addestramento e architettura retorica, dove gli oratori si forniscono di parole come altri di lame. Lutria, distesa lungo il fiume, è meno rigida ma più pericolosa: crocevia di influenze culturali e porto di idee in bilico tra eresia e innovazione.</text:p>
      <text:list text:style-name="L74">
        <text:list-item>
          <text:p text:style-name="P124"><text:span text:style-name="T1">Contraddizioni</text:span>: Propaganda della perfezione e corruzione invisibile; magnificenza urbana e squilibri rurali</text:p>
        </text:list-item>
        <text:list-item>
          <text:p text:style-name="P124"><text:span text:style-name="T1">Pressioni esterne</text:span>: Scontri diplomatici con Meshdad, attriti doganali con Premia</text:p>
        </text:list-item>
        <text:list-item>
          <text:p text:style-name="P124"><text:span text:style-name="T1">Mini aggancio</text:span>: Una regione minore dell’impero elegge spontaneamente un “Prefetto Popolare” ispirandosi ai modelli premiani. L’Imperatore ordina di ignorarlo. Ma tre città si sono già unite a lui.</text:p>
        </text:list-item>
      </text:list>
      <text:h text:style-name="Heading_20_3" text:outline-level="3"><text:bookmark-start text:name="la-repubblica-di-meshdad"/>La Repubblica di Meshdad<text:bookmark-end text:name="la-repubblica-di-meshdad"/></text:h>
      <text:p text:style-name="First_20_paragraph"><text:span text:style-name="T2">Il palazzo è fatto di spezie e di sabbia</text:span></text:p>
      <text:p text:style-name="Text_20_body">Chi arriva a Meshdad per la prima volta, vede una città di profumi. Ma chi ci vive sa che l’odore dominante non è quello delle spezie: è il calcolo.</text:p>
      <text:p text:style-name="Text_20_body">Meshdad è un sultanato con l’anima mercantile e il cuore diviso tra tenda e palazzo. Governata dal Sultano Farid II, affiancato da un consiglio di visir e governatori, la città si estende come un mercato: modulare, espansiva, ricca di facciate e di retrobottega. La cultura è aridoniana, ma lo spirito è quello di chi ha sempre qualcosa da vendere — o da comprare.</text:p>
      <text:p text:style-name="P125"><text:span text:style-name="T1">Se chiudi gli occhi al centro del bazar coperto:</text:span><text:line-break/>Le spezie sono troppe. Ogni odore contraddice il precedente.<text:line-break/>Le voci sono alte, poi basse, poi scomparse.<text:line-break/>I tessuti sfiorano, ma sembrano valutarti.<text:line-break/>E il sudore sa di metallo e di attesa.</text:p>
      <text:p text:style-name="First_20_paragraph">Il commercio di spezie, metalli e tessuti ha reso Meshdad una <text:span text:style-name="T1">potenza senza legioni ma con valute capaci di piegare alleanze</text:span>. Il suo esercito, moderato, è formato da mercenari e milizie, più abili nel difendere i confini del profitto che nel sventolare bandiere. Le tensioni interne, tuttavia, crescono: <text:span text:style-name="T1">la nobiltà del deserto e la borghesia dei bazar non si parlano più da decenni</text:span>, se non per delegati e pugnalate diplomatiche.</text:p>
      <text:p text:style-name="Text_20_body">Meshdad non ha un centro: ha centri, ognuno con un suo mercato, un suo profeta, un suo debito. Tra i suoi vicoli, Tarikia cambia volto ogni giorno: alle prime luci è bazar di spezie, al tramonto è teatro, a notte è confessional. Zarhabil, più lontana, vive come una vedova altolocata: ritirata, elegante, sempre pronta a offrire conforto a chi paga in monete o segreti.</text:p>
      <text:list text:style-name="L75">
        <text:list-item>
          <text:p text:style-name="P126"><text:span text:style-name="T1">Contraddizioni</text:span>: aristocrazia e commercio in guerra silenziosa; splendore urbano e crisi idrica nel deserto</text:p>
        </text:list-item>
        <text:list-item>
          <text:p text:style-name="P126"><text:span text:style-name="T1">Pressioni esterne</text:span>: ostilità con Dajilia, frizione con Rashia, dipendenza dalle rotte marittime</text:p>
        </text:list-item>
        <text:list-item>
          <text:p text:style-name="P126"><text:span text:style-name="T1">Mini aggancio</text:span>: Una nuova varietà di spezia, capace di indurre sogni lucidi, appare nei mercati. Nessuno sa da dove venga. Ma molti sono pronti a uccidere per controllarla.</text:p>
        </text:list-item>
      </text:list>
      <text:h text:style-name="Heading_20_3" text:outline-level="3"><text:bookmark-start text:name="il-granducato-di-hamania"/>Il Granducato di Hamania<text:bookmark-end text:name="il-granducato-di-hamania"/></text:h>
      <text:p text:style-name="First_20_paragraph"><text:span text:style-name="T2">Dove ogni sabbia ha un giuramento inciso</text:span></text:p>
      <text:p text:style-name="Text_20_body">Hamania si presenta con il volto del Granduca Arslan III, ma <text:span text:style-name="T1">parla con la voce di mille satrapi</text:span>. È una terra estesa e dura, fatta di deserti e montagne, ma anche di <text:span text:style-name="T1">città tentacolari e clan nomadi con memoria lunga e lingua corta</text:span>.</text:p>
      <text:p text:style-name="Text_20_body">Il potere è condiviso solo formalmente: in realtà ogni satrapia è una semi-nazione, con alleanze proprie, eserciti personali e codici di condotta mai messi su pergamena. Le risorse — metalli, sale, spezie — rendono Hamania <text:span text:style-name="T1">ricca e gelosa</text:span>, ma la sua più grande ricchezza è l’orgoglio dei suoi capi. E l’orgoglio, in Marethar, costa sempre sangue.</text:p>
      <text:p text:style-name="P127"><text:span text:style-name="T1">Se chiudi gli occhi in una corte sabbiosa:</text:span><text:line-break/>Il sole ti entra nelle narici prima ancora della sabbia.<text:line-break/>L’aria odora di pelle, sale e ferro dimenticato.<text:line-break/>Gli echi sono più numerosi dei presenti.<text:line-break/>E qualcuno, sempre, ti osserva in silenzio.</text:p>
      <text:p text:style-name="First_20_paragraph">Il granducato ha un esercito grande e ben armato, che alterna tattiche d’assedio a guerre d’onore. Ma le vere battaglie si combattono <text:span text:style-name="T1">nelle sale degli accordi tribali, dove un proverbio può spezzare un’alleanza più di cento archibugi.</text:span></text:p>
      <text:p text:style-name="Text_20_body">Busgalerey, la capitale “nomade”, si tende e si scioglie come una pergamena al vento: oggi è corte, domani è mercato, dopodomani tribunale all’aperto. Karnak è cava e casata, città stratificata in verticale dove i clan scendono più a fondo man mano che perdono prestigio. Darhan non ha mura, ma chi la attraversa sa che ogni tenda ha occhi, e ogni fuoco una memoria da bruciare o proteggere.</text:p>
      <text:list text:style-name="L76">
        <text:list-item>
          <text:p text:style-name="P128"><text:span text:style-name="T1">Contraddizioni</text:span>: monarchia formale e anarchia funzionale; centralismo e rivalità tra clan</text:p>
        </text:list-item>
        <text:list-item>
          <text:p text:style-name="P128"><text:span text:style-name="T1">Pressioni esterne</text:span>: ostilità con Meshdad, Rashia e Dajilia; alleanza inquieta con Rhithia</text:p>
        </text:list-item>
        <text:list-item>
          <text:p text:style-name="P128"><text:span text:style-name="T1">Mini aggancio</text:span>: Durante una cerimonia ancestrale, un antico sigillo tribale viene rubato. Senza di esso, un’intera satrapia perde legittimità — e la pace.</text:p>
        </text:list-item>
      </text:list>
      <text:h text:style-name="Heading_20_3" text:outline-level="3"><text:bookmark-start text:name="la-città-stato-di-allasia"/>La Città-Stato di Allasia<text:bookmark-end text:name="la-città-stato-di-allasia"/></text:h>
      <text:p text:style-name="First_20_paragraph"><text:span text:style-name="T2">Dove il mare ha voce, e la terra paga pegno</text:span></text:p>
      <text:p text:style-name="Text_20_body">Allasia non si considera una città. Si considera <text:span text:style-name="T1">una rotta</text:span>. Un’intersezione sacra dove il mare, il commercio e l’intelligenza si stringono la mano — con una spada dietro la schiena.</text:p>
      <text:p text:style-name="P129"><text:span text:style-name="T1">Se chiudi gli occhi nel porto interno di Allasia:</text:span><text:line-break/>L’odore è salmastro e untuoso.<text:line-break/>I passi sul legno scricchiolano solo se hai qualcosa da nascondere.<text:line-break/>Il vento parla troppe lingue.<text:line-break/>E il mare, oggi, finge di dormire.</text:p>
      <text:p text:style-name="First_20_paragraph">Governata da un doge eletto tra le famiglie più influenti, e da un consiglio di mercanti e nobili, Allasia è <text:span text:style-name="T1">una democrazia marittima per chi se la può permettere</text:span>, e una prigione dorata per chi serve nei suoi moli. La cultura è thalassiana, la lingua scivola come seta unta, e il potere naviga sotto forma di flotta.</text:p>
      <text:p text:style-name="Text_20_body">Le sue navi — militari e commerciali — controllano <text:span text:style-name="T1">rotte, embarghi, e rumorose trattative diplomatiche</text:span>. La città prospera di pesce, sale, perle, e di tutto ciò che si può comprare o fingere di aver rubato.</text:p>
      <text:p text:style-name="Text_20_body">Ma i mercati sono diventati più spietati dei mari: <text:span text:style-name="T1">le famiglie combattono per rotte, porti, e quote di carico come in una guerra senza armi dichiarate</text:span>.</text:p>
      <text:p text:style-name="Text_20_body">Allasia non ha un volto: ne ha uno per ogni famiglia che la governa. Nel porto, le vele parlano più dei consiglieri; nei palazzi interni, le aste si tengono in silenzio, solo con cenni e contratti di sguardi. Oltre il canale maggiore si estende Noctir, dove il contrabbando si maschera da arte, e l’arte da legge. Verso il colle, Virelia ospita mappe che non esistono più e racconti cartografici che valgono più di una flotta.</text:p>
      <text:list text:style-name="L77">
        <text:list-item>
          <text:p text:style-name="P130"><text:span text:style-name="T1">Contraddizioni</text:span>: apparenza di armonia e faide mercantili continue; libertà di parola e controllo economico assoluto</text:p>
        </text:list-item>
        <text:list-item>
          <text:p text:style-name="P130"><text:span text:style-name="T1">Pressioni esterne</text:span>: ostilità con Dajilia, alleanze complesse con Rhithia e Linia</text:p>
        </text:list-item>
        <text:list-item>
          <text:p text:style-name="P130"><text:span text:style-name="T1">Mini aggancio</text:span>: Una nave fantasma attracca di notte. Nessuno l’ha vista arrivare. Il suo carico è composto solo da casse sigillate… e una sola parola incisa su ogni lato: “Restituire”.</text:p>
        </text:list-item>
      </text:list>
      <text:h text:style-name="Heading_20_3" text:outline-level="3"><text:bookmark-start text:name="limpero-rashiano"/>L’Impero Rashiano<text:bookmark-end text:name="limpero-rashiano"/></text:h>
      <text:p text:style-name="First_20_paragraph"><text:span text:style-name="T2">Quando la spada plasma la legge</text:span></text:p>
      <text:p text:style-name="Text_20_body">Rashia è <text:span text:style-name="T1">più un ritmo che un regno</text:span>. È il suono delle armature nelle pianure, dei tamburi cerimoniali che precedono la proclamazione di un nuovo governatore, del vento che corre sui palazzi fortificati di Fahya. Governato da Khalid IV, l’impero <text:span text:style-name="T1">non chiede consenso: si prende ciò che considera ordine</text:span>.</text:p>
      <text:p text:style-name="Text_20_body">Un tempo un mosaico di tribù guerriere, oggi Rashia è <text:span text:style-name="T1">una macchina statale organizzata e impaziente</text:span>, che misura il valore in territori e dinari. La sua economia si fonda su metalli preziosi, spezie e sale, e la sua forza militare è tra le più temute: artiglieria pesante, eserciti permanenti, tattiche d’assedio su larga scala.</text:p>
      <text:p text:style-name="P131"><text:span text:style-name="T1">Se chiudi gli occhi ai piedi delle mura di Fahya:</text:span><text:line-break/>La pietra sa di calore conservato e ammonimento.<text:line-break/>L’odore di ferro viene da dentro.<text:line-break/>Le voci non si sentono, ma si intuiscono.<text:line-break/>E ogni rumore sembra dire: “Resta al tuo posto.”</text:p>
      <text:p text:style-name="First_20_paragraph">Ma il cuore dell’Impero <text:span text:style-name="T1">è instabile come la sua gloria</text:span>: nobili in lotta, province riottose, e una popolazione che alterna venerazione e paura. Ogni successo esterno rischia di accendere un nuovo fronte interno.</text:p>
      <text:p text:style-name="Text_20_body">Fahya è fortezza, università e vetrina imperiale: ogni pietra ha una targa, ogni biblioteca un guardiano armato. A sud, Al-Qamar respira il deserto con eleganza minacciosa: si dice che qui gli astrologi parlino all’Imperatore ogni notte. Khaldun, incastonata tra le montagne, è la madre delle legioni: le sue cave non danno solo pietra, ma strategia scolpita.</text:p>
      <text:list text:style-name="L78">
        <text:list-item>
          <text:p text:style-name="P132"><text:span text:style-name="T1">Contraddizioni</text:span>: unificazione forzata e identità tribali persistenti; autorità centrale e autonomie feudali</text:p>
        </text:list-item>
        <text:list-item>
          <text:p text:style-name="P132"><text:span text:style-name="T1">Pressioni esterne</text:span>: ostilità aperta con Meshdad, Hamania e Dajilia; alleanza strategica con Doria</text:p>
        </text:list-item>
        <text:list-item>
          <text:p text:style-name="P132"><text:span text:style-name="T1">Mini aggancio</text:span>: Una carovana imperiale scompare nel Deserto di Qadmath. L’Imperatore ordina il silenzio. Ma qualcuno inizia a ricevere lettere firmate da chi era a bordo.</text:p>
        </text:list-item>
      </text:list>
      <text:h text:style-name="Heading_20_3" text:outline-level="3"><text:bookmark-start text:name="il-regno-di-vallan"/>Il Regno di Vallan<text:bookmark-end text:name="il-regno-di-vallan"/></text:h>
      <text:p text:style-name="First_20_paragraph"><text:span text:style-name="T2">Forgia e sangue, montagna e giuramento</text:span></text:p>
      <text:p text:style-name="Text_20_body">Vallan è un regno d’altri tempi, e lo rivendica con orgoglio. Re Thane I siede su un trono forgiato a Natzrel con ferro nero e giuramenti antichi, mentre le sue legioni si addestrano nelle gole e nelle miniere. Ogni villaggio ha un fabbro. Ogni tempio, un’arma sacra.</text:p>
      <text:p text:style-name="P133"><text:span text:style-name="T1">Se chiudi gli occhi nella fucina di Natzrel:</text:span><text:line-break/>Il metallo canta prima di essere battuto.<text:line-break/>L’aria è spessa, odorosa di carbone, promessa e orgoglio.<text:line-break/>Il sudore non è umano: è parte del rituale.<text:line-break/>E anche il silenzio pesa, come un giuramento non detto.</text:p>
      <text:p text:style-name="First_20_paragraph">L’identità vallaniana è fondata su <text:span text:style-name="T1">disciplina, onore e memoria ancestrale</text:span>. Le risorse sono abbondanti: minerali, legname, erbe rare. E lo sono anche le faide. Il regno è un mosaico di casate armate, unite solo finché il re dimostra di meritare l’arma che porta.</text:p>
      <text:p text:style-name="Text_20_body">Militarmente, Vallan è potente: addestramento montano, armature pesanti, e conoscenza del terreno. Ma la minaccia più grande non è esterna: è la <text:span text:style-name="T1">tentazione del potere personale, sempre dietro ogni scudo</text:span>.</text:p>
      <text:p text:style-name="Text_20_body">Natzrel è la capitale forgiata: un anello di pietra nera e legno temprato dove ogni strada ha il nome di una vendetta. Khazar si estende lungo le foreste contese, e ospita mercati armati dove ogni patto è inciso sul ferro. Vorr, in cima ai passi più antichi, è città di giuramenti: qui si scambiano promesse sotto testimoni… vivi o meno.</text:p>
      <text:list text:style-name="L79">
        <text:list-item>
          <text:p text:style-name="P134"><text:span text:style-name="T1">Contraddizioni</text:span>: culto dell’unità e rivalità claniche endemiche; sacralità della corona e tendenza alla ribellione rituale</text:p>
        </text:list-item>
        <text:list-item>
          <text:p text:style-name="P134"><text:span text:style-name="T1">Pressioni esterne</text:span>: ostilità latente con Linia, tensioni commerciali con Rashia</text:p>
        </text:list-item>
        <text:list-item>
          <text:p text:style-name="P134"><text:span text:style-name="T1">Mini aggancio</text:span>: Una nuova lega tra tre casate minori propone di eleggere un “re dei confini”. È solo un titolo onorifico… finché non lo è più.</text:p>
        </text:list-item>
      </text:list>
      <text:h text:style-name="Heading_20_3" text:outline-level="3"><text:bookmark-start text:name="limpero-di-doria"/>L’Impero di Doria<text:bookmark-end text:name="limpero-di-doria"/></text:h>
      <text:p text:style-name="First_20_paragraph"><text:span text:style-name="T2">Il fiume ricorda ciò che i libri negano</text:span></text:p>
      <text:p text:style-name="Text_20_body">Doria non ha bisogno di eserciti per imporsi. Ha il fiume Dor. E il fiume <text:span text:style-name="T1">non si ferma mai</text:span>.</text:p>
      <text:p text:style-name="Text_20_body">L’Impero doriano è un intreccio di città fluviali, palazzi cerimoniali e magazzini colmi di cereali. La sua forza è agricola, logistica, rituale. L’acqua è sacra, ogni irrigazione è un atto di potere, ogni diga un editto. La popolazione, numerosa e tenace, segue i cicli delle inondazioni come calendari divini.</text:p>
      <text:p text:style-name="Text_20_body">L’imperatrice governa con una calma letale, come la corrente che sembra dolce ma trascina ogni ostacolo. L’economia è basata su agricoltura irrigua, pesca e artigianato fluviale. Le sue legioni combattono poco, ma controllano ogni ponte, ogni guado, ogni approdo.</text:p>
      <text:p text:style-name="P135"><text:span text:style-name="T1">Se chiudi gli occhi lungo il Dor a Vera:</text:span><text:line-break/>Il fiume non scorre. Passa.<text:line-break/>Sa di limo, di sacrifici agricoli e preghiere mai registrate.<text:line-break/>Le barche si muovono senza rumore.<text:line-break/>E ogni goccia è un testimone.</text:p>
      <text:p text:style-name="First_20_paragraph">Ma la calma è apparente. <text:span text:style-name="T1">Contadini e nobili non si fidano più</text:span>, e le piogge tardive sono sempre colpa di qualcun altro.</text:p>
      <text:p text:style-name="Text_20_body">Dor, che dà il nome al fiume e ne prende il ritmo, si adagia su terrazze fluviali come una pergamena bagnata. Horus è città-palude, mezza sommersa e completamente ascoltata: si dice che le sue acque registrino tutto. Nilat, città dei semi migranti, vive con le inondazioni e le carestie come sorelle: benedette quando alternano, temute quando si alleano.</text:p>
      <text:list text:style-name="L80">
        <text:list-item>
          <text:p text:style-name="P136"><text:span text:style-name="T1">Contraddizioni</text:span>: centralismo idrico e fratture sociali; sacralità dell’equilibrio e sete di autonomia</text:p>
        </text:list-item>
        <text:list-item>
          <text:p text:style-name="P136"><text:span text:style-name="T1">Pressioni esterne</text:span>: diffidenza reciproca con Premia, alleanza strategica con Rashia</text:p>
        </text:list-item>
        <text:list-item>
          <text:p text:style-name="P136"><text:span text:style-name="T1">Mini aggancio</text:span>: Una nuova corrente nel fiume porta semi sconosciuti. I raccolti mutano. Alcuni fioriscono d’inverno. E il tempio tace.</text:p>
        </text:list-item>
      </text:list>
      <text:h text:style-name="Heading_20_3" text:outline-level="3"><text:bookmark-start text:name="il-principato-di-dajilia"/>Il Principato di Dajilia<text:bookmark-end text:name="il-principato-di-dajilia"/></text:h>
      <text:p text:style-name="First_20_paragraph"><text:span text:style-name="T2">Tra crinali e giuramenti, un equilibrio impossibile</text:span></text:p>
      <text:p text:style-name="Text_20_body">Dajilia è un nodo, non una linea. Un crocevia di sentieri, pascoli migranti, clan erranti e voti pronunciati al vento. Governato da Aram II, principe tanto rispettato quanto isolato, il principato vive <text:span text:style-name="T1">nel costante tentativo di mediare tra l’onore e la memoria</text:span>.</text:p>
      <text:p text:style-name="Text_20_body">Fondata attorno alle sorgenti di Nabad, la capitale è un cerchio di pietre e legno che protegge le sue acque con più parole che mura. Ogni tribù ha diritto di varcarne i confini — o di esserne esclusa per sette generazioni. Le risorse sono poche ma contese: lana, basalto, sale, erbe medicinali. L’acqua non è abbondante, ma è libera solo per chi ha giurato il proprio nome sulla pietra giusta.</text:p>
      <text:p text:style-name="Text_20_body">Militarmente, Dajilia è leggera e silenziosa: cavalleria veloce, arcieri delle alture, pattuglie mobili sui confini vegetali. Ma la vera arma del principato è <text:span text:style-name="T1">la memoria condivisa</text:span>: ogni nome, ogni voto, ogni tradimento viene inciso. E le pietre, sugli altipiani, si ricordano da sole.</text:p>
      <text:p text:style-name="P137"><text:span text:style-name="T1">Se chiudi gli occhi davanti a una sorgente di Nabad:</text:span> L’acqua ha il sapore delle promesse. Il vento porta voci che nessuno osa dimenticare. L’erba alta si piega, ma non si spezza. Ogni goccia sa il tuo nome, anche prima che tu lo pronunci.</text:p>
      <text:p text:style-name="First_20_paragraph">Nabad è l’altura-capitale, un cerchio intorno all’acqua dove ogni fonte è sorvegliata da legge, canti e minaccia. Alak si erge tra rocce e sentieri battuti dai pastori: lì si leggono gli astri, ma anche le mappe tracciate da chi sa perdere la strada con dignità. Rakeb, dicono i clan, si muove: oggi è sosta, domani rifugio, dopodomani città — ma solo per chi la trova due volte senza chiederlo.</text:p>
      <text:list text:style-name="L81">
        <text:list-item>
          <text:p text:style-name="P138"><text:span text:style-name="T1">Contraddizioni</text:span>: solidarietà tribale e rivalità dinastiche; governo centrale e giustizia orale inviolabile</text:p>
        </text:list-item>
        <text:list-item>
          <text:p text:style-name="P138"><text:span text:style-name="T1">Pressioni esterne</text:span>: tensioni con Meshdad, Rashia e Hamania</text:p>
        </text:list-item>
        <text:list-item>
          <text:p text:style-name="P138"><text:span text:style-name="T1">Mini aggancio</text:span>: Un cratere asciutto si riempie d’acqua in piena notte. Nessuno lo ha scavato. Chi vi si specchia sogna lo stesso leone d’ombra e fuoco.</text:p>
        </text:list-item>
      </text:list>
      <text:h text:style-name="Heading_20_3" text:outline-level="3"><text:bookmark-start text:name="lega-rhithiana"/><text:span text:style-name="T1">Lega Rhithiana</text:span><text:bookmark-end text:name="lega-rhithiana"/></text:h>
      <text:p text:style-name="First_20_paragraph"><text:span text:style-name="T2">Quando un’isola lancia un’ombra più lunga del continente, non è il sole a ingannare: è la flotta.</text:span></text:p>
      <text:p text:style-name="Text_20_body">La Lega Rhithiana <text:span text:style-name="T1">non è un impero, ma si comporta come se lo fosse</text:span>. Una costellazione di città-stato, ciascuna col proprio accento, le proprie vele e le proprie ambizioni, che si è data un solo nome per parlare più forte. Il cuore pulsante è Lurocedina, ma il sangue scorre in ogni porto, baia, o scalo su cui sventola un vessillo blu-oro con la stella a sei punte.</text:p>
      <text:p text:style-name="P139"><text:span text:style-name="T1">Se ascolti il mercato di Lysandria all’alba:</text:span><text:line-break/>Le aste si sussurrano tra le reti.<text:line-break/>Ogni grido è una bugia plausibile.<text:line-break/>Le botti di vino hanno doppio fondo.<text:line-break/>E i pescatori… pescano soltanto di giorno.</text:p>
      <text:p text:style-name="First_20_paragraph">Guidata da un consiglio di arconti e dominata dai mercanti più influenti delle isole Rhithiane, la Lega si proclama unita contro le minacce esterne — ma dentro le mura dei suoi arsenali, <text:span text:style-name="T1">le città-stato si sfidano ogni giorno per il controllo delle rotte, delle innovazioni e delle nuove scoperte</text:span>.</text:p>
      <text:p text:style-name="Text_20_body">La cultura è lysandriana: celebra la navigazione come arte, la scoperta come virtù e il commercio come gioco d’azzardo ben truccato. Le feste sono oceaniche, le gare navali spettacolari, e ogni nuova mappa nautica è un tesoro che può far saltare un’alleanza.</text:p>
      <text:p text:style-name="Text_20_body"><text:span text:style-name="T1">La flotta della Lega è il suo corpo, ma la sua mente è la cartografia.</text:span> Nessuna potenza conosce il Marethar meglio, nessuna sa leggere i venti come loro. Ma ogni scoperta accende appetiti, e ogni porto conteso è una scusa per mandare “navi d’osservazione armata”.</text:p>
      <text:list text:style-name="L82">
        <text:list-item>
          <text:p text:style-name="P140"><text:span text:style-name="T1">Contraddizioni</text:span>: unità politica di facciata, rivalità violente tra città-stato; celebrazione della scoperta e censura sulle rotte segrete</text:p>
        </text:list-item>
        <text:list-item>
          <text:p text:style-name="P140"><text:span text:style-name="T1">Pressioni esterne</text:span>: tensioni con Dajilia per le rotte sud-orientali; alleanza tattica con Hamania; diffidenza reciproca con Meshdad</text:p>
        </text:list-item>
        <text:list-item>
          <text:p text:style-name="P140"><text:span text:style-name="T1">Mini aggancio</text:span>: Un vecchio atlante nautico ricompare a Lurocedina. Contiene rotte che non esistono più — o che non dovrebbero esistere. Chi lo ha riportato? E perché alcune pagine sono scritte in una lingua dimenticata dai Rhithiani stessi?</text:p>
        </text:list-item>
      </text:list>
      <text:h text:style-name="Heading_20_2" text:outline-level="2"><text:bookmark-start text:name="gilde-ordini-e-accademie"/>🜗 Gilde, ordini e accademie<text:bookmark-end text:name="gilde-ordini-e-accademie"/></text:h>
      <text:p text:style-name="First_20_paragraph"><text:span text:style-name="T2">Le reti che reggono il potere quando le corone cadono</text:span></text:p>
      <text:p text:style-name="P141">“<text:span text:style-name="T2">Chi comanda oggi, si inginocchiava ieri davanti a un mastro mercante.</text:span>” — detto popolare a Meshdad</text:p>
      <text:p text:style-name="First_20_paragraph">Nel Marethar, <text:span text:style-name="T1">la forza non basta mai. Serve struttura. Serve memoria organizzata. Serve riconoscimento collettivo.</text:span> Le gilde, gli ordini e le accademie non sono solo luoghi di sapere o di lavoro: sono <text:span text:style-name="T1">sistemi politici paralleli</text:span>, che dettano leggi non scritte, proteggono famiglie, rovinano dinastie. Ogni nazione ha i suoi palazzi. Ma molti di quei palazzi non si reggono senza il legno, i sigilli o le formule fornite da chi lavora nei sotterranei del potere.</text:p>
      <text:h text:style-name="Heading_20_3" text:outline-level="3"><text:bookmark-start text:name="gilde-dei-mercanti-e-artigiani"/>Gilde dei Mercanti e Artigiani<text:bookmark-end text:name="gilde-dei-mercanti-e-artigiani"/></text:h>
      <text:h text:style-name="Heading_20_4" text:outline-level="4"><text:bookmark-start text:name="gilda-dei-mercanti-di-meshdad"/>Gilda dei Mercanti di Meshdad<text:bookmark-end text:name="gilda-dei-mercanti-di-meshdad"/></text:h>
      <text:p text:style-name="First_20_paragraph"><text:span text:style-name="T2">Parlano con voce bassa, ma le loro bilance sono più pesanti di un cannone</text:span></text:p>
      <text:p text:style-name="Text_20_body">La Gilda controlla gran parte del commercio di spezie e tessuti. Non è solo un consorzio economico: è <text:span text:style-name="T1">una diplomazia mercantile in forma di consiglio</text:span>, capace di fermare una guerra semplicemente spostando la sede di una fiera.</text:p>
      <text:p text:style-name="Text_20_body">Presieduta da un “Arbitro di Sapore”, eletto ogni cinque anni, regola i prezzi, definisce le rotte e — se necessario — impone sanzioni interne. <text:span text:style-name="T1">Ogni città con un emporio riconosciuto è vincolata alla carta commerciale della Gilda.</text:span></text:p>
      <text:p text:style-name="P142"><text:span text:style-name="T2">Influenza</text:span>: Decisiva in Meshdad e Hamania, crescente a Premia e Rhithia <text:span text:style-name="T2">Riti</text:span>: Il “Giuramento delle Spezie” avviene bendati, in una stanza dove ogni odore ha un significato preciso</text:p>
      <text:h text:style-name="Heading_20_4" text:outline-level="4"><text:bookmark-start text:name="confraternita-degli-artigiani-di-vallan"/>Confraternita degli Artigiani di Vallan<text:bookmark-end text:name="confraternita-degli-artigiani-di-vallan"/></text:h>
      <text:p text:style-name="First_20_paragraph"><text:span text:style-name="T2">Fabbri, tessitori, falegnami: maestri, non servi</text:span></text:p>
      <text:p text:style-name="Text_20_body">Ogni artigiano vallaniano appartiene a una confraternita. Ogni confraternita ha un codice, un albero genealogico, e una vendetta pendente o onorata. La Confraternita protegge i suoi, ma richiede <text:span text:style-name="T1">rigore assoluto nella qualità e nella condotta</text:span>. I tornei di maestria sono veri e propri eventi diplomatici.</text:p>
      <text:list text:style-name="L83">
        <text:list-item>
          <text:p text:style-name="P143"><text:span text:style-name="T1">Divisione interna</text:span>: ogni arte ha il suo capo mastro, ma i conflitti interni sono regolati da un Concilio delle Mani</text:p>
        </text:list-item>
        <text:list-item>
          <text:p text:style-name="P143"><text:span text:style-name="T1">Poteri occulti</text:span>: alcuni sostengono che la Confraternita custodisca metalli “vivi” e conoscenze dimenticate della forgiatura rituale</text:p>
        </text:list-item>
      </text:list>
      <text:h text:style-name="Heading_20_4" text:outline-level="4"><text:bookmark-start text:name="corporazione-dei-costruttori-navali-di-lysandria"/>Corporazione dei Costruttori Navali di Lysandria<text:bookmark-end text:name="corporazione-dei-costruttori-navali-di-lysandria"/></text:h>
      <text:p text:style-name="First_20_paragraph"><text:span text:style-name="T2">Il mare non perdona le imperfezioni</text:span></text:p>
      <text:p text:style-name="Text_20_body">Questa corporazione <text:span text:style-name="T1">decide chi può varare una nave, come, e con quale benedizione</text:span>. Senza il sigillo di Lysandria, nessuna nave entra nei porti di Rhithia senza rischiare l’embargo.</text:p>
      <text:p text:style-name="Text_20_body">Ogni mastro d’ascia è anche un custode di formule, proporzioni e giuramenti. L’equilibrio tra tecnica e superstizione è assoluto: <text:span text:style-name="T1">un solo errore nella costruzione può significare naufragio… o maledizione.</text:span></text:p>
      <text:p text:style-name="P144"><text:span text:style-name="T2">Riti</text:span>: Le chiglie sono segnate con canti numerici e tinture simboliche, ogni passaggio è documentato con incisioni che solo i membri possono leggere</text:p>
      <text:h text:style-name="Heading_20_3" text:outline-level="3"><text:bookmark-start text:name="ordini-religiosi-e-magici"/>Ordini religiosi e magici<text:bookmark-end text:name="ordini-religiosi-e-magici"/></text:h>
      <text:h text:style-name="Heading_20_4" text:outline-level="4"><text:bookmark-start text:name="ordine-dei-maghi-di-thalassia"/>Ordine dei Maghi di Thalassia<text:bookmark-end text:name="ordine-dei-maghi-di-thalassia"/></text:h>
      <text:p text:style-name="First_20_paragraph"><text:span text:style-name="T2">Non praticano magia: praticano governo invisibile</text:span></text:p>
      <text:p text:style-name="Text_20_body">I maghi di Thalassia <text:span text:style-name="T1">non sono eremiti: sono funzionari, consiglieri, protettori</text:span>. Organizzati in un consiglio guidato da un Arcimago, esercitano potere arcano e giuridico. L’Ordine offre protezione contro minacce sovrannaturali e consulenza ad ambasciatori e città-stato.</text:p>
      <text:p text:style-name="Text_20_body">Chi rompe un patto con un mago, <text:span text:style-name="T1">non rompe solo un contratto: rompe l’equilibrio con forze che non conosce.</text:span></text:p>
      <text:list text:style-name="L84">
        <text:list-item>
          <text:p text:style-name="P145"><text:span text:style-name="T2">Accettano apprendisti solo tramite raccomandazioni profetiche.</text:span></text:p>
        </text:list-item>
      </text:list>
      <text:h text:style-name="Heading_20_4" text:outline-level="4"><text:bookmark-start text:name="confraternita-dei-druidi-di-dimilalica"/>Confraternita dei Druidi di Dimilalica<text:bookmark-end text:name="confraternita-dei-druidi-di-dimilalica"/></text:h>
      <text:p text:style-name="First_20_paragraph"><text:span text:style-name="T2">La natura non è un bene da venerare. È una voce da ascoltare</text:span></text:p>
      <text:p text:style-name="Text_20_body">I druidi si riuniscono attorno agli Arcilde, i custodi dei cicli maggiori. Non hanno sede fissa, ma ogni foresta sacra è un archivio vivente. Si occupano di agricoltura, salute rituale, ma anche giustizia rurale. Alcuni rifiutano l’uso della scrittura, altri codificano tutto in versi cifrati.</text:p>
      <text:list text:style-name="L85">
        <text:list-item>
          <text:p text:style-name="P146"><text:span text:style-name="T2">Riti</text:span>: le cerimonie stagionali sono dirette da almeno tre druidi, sotto piante marcate con sangue animale e incenso di resina</text:p>
        </text:list-item>
      </text:list>
      <text:h text:style-name="Heading_20_4" text:outline-level="4"><text:bookmark-start text:name="la-mano-nera"/>La Mano Nera<text:bookmark-end text:name="la-mano-nera"/></text:h>
      <text:p text:style-name="First_20_paragraph"><text:span text:style-name="T2">Se nessuno sa chi comanda, è perché tutti obbediscono</text:span></text:p>
      <text:p text:style-name="Text_20_body">Non è una gilda. Non è una setta. È <text:span text:style-name="T1">un’ombra con dita ovunque</text:span>, nata a Meshdad e cresciuta dove il potere ufficiale ha voltato lo sguardo.</text:p>
      <text:p text:style-name="Text_20_body">Gestisce contrabbando, estorsione, reti di informatori e omicidi politici. Ogni “dito” della Mano agisce indipendentemente, ma obbedisce a un’unica regola: <text:span text:style-name="T1">non farsi notare due volte nello stesso luogo.</text:span></text:p>
      <text:p text:style-name="P147"><text:span text:style-name="T2">Temuta da nobili e ammirata da mercanti. Nessuno osa parlarne. Tutti ne parlano.</text:span></text:p>
      <text:h text:style-name="Heading_20_4" text:outline-level="4"><text:bookmark-start text:name="fratellanza-degli-assassini-di-rashia"/>Fratellanza degli Assassini di Rashia<text:bookmark-end text:name="fratellanza-degli-assassini-di-rashia"/></text:h>
      <text:p text:style-name="First_20_paragraph"><text:span text:style-name="T2">La lama che sigilla i segreti</text:span></text:p>
      <text:p text:style-name="Text_20_body">Riconosciuti e temuti in tutto il Marethar, gli assassini rashiani non agiscono per denaro, ma <text:span text:style-name="T1">per proteggere equilibri nobiliari, dinastie, o patti arcani</text:span>.</text:p>
      <text:p text:style-name="Text_20_body">Il Maestro dell’Ombra guida il Consiglio dei Dodici, ognuno dei quali custodisce una tecnica mortale e un nome segreto.</text:p>
      <text:list text:style-name="L86">
        <text:list-item>
          <text:p text:style-name="P148"><text:span text:style-name="T2">Ogni missione è una cerimonia, ogni vittima un testamento silenzioso.</text:span></text:p>
        </text:list-item>
      </text:list>
      <text:h text:style-name="Heading_20_3" text:outline-level="3"><text:bookmark-start text:name="accademie-e-istituzioni-del-sapere"/>Accademie e istituzioni del sapere<text:bookmark-end text:name="accademie-e-istituzioni-del-sapere"/></text:h>
      <text:h text:style-name="Heading_20_4" text:outline-level="4"><text:bookmark-start text:name="università-magica-di-fahya"/>Università Magica di Fahya<text:bookmark-end text:name="università-magica-di-fahya"/></text:h>
      <text:p text:style-name="First_20_paragraph"><text:span text:style-name="T2">Dove anche il silenzio ha un suo grimorio</text:span></text:p>
      <text:p text:style-name="Text_20_body">Centro d’eccellenza magica, ma anche <text:span text:style-name="T1">osservatorio di potere e ortodossia arcana</text:span>, l’università accoglie studenti da tutto il Marethar. Divisa in torri specializzate, l’università custodisce <text:span text:style-name="T1">segreti alchemici, registri di formule proibite e archivi che nemmeno i professori possono consultare</text:span>.</text:p>
      <text:list text:style-name="L87">
        <text:list-item>
          <text:p text:style-name="P149"><text:span text:style-name="T2">Gli esami sono oracolari. Alcuni studenti non superano nemmeno il primo sogno.</text:span></text:p>
        </text:list-item>
      </text:list>
      <text:h text:style-name="Heading_20_4" text:outline-level="4"><text:bookmark-start text:name="collegio-dei-filosofi-di-preiacoria"/>Collegio dei Filosofi di Preiacoria<text:bookmark-end text:name="collegio-dei-filosofi-di-preiacoria"/></text:h>
      <text:p text:style-name="First_20_paragraph"><text:span text:style-name="T2">La ragione è il tempio più vulnerabile</text:span></text:p>
      <text:p text:style-name="Text_20_body">Il collegio forma <text:span text:style-name="T1">giuristi, diplomatici, astronomi, ma anche poeti assassini e maestri della retorica nobile</text:span>. Struttura aperta, ma gerarchica nei dibattiti: chi non riesce a difendere una tesi non può scriverla.</text:p>
      <text:p text:style-name="Text_20_body">Molti senatori premiani provengono da qui.</text:p>
      <text:list text:style-name="L88">
        <text:list-item>
          <text:p text:style-name="P150"><text:span text:style-name="T2">Alcune sezioni del collegio sono interdette durante certi equinozi. Nessuno spiega perché.</text:span></text:p>
        </text:list-item>
      </text:list>
      <text:h text:style-name="Heading_20_4" text:outline-level="4"><text:bookmark-start text:name="accademia-di-nabad"/>Accademia di Nabad<text:bookmark-end text:name="accademia-di-nabad"/></text:h>
      <text:p text:style-name="First_20_paragraph"><text:span text:style-name="T2">Chiunque può imparare. Ma non tutti possono restare.</text:span></text:p>
      <text:p text:style-name="Text_20_body">Nel cuore di Dajilia, l’Accademia è <text:span text:style-name="T1">un crocevia di sapere e addestramento</text:span>. Forma strateghi, artisti, guaritori e maestri d’armi. Rettore e consiglio decidono chi può passare al livello successivo, ma <text:span text:style-name="T1">i duelli rituali valgono più degli esami</text:span>.</text:p>
      <text:list text:style-name="L89">
        <text:list-item>
          <text:p text:style-name="P151"><text:span text:style-name="T2">Alcuni dicono che un’intera disciplina venga insegnata solo nei sogni, durante la stagione dei venti.</text:span></text:p>
        </text:list-item>
      </text:list>
      <text:h text:style-name="Heading_20_2" text:outline-level="2"><text:bookmark-start text:name="vita-quotidiana"/>🝟 Vita quotidiana<text:bookmark-end text:name="vita-quotidiana"/></text:h>
      <text:p text:style-name="First_20_paragraph"><text:span text:style-name="T2">Ciò che accade quando gli eroi dormono e i mercati riaprono</text:span></text:p>
      <text:p text:style-name="P152">“<text:span text:style-name="T2">La politica muove gli eserciti, ma è la fame che muove le mani.</text:span>” — annotazione marginale nel Diario dei Giorni Semplici, Preiacoria</text:p>
      <text:h text:style-name="Heading_20_3" text:outline-level="3"><text:bookmark-start text:name="alimentazione-più-che-nutrirsi-è-abitare-il-gusto"/>Alimentazione: più che nutrirsi, è abitare il gusto<text:bookmark-end text:name="alimentazione-più-che-nutrirsi-è-abitare-il-gusto"/></text:h>
      <text:p text:style-name="First_20_paragraph">Nel Marethar, <text:span text:style-name="T1">il cibo è geografia</text:span>. Ogni regione ha un sapore, ogni nazione una tavola distinta. Mangiare è un atto sociale, culturale, spirituale — a volte anche rituale. Alcune comunità benedicono il pasto prima di servirlo. Altre ne <text:span text:style-name="T1">tacciono gli ingredienti</text:span> per rispetto delle stagioni o degli ospiti.</text:p>
      <text:list text:style-name="L90">
        <text:list-item>
          <text:p text:style-name="P153"><text:span text:style-name="T1">In Aridonia</text:span>, si consumano spezie forti e carni essiccate, con acqua profumata e pane piatto. Il pasto è spesso silenzioso, seguito da racconti condivisi solo se la luna è piena.</text:p>
        </text:list-item>
        <text:list-item>
          <text:p text:style-name="P153"><text:span text:style-name="T1">In Lysandria</text:span>, il pesce alla griglia e le insalate fresche scandiscono la vita portuale: pasti rapidi, leggeri, condivisi tra cittadini che non smettono mai di discutere.</text:p>
        </text:list-item>
        <text:list-item>
          <text:p text:style-name="P153"><text:span text:style-name="T1">In Orethia</text:span>, si mangia per resistere: zuppe dense, arrosti speziati, formaggi stagionati e birre forti, sempre accompagnati da racconti di guerra o canzoni da miniera.</text:p>
        </text:list-item>
        <text:list-item>
          <text:p text:style-name="P153"><text:span text:style-name="T1">In Naharim</text:span>, i pasti seguono il ritmo del fiume: pesce d’acqua dolce, riso, legumi e verdure accompagnano ogni stagione con dolci a base di latte e frutta.</text:p>
        </text:list-item>
      </text:list>
      <text:p text:style-name="First_20_paragraph">Il cibo non si consuma solo: <text:span text:style-name="T1">si offre, si scambia, si teme</text:span>. Alcune tavole portano benedizioni. Altre, segreti.</text:p>
      <text:h text:style-name="Heading_20_3" text:outline-level="3"><text:bookmark-start text:name="abbigliamento-e-moda-la-forma-della-funzione"/>Abbigliamento e moda: la forma della funzione<text:bookmark-end text:name="abbigliamento-e-moda-la-forma-della-funzione"/></text:h>
      <text:p text:style-name="First_20_paragraph">Vestirsi nel Marethar è <text:span text:style-name="T1">sopravvivenza, status e simbolo</text:span>. I tessuti raccontano clima, cultura e potere. Le cuciture, a volte, valgono quanto un anello.</text:p>
      <text:list text:style-name="L91">
        <text:list-item>
          <text:p text:style-name="P154"><text:span text:style-name="T1">Thalassia</text:span> indossa lino e seta, con ricami marini e colori vivaci: praticità da porto, ma con il gusto per la cerimonia.</text:p>
        </text:list-item>
        <text:list-item>
          <text:p text:style-name="P154"><text:span text:style-name="T1">Aridonia</text:span> veste cotone grezzo e turbanti, con tessuti naturali che proteggono dal sole e dalla sabbia.</text:p>
        </text:list-item>
        <text:list-item>
          <text:p text:style-name="P154"><text:span text:style-name="T1">Orethia</text:span> si rinforza con lana e pelle, aggiungendo piastre leggere anche all’abbigliamento civile: la guerra è sempre un’ipotesi.</text:p>
        </text:list-item>
        <text:list-item>
          <text:p text:style-name="P154"><text:span text:style-name="T1">Naharim</text:span> ama il cotone fine, i colori brillanti, i gioielli in oro e lapislazzuli: eleganza fluviale, quasi mistica.</text:p>
        </text:list-item>
      </text:list>
      <text:p text:style-name="P155">“<text:span text:style-name="T2">Un uomo senza cintura non ha parola.</text:span>” — detto aureliano sul valore delle fibbie cerimoniali</text:p>
      <text:h text:style-name="Heading_20_3" text:outline-level="3"><text:bookmark-start text:name="ritmi-stagionali-e-feste-lanno-come-preghiera"/>Ritmi stagionali e feste: l’anno come preghiera<text:bookmark-end text:name="ritmi-stagionali-e-feste-lanno-come-preghiera"/></text:h>
      <text:p text:style-name="First_20_paragraph">Ogni cultura nel Marethar <text:span text:style-name="T1">legge l’anno come una storia</text:span>. Alcune lo dividono in quattro capitoli, altre in tredici canti. Le stagioni non sono solo cambi di tempo: sono <text:span text:style-name="T1">occasioni per raccontare, onorare, ringraziare o temere.</text:span></text:p>
      <text:list text:style-name="L92">
        <text:list-item>
          <text:p text:style-name="P156"><text:span text:style-name="T1">Thalassia</text:span> celebra il mare con la <text:span text:style-name="T1">Festa delle Onde</text:span> e la <text:span text:style-name="T1">Giornata dei Mercanti</text:span>, tra regate e banchetti.</text:p>
        </text:list-item>
        <text:list-item>
          <text:p text:style-name="P156"><text:span text:style-name="T1">Aridonia</text:span> si raduna attorno al fuoco per il <text:span text:style-name="T1">Solstizio del Deserto</text:span> e danza sotto la pioggia durante i <text:span text:style-name="T1">Riti dell’Acqua</text:span>.</text:p>
        </text:list-item>
        <text:list-item>
          <text:p text:style-name="P156"><text:span text:style-name="T1">Orethia</text:span> onora i caduti nelle <text:span text:style-name="T1">Feste Minerarie</text:span>, con offerte di ferro e birra agli antenati.</text:p>
        </text:list-item>
        <text:list-item>
          <text:p text:style-name="P156"><text:span text:style-name="T1">Naharim</text:span> celebra la piena e la secca del fiume con <text:span text:style-name="T1">canti notturni e riti di purificazione</text:span> nelle acque sacre.</text:p>
        </text:list-item>
      </text:list>
      <text:p text:style-name="First_20_paragraph">Alcuni giorni sono <text:span text:style-name="T1">interdetti</text:span>: si lavora in silenzio, si coprono gli specchi, si evita di nominare certi nomi. Altri sono <text:span text:style-name="T1">spettacolo puro</text:span>, tra fuochi, corse cerimoniali, processioni in maschera.</text:p>
      <text:h text:style-name="Heading_20_3" text:outline-level="3"><text:bookmark-start text:name="famiglia-legami-relazioni-sociali"/>Famiglia, legami, relazioni sociali<text:bookmark-end text:name="famiglia-legami-relazioni-sociali"/></text:h>
      <text:p text:style-name="First_20_paragraph">Il concetto di famiglia varia:</text:p>
      <text:list text:style-name="L93">
        <text:list-item>
          <text:p text:style-name="P157">In <text:span text:style-name="T1">Naharim</text:span>, è <text:span text:style-name="T1">estensiva e spirituale</text:span>: chi mangia alla stessa tavola per sette giorni è “sorella d’acqua”.</text:p>
        </text:list-item>
        <text:list-item>
          <text:p text:style-name="P157">In <text:span text:style-name="T1">Orethia</text:span>, la <text:span text:style-name="T1">disciplina familiare è militare</text:span>: ogni padre è anche un addestratore.</text:p>
        </text:list-item>
        <text:list-item>
          <text:p text:style-name="P157">In <text:span text:style-name="T1">Aridonia</text:span>, il sangue conta, ma il <text:span text:style-name="T1">giuramento vale più del lignaggio</text:span>: si può cambiare casata, ma mai disonorare un giuramento inciso.</text:p>
        </text:list-item>
        <text:list-item>
          <text:p text:style-name="P157">In <text:span text:style-name="T1">Lysandria</text:span>, le famiglie sono <text:span text:style-name="T1">più ideologiche che biologiche</text:span>: si formano attorno a botteghe, assemblee, circoli di voto.</text:p>
        </text:list-item>
      </text:list>
      <text:p text:style-name="First_20_paragraph">I rapporti sociali seguono <text:span text:style-name="T1">griglie invisibili</text:span>: chi può parlare per primo, chi può sedersi a capo tavola, chi versa il vino. Ma ogni regola ha le sue eccezioni. E ogni trasgressione, le sue conseguenze.</text:p>
      <text:h text:style-name="Heading_20_3" text:outline-level="3"><text:bookmark-start text:name="lavoro-e-tempo-libero"/>Lavoro e tempo libero<text:bookmark-end text:name="lavoro-e-tempo-libero"/></text:h>
      <text:p text:style-name="First_20_paragraph">Il tempo libero esiste, ma <text:span text:style-name="T1">non è mai neutro</text:span>. È danza, gioco, riflessione o prestazione pubblica.</text:p>
      <text:list text:style-name="L94">
        <text:list-item>
          <text:p text:style-name="P158">Gli <text:span text:style-name="T1">orethiani</text:span> gareggiano in tiro con l’arco o gare di resistenza.</text:p>
        </text:list-item>
        <text:list-item>
          <text:p text:style-name="P158">I <text:span text:style-name="T1">lysandriani</text:span> amano il teatro di strada e i giochi retorici pubblici.</text:p>
        </text:list-item>
        <text:list-item>
          <text:p text:style-name="P158">I <text:span text:style-name="T1">thalariani</text:span> raccontano storie in taverna, accompagnate da suoni marini.</text:p>
        </text:list-item>
        <text:list-item>
          <text:p text:style-name="P158">I <text:span text:style-name="T1">doriani</text:span> praticano una forma di scacchi fluviali, con pezzi in legno colorato e regole che cambiano a seconda della marea.</text:p>
        </text:list-item>
      </text:list>
      <text:p text:style-name="P159">In alcune città, il <text:span text:style-name="T1">riposare è considerato segno di nobiltà.</text:span> In altre, è punito con l’oblio sociale.</text:p>
      <text:h text:style-name="Heading_20_1" text:outline-level="1"><text:bookmark-start text:name="parte-iii-oltre-il-visibile"/>🜃 Parte III – Oltre il visibile<text:bookmark-end text:name="parte-iii-oltre-il-visibile"/></text:h>
      <text:p text:style-name="First_20_paragraph"><text:span text:style-name="T2">Fratture, credenze, ciò che scivola via</text:span></text:p>
      <text:p text:style-name="P160">“<text:span text:style-name="T2">L’unica differenza tra mito e notizia è il tempo che serve per dimenticarli.</text:span>”</text:p>
      <text:p text:style-name="First_20_paragraph">Sotto le cronache ufficiali, nelle pieghe dei canti e delle rovine, il Marethar racconta anche ciò che non dovrebbe ricordare. Qui si trovano le creature sognate, le reliquie che parlano in silenzio, i documenti senza autore. Tutto ciò che turba. Tutto ciò che continua a tornare.</text:p>
      <text:h text:style-name="Heading_20_2" text:outline-level="2"><text:bookmark-start text:name="creature-mitiche-e-credenze-popolari"/>🜏 Creature Mitiche e Credenze Popolari<text:bookmark-end text:name="creature-mitiche-e-credenze-popolari"/></text:h>
      <text:p text:style-name="First_20_paragraph"><text:span text:style-name="T2">Non chiederti se esistono. Chiediti perché tutti ne parlano</text:span></text:p>
      <text:p text:style-name="P161">“<text:span text:style-name="T2">Ogni villaggio ha un mostro. Chi non lo ha, è solo perché ha dimenticato dove vive.</text:span>” — detto rurale diffuso nelle campagne di Ashania</text:p>
      <text:p text:style-name="First_20_paragraph">Nel Marethar, <text:span text:style-name="T1">le creature leggendarie non vivono solo nei boschi, nei deserti o negli abissi</text:span>. Vivono nei racconti. Nelle minacce sussurrate ai bambini. Nei diari di esploratori che non sono mai tornati. Alcune sono entità tangibili e pericolose. Altre sono “<text:span text:style-name="T1">sogni collettivi</text:span>”: esistono perché se ne parla, e se ne parla perché si teme che esistano. Molti sapienti delle accademie non sono d’accordo su quali siano reali. Ma in ogni regione, c’è chi giura di averle viste.</text:p>
      <text:h text:style-name="Heading_20_3" text:outline-level="3"><text:bookmark-start text:name="dal-marethar-e-dalle-sue-profondità"/>Dal Marethar e dalle sue profondità<text:bookmark-end text:name="dal-marethar-e-dalle-sue-profondità"/></text:h>
      <text:h text:style-name="Heading_20_4" text:outline-level="4"><text:bookmark-start text:name="leviatano"/><text:span text:style-name="T1">Leviatano</text:span><text:bookmark-end text:name="leviatano"/></text:h>
      <text:p text:style-name="First_20_paragraph">Un colosso marino. Dicono che emerga senza preavviso e affondi intere flotte senza toccarle. Le sue apparizioni seguono <text:span text:style-name="T1">cicli che solo i druidi costieri fingono di comprendere</text:span>. Alcuni lo chiamano “il cuore irato del Marethar”.</text:p>
      <text:p text:style-name="P162"><text:span text:style-name="T1">Possibilità di gioco</text:span>: appare durante una trattativa navale, rendendo inutile ogni piano umano.</text:p>
      <text:h text:style-name="Heading_20_4" text:outline-level="4"><text:bookmark-start text:name="sirene-del-marethar"/><text:span text:style-name="T1">Sirene del Marethar</text:span><text:bookmark-end text:name="sirene-del-marethar"/></text:h>
      <text:p text:style-name="First_20_paragraph">Cantano tra gli scogli, attirano le navi. Non sempre uccidono. Alcune salvano. Alcune parlano. Tutti i capitani sanno almeno una canzone che si dice scacci le sirene. Nessuna funziona due volte.</text:p>
      <text:p text:style-name="P163"><text:span text:style-name="T1">Possibilità di gioco</text:span>: un superstite racconta di una sirena che gli ha parlato… con la voce della madre morta.</text:p>
      <text:h text:style-name="Heading_20_3" text:outline-level="3"><text:bookmark-start text:name="dal-deserto-e-dai-venti-che-mentono"/>Dal deserto e dai venti che mentono<text:bookmark-end text:name="dal-deserto-e-dai-venti-che-mentono"/></text:h>
      <text:h text:style-name="Heading_20_4" text:outline-level="4"><text:bookmark-start text:name="ifrit-del-deserto"/><text:span text:style-name="T1">Ifrit del Deserto</text:span><text:bookmark-end text:name="ifrit-del-deserto"/></text:h>
      <text:p text:style-name="First_20_paragraph">Fiamme che camminano, incarnazioni dell’ira e dei segreti sepolti. Alcune tribù le venerano come messaggeri di Shahin, altre le cacciano. Nessuno ha mai contato due volte la stessa forma dell’Ifrit.</text:p>
      <text:p text:style-name="P164"><text:span text:style-name="T1">Possibilità di gioco</text:span>: un Ifrit segue i personaggi, ma brucia solo ciò che portano, mai ciò che toccano.</text:p>
      <text:h text:style-name="Heading_20_4" text:outline-level="4"><text:bookmark-start text:name="roc-del-marethar"/><text:span text:style-name="T1">Roc del Marethar</text:span><text:bookmark-end text:name="roc-del-marethar"/></text:h>
      <text:p text:style-name="First_20_paragraph">Gigantesco uccello predatore. Si dice oscuri il sole con un battito d’ali e che nutra i propri piccoli con capi carovanieri. Alcuni sostengono sia l’incarnazione del vento dell’est.</text:p>
      <text:p text:style-name="P165"><text:span text:style-name="T1">Possibilità di gioco</text:span>: i PG trovano le ossa di una carovana… su un altopiano senza accesso.</text:p>
      <text:h text:style-name="Heading_20_3" text:outline-level="3"><text:bookmark-start text:name="dalle-montagne-e-dai-luoghi-che-vogliono-restare-sepolti"/>Dalle montagne e dai luoghi che vogliono restare sepolti<text:bookmark-end text:name="dalle-montagne-e-dai-luoghi-che-vogliono-restare-sepolti"/></text:h>
      <text:h text:style-name="Heading_20_4" text:outline-level="4"><text:bookmark-start text:name="drago-di-ghiaccio"/><text:span text:style-name="T1">Drago di Ghiaccio</text:span><text:bookmark-end text:name="drago-di-ghiaccio"/></text:h>
      <text:p text:style-name="First_20_paragraph">Dormiva. Ora no. Alcuni dicono che non abbia fiamma, ma che congeli i pensieri. Appare solo in cime che nessuno scala più. La sua ombra cade senza fare rumore.</text:p>
      <text:p text:style-name="P166"><text:span text:style-name="T1">Possibilità di gioco</text:span>: gli spiriti degli scalatori morti lo servono come oracolo muto.</text:p>
      <text:h text:style-name="Heading_20_4" text:outline-level="4"><text:bookmark-start text:name="golem-di-pietra"/><text:span text:style-name="T1">Golem di Pietra</text:span><text:bookmark-end text:name="golem-di-pietra"/></text:h>
      <text:p text:style-name="First_20_paragraph">Creati per proteggere le miniere, alcuni sono ancora attivi. Difendono passaggi che nemmeno i nani ricordano. Alcuni parlano in versi antichi, altri aspettano un ordine mai arrivato.</text:p>
      <text:p text:style-name="P167"><text:span text:style-name="T1">Possibilità di gioco</text:span>: un golem dorme da secoli… e un rituale sbagliato lo sveglia.</text:p>
      <text:h text:style-name="Heading_20_3" text:outline-level="3"><text:bookmark-start text:name="dalle-foreste-e-dai-fiumi-che-ascoltano"/>Dalle foreste e dai fiumi che ascoltano<text:bookmark-end text:name="dalle-foreste-e-dai-fiumi-che-ascoltano"/></text:h>
      <text:h text:style-name="Heading_20_4" text:outline-level="4"><text:bookmark-start text:name="serpente-arcobaleno"/><text:span text:style-name="T1">Serpente Arcobaleno</text:span><text:bookmark-end text:name="serpente-arcobaleno"/></text:h>
      <text:p text:style-name="First_20_paragraph">Fiume e divinità al tempo stesso. Chi lo vede, spesso cambia. Chi lo teme, lo placa con canti. I naharim dicono che <text:span text:style-name="T1">sia il respiro del Dor stesso</text:span>.</text:p>
      <text:p text:style-name="P168"><text:span text:style-name="T1">Possibilità di gioco</text:span>: il fiume devia per evitarlo… lasciando un villaggio senz’acqua.</text:p>
      <text:h text:style-name="Heading_20_4" text:outline-level="4"><text:bookmark-start text:name="fenice-di-linia"/><text:span text:style-name="T1">Fenice di Linia</text:span><text:bookmark-end text:name="fenice-di-linia"/></text:h>
      <text:p text:style-name="First_20_paragraph">Risorge, ma non è mai la stessa. Le sue lacrime guariscono, ma a caro prezzo. Alcuni dicono che <text:span text:style-name="T1">bruci anche i ricordi</text:span>.</text:p>
      <text:p text:style-name="P169"><text:span text:style-name="T1">Possibilità di gioco</text:span>: una città vuole catturarla per farne simbolo nazionale. Lei… non è d’accordo.</text:p>
      <text:h text:style-name="Heading_20_3" text:outline-level="3"><text:bookmark-start text:name="dalle-rovine-e-dai-luoghi-che-ricordano-troppo"/>Dalle rovine e dai luoghi che ricordano troppo<text:bookmark-end text:name="dalle-rovine-e-dai-luoghi-che-ricordano-troppo"/></text:h>
      <text:h text:style-name="Heading_20_4" text:outline-level="4"><text:bookmark-start text:name="fata-delle-rovine"/><text:span text:style-name="T1">Fata delle Rovine</text:span><text:bookmark-end text:name="fata-delle-rovine"/></text:h>
      <text:p text:style-name="First_20_paragraph">Bellissima. Letale. Vive nei resti delle civiltà cadute. <text:span text:style-name="T1">Parla con chi sa ciò che è andato perduto</text:span>. Ruba oro a chi cerca gloria, ma dona segreti a chi offre poesia.</text:p>
      <text:p text:style-name="P170"><text:span text:style-name="T1">Possibilità di gioco</text:span>: chiede ai PG di raccontare il più grande errore della propria civiltà.</text:p>
      <text:h text:style-name="Heading_20_4" text:outline-level="4"><text:bookmark-start text:name="grifone-doro"/><text:span text:style-name="T1">Grifone d’Oro</text:span><text:bookmark-end text:name="grifone-doro"/></text:h>
      <text:p text:style-name="First_20_paragraph">Vola alto sopra gli imperi morenti. Compare solo quando un potere è sul punto di cadere o rinascere. Alcuni lo cercano per chiedere giudizio. Nessuno ne ha mai scritto la risposta.</text:p>
      <text:p text:style-name="P171"><text:span text:style-name="T1">Possibilità di gioco</text:span>: il grifone vola sopra la città durante un funerale politico.</text:p>
      <text:h text:style-name="Heading_20_3" text:outline-level="3"><text:bookmark-start text:name="come-usarle-in-gioco"/>Come usarle in gioco<text:bookmark-end text:name="come-usarle-in-gioco"/></text:h>
      <text:p text:style-name="First_20_paragraph">Queste creature non sono “mostri”. Sono <text:span text:style-name="T1">incarnazioni di memorie, paure, sogni e desideri collettivi</text:span>. Alcune sono eventi. Altre, metafore viventi. Inserirle nel gioco <text:span text:style-name="T1">non significa combatterle, ma decidere cosa rappresentano</text:span>.</text:p>
      <text:p text:style-name="P172"><text:span text:style-name="T1">Idee per l’uso narrativo</text:span>:</text:p>
      <text:list text:style-name="L95">
        <text:list-item>
          <text:p text:style-name="P173">Come segni di cambiamento storico o morale (es. il grifone d’oro)</text:p>
        </text:list-item>
        <text:list-item>
          <text:p text:style-name="P173">Come complicazione rituale o ambientale (es. l’idra palustre che blocca l’accesso a un tempio sommerso)</text:p>
        </text:list-item>
        <text:list-item>
          <text:p text:style-name="P173">Come opportunità di alleanza, trasformazione o mutamento culturale (es. il serpente arcobaleno come prova spirituale)</text:p>
        </text:list-item>
        <text:list-item>
          <text:p text:style-name="P173">Come inganno: la creatura esiste solo nei sogni, ma influenza decisioni vere</text:p>
        </text:list-item>
      </text:list>
      <text:h text:style-name="Heading_20_2" text:outline-level="2"><text:bookmark-start text:name="oggetti-perduti-reliquie-artefatti"/>🝆 Oggetti perduti, reliquie, artefatti<text:bookmark-end text:name="oggetti-perduti-reliquie-artefatti"/></text:h>
      <text:p text:style-name="First_20_paragraph"><text:span text:style-name="T2">Alcuni poteri non hanno voce. Solo forma.</text:span></text:p>
      <text:p text:style-name="P174">“<text:span text:style-name="T2">Un re senza corona può ancora comandare. Ma un popolo senza reliquie ha già perso il futuro.</text:span>” — proverbio aridoniano</text:p>
      <text:p text:style-name="First_20_paragraph">Gli oggetti che il Marethar conserva, o dimentica, non sono mai solo ciò che sembrano. <text:span text:style-name="T1">Alcuni sono artefatti magici. Altri, simboli. Altri ancora, menzogne divenute verità</text:span>. Spesso si perdono. Altre volte vengono nascosti, negati, o trasformati in strumenti politici, religiosi, o filosofici.</text:p>
      <text:h text:style-name="Heading_20_3" text:outline-level="3"><text:bookmark-start text:name="la-corona-di-shahin"/>La Corona di Shahin<text:bookmark-end text:name="la-corona-di-shahin"/></text:h>
      <text:p text:style-name="First_20_paragraph"><text:span text:style-name="T1">Origine</text:span>: Aridonia <text:span text:style-name="T1">Funzione</text:span>: Simbolo di guida spirituale e giuramento di pace <text:span text:style-name="T1">Dicerie</text:span>: Si dice che chi la indossa sogni ogni notte le guerre future — ma non possa impedirle. Alcune tribù ritengono che la corona parli, ma solo a chi ha perso tutto. <text:span text:style-name="T1">Stato</text:span>: Conservata nel Santuario di Shahin, ma alcuni sostengono che l’attuale sia una copia</text:p>
      <text:h text:style-name="Heading_20_3" text:outline-level="3"><text:bookmark-start text:name="la-spada-di-ser-athelstan"/>La Spada di Ser Athelstan<text:bookmark-end text:name="la-spada-di-ser-athelstan"/></text:h>
      <text:p text:style-name="First_20_paragraph"><text:span text:style-name="T1">Origine</text:span>: Ashania <text:span text:style-name="T1">Funzione</text:span>: Arma sacra, donata dai druidi di Dimilalica <text:span text:style-name="T1">Dicerie</text:span>: Non può colpire due volte lo stesso nemico — se lo fa, il portatore subisce il colpo. Alcuni sostengono che la spada porti un frammento di spirito arboreo</text:p>
      <text:h text:style-name="Heading_20_3" text:outline-level="3"><text:bookmark-start text:name="la-fiamma-di-ralertis"/>La Fiamma di Ralertis<text:bookmark-end text:name="la-fiamma-di-ralertis"/></text:h>
      <text:p text:style-name="First_20_paragraph"><text:span text:style-name="T1">Origine</text:span>: Linia <text:span text:style-name="T1">Funzione</text:span>: Torcia che non si spegne mai, usata per processioni, purificazioni e giuramenti <text:span text:style-name="T1">Dicerie</text:span>: Illumina solo la verità, ma acceca chi mente mentre la tiene. Alcuni filosofi sostengono che la torcia non emetta luce, ma memoria. <text:span text:style-name="T1">Stato</text:span>: Scomparsa da oltre due secoli; l’ultima menzione è su un trattato diplomatico bruciato a metà</text:p>
      <text:h text:style-name="Heading_20_3" text:outline-level="3"><text:bookmark-start text:name="lo-specchio-di-carthara"/>Lo Specchio di Carthara<text:bookmark-end text:name="lo-specchio-di-carthara"/></text:h>
      <text:p text:style-name="First_20_paragraph"><text:span text:style-name="T1">Origine</text:span>: Thalassia <text:span text:style-name="T1">Funzione</text:span>: Strumento divinatorio; riflette non l’aspetto, ma l’intento <text:span text:style-name="T1">Dicerie</text:span>: Usato per giudicare i contratti tra capitani. Infranto una volta, e solo in mare. Alcuni sostengono che guardarlo troppo a lungo faccia dimenticare il proprio nome. <text:span text:style-name="T1">Stato</text:span>: Attualmente in mano a una corporazione navale che lo usa come sigillo morale</text:p>
      <text:h text:style-name="Heading_20_3" text:outline-level="3"><text:bookmark-start text:name="lamuleto-di-shahin"/>L’Amuleto di Shahin<text:bookmark-end text:name="lamuleto-di-shahin"/></text:h>
      <text:p text:style-name="First_20_paragraph"><text:span text:style-name="T1">Origine</text:span>: Aridonia <text:span text:style-name="T1">Funzione</text:span>: Talismano protettivo, spesso indossato durante i riti di passaggio o i viaggi nel deserto <text:span text:style-name="T1">Dicerie</text:span>: Protegge solo chi non ha mai tradito. Alcuni dicono che smetta di funzionare se il portatore uccide a sangue freddo</text:p>
      <text:h text:style-name="Heading_20_3" text:outline-level="3"><text:bookmark-start text:name="la-bussola-dellerrante"/>La Bussola dell’Errante<text:bookmark-end text:name="la-bussola-dellerrante"/></text:h>
      <text:p text:style-name="First_20_paragraph"><text:span text:style-name="T1">Origine</text:span>: Dajilia <text:span text:style-name="T1">Funzione</text:span>: Non punta a nord, ma verso ciò che il cuore desidera di più <text:span text:style-name="T1">Dicerie</text:span>: Si dice che chi la segue senza esitazione arrivi sempre… ma non dove pensava. Alcuni la usano per testare la verità del proprio desiderio. <text:span text:style-name="T1">Stato</text:span>: Apparsa in almeno sette mercati, ogni volta con un nuovo possessore e una nuova leggenda</text:p>
      <text:h text:style-name="Heading_20_3" text:outline-level="3"><text:bookmark-start text:name="il-libro-della-seconda-vita"/>Il Libro della Seconda Vita<text:bookmark-end text:name="il-libro-della-seconda-vita"/></text:h>
      <text:p text:style-name="First_20_paragraph"><text:span text:style-name="T1">Origine</text:span>: Fahya <text:span text:style-name="T1">Funzione</text:span>: Tomo rituale. Si dice contenga l’incantesimo per riportare una sola persona in vita <text:span text:style-name="T1">Dicerie</text:span>: Nessuno conosce il costo. Alcuni dicono che riporti indietro solo il corpo, altri che rubi la vita a chi legge. È stato chiuso con cera rossa, e la cera non si scioglie. <text:span text:style-name="T1">Stato</text:span>: Conservato in una biblioteca interdetta. Nessuno sa quale.</text:p>
      <text:h text:style-name="Heading_20_3" text:outline-level="3"><text:bookmark-start text:name="il-sigillo-imperiale-perduto"/>Il Sigillo Imperiale Perduto<text:bookmark-end text:name="il-sigillo-imperiale-perduto"/></text:h>
      <text:p text:style-name="First_20_paragraph"><text:span text:style-name="T1">Origine</text:span>: Aureliani <text:span text:style-name="T1">Funzione</text:span>: Permette di comandare chi giura ancora fedeltà alla stirpe imperiale <text:span text:style-name="T1">Dicerie</text:span>: Attiva memorie sopite, obbliga alla fedeltà, ma cancella ogni altra lealtà. Alcuni sostengono che chi lo indossa possa riscrivere la storia, una parola alla volta. <text:span text:style-name="T1">Stato</text:span>: Oggetto di contesa in almeno tre campagne militari. Nessuno l’ha mostrato negli ultimi cinquant’anni</text:p>
      <text:h text:style-name="Heading_20_3" text:outline-level="3"><text:bookmark-start text:name="come-usarli-nel-gioco"/>Come usarli nel gioco<text:bookmark-end text:name="come-usarli-nel-gioco"/></text:h>
      <text:p text:style-name="First_20_paragraph">Questi oggetti non sono solo <text:span text:style-name="T1">strumenti con bonus</text:span>. Sono <text:span text:style-name="T1">catalizzatori narrativi</text:span>.</text:p>
      <text:p text:style-name="P175"><text:span text:style-name="T1">Idee per l’uso narrativo</text:span>:</text:p>
      <text:list text:style-name="L96">
        <text:list-item>
          <text:p text:style-name="P176">Oggetti che si attivano solo con condizioni emotive, morali o storiche</text:p>
        </text:list-item>
        <text:list-item>
          <text:p text:style-name="P176">Reliquie che cambiano forma o effetto in base alla cultura del portatore</text:p>
        </text:list-item>
        <text:list-item>
          <text:p text:style-name="P176">Oggetti “non utili”, ma centrali in una visione, un sogno, una rivelazione</text:p>
        </text:list-item>
        <text:list-item>
          <text:p text:style-name="P176">Artefatti falsi, creati per manipolare intere comunità</text:p>
        </text:list-item>
      </text:list>
      <text:h text:style-name="Heading_20_2" text:outline-level="2"><text:bookmark-start text:name="frammenti-e-marginalia"/>🜙 Frammenti e Marginalia<text:bookmark-end text:name="frammenti-e-marginalia"/></text:h>
      <text:p text:style-name="First_20_paragraph"><text:span text:style-name="T2">Ciò che la storia dimentica, ma il mondo ricorda</text:span></text:p>
      <text:p text:style-name="P177">“<text:span text:style-name="T2">Non tutto ciò che è inciso è vero. Ma tutto ciò che resiste al tempo, qualcosa dice.</text:span>” — Epigrafe spezzata, ritrovata nel tempio sommerso di Rhidar</text:p>
      <text:h text:style-name="Heading_20_4" text:outline-level="4"><text:bookmark-start text:name="lettera-mai-spedita-ritrovata-nella-giacca-di-un-ufficiale-liniano"/>Lettera mai spedita – ritrovata nella giacca di un ufficiale liniano<text:bookmark-end text:name="lettera-mai-spedita-ritrovata-nella-giacca-di-un-ufficiale-liniano"/></text:h>
      <text:p text:style-name="First_20_paragraph"><text:span text:style-name="T2">Datata </text:span>“<text:span text:style-name="T2">quattro giorni prima dell’invasione del Passo di Murith</text:span>”</text:p>
      <text:p text:style-name="P178"><text:span text:style-name="T1">Mio caro Vitellius,</text:span></text:p>
      <text:p text:style-name="P178">ti scrivo da una collina che domani sarà probabilmente nostra, o ridotta a carbone. I nostri ingegneri hanno finito le misurazioni: i cannoni saranno posizionati entro l’alba. Non abbiamo ricevuto ordini espliciti, ma i commenti del generale parlano chiaro: vogliono avanzare a tutti i costi.</text:p>
      <text:p text:style-name="P178">Eppure, proprio ieri, ho incontrato un mercante rashiano. Di quelli con occhi da faina e mani da scriba. Ci ha offerto sale. E legname. E progetti per una torre d’assedio migliorata. Dice di avere “clienti da entrambe le parti”.</text:p>
      <text:p text:style-name="P178">Fratello, ascoltami: se moriremo, sarà con le stesse armi che abbiamo venduto la scorsa stagione.</text:p>
      <text:p text:style-name="P178">Dì a tua moglie che non è colpa mia se non sono tornato. E a tuo figlio che il ferro fuso non distingue bandiere.</text:p>
      <text:p text:style-name="P178">— Aurel</text:p>
      <text:h text:style-name="Heading_20_4" text:outline-level="4"><text:bookmark-start text:name="graffito-nel-quartiere-portuale-di-lysandria"/>Graffito nel quartiere portuale di Lysandria<text:bookmark-end text:name="graffito-nel-quartiere-portuale-di-lysandria"/></text:h>
      <text:p text:style-name="P179">“<text:span text:style-name="T2">La giustizia naviga. Ma i poveri restano a riva.</text:span>” Inciso con conchiglia, parzialmente abraso dal tempo.</text:p>
      <text:h text:style-name="Heading_20_4" text:outline-level="4"><text:bookmark-start text:name="estratto-da-una-cronaca-orale-di-una-sacerdotessa-del-bufalo"/>Estratto da una cronaca orale di una sacerdotessa del Bufalo<text:bookmark-end text:name="estratto-da-una-cronaca-orale-di-una-sacerdotessa-del-bufalo"/></text:h>
      <text:p text:style-name="P180">“<text:span text:style-name="T2">Non vi dirò se Adrarad cammina ancora. Vi dirò solo che, quando è arrabbiato, le sabbie diventano liquide. E se sprofondi, è perché hai detto il tuo nome nel momento sbagliato.</text:span>”</text:p>
      <text:h text:style-name="Heading_20_4" text:outline-level="4"><text:bookmark-start text:name="nota-marginale-in-un-trattato-magico-censurato"/>Nota marginale in un trattato magico censurato<text:bookmark-end text:name="nota-marginale-in-un-trattato-magico-censurato"/></text:h>
      <text:p text:style-name="P181">“<text:span text:style-name="T2">La terza formula può invertire la voce di chi mente. Non usarla in presenza del Senato.</text:span>”</text:p>
      <text:h text:style-name="Heading_20_4" text:outline-level="4"><text:bookmark-start text:name="verbale-non-ufficiale-confraternita-degli-artigiani-di-vallan"/>Verbale non ufficiale – Confraternita degli Artigiani di Vallan<text:bookmark-end text:name="verbale-non-ufficiale-confraternita-degli-artigiani-di-vallan"/></text:h>
      <text:p text:style-name="First_20_paragraph"><text:span text:style-name="T2">Registrazione riservata, non autenticata dal Concilio delle Mani</text:span></text:p>
      <text:p text:style-name="P182"><text:span text:style-name="T1">Luogo</text:span>: Cripta della Forgia Risonante <text:span text:style-name="T1">Presiede</text:span>: Mastro Harvek di Terza Fiamma <text:span text:style-name="T1">Partecipanti</text:span>: 11 (tra cui una donna mascherata non riconosciuta ufficialmente)</text:p>
      <text:p text:style-name="P182"><text:span text:style-name="T1">Harvek apre il consiglio con la seguente dichiarazione</text:span>: “<text:span text:style-name="T2">Fratelli e sorelle, ci è stato chiesto di accettare l’uso della nuova lega proposta da Linia. Dicono sia più leggera, più resistente, più economica.</text:span>”</text:p>
      <text:p text:style-name="P182"><text:span text:style-name="T1">Segue silenzio rituale di due battiti.</text:span></text:p>
      <text:p text:style-name="P182"><text:span text:style-name="T1">Mastro Orlon interviene</text:span>: “<text:span text:style-name="T2">E più instabile. L’abbiamo provata. L’ultimo martello ha ruggito invece di colpire. E i giunti… i giunti parlano.</text:span>”</text:p>
      <text:p text:style-name="P182"><text:span text:style-name="T1">La maschera sconosciuta dice solo</text:span>: “<text:span text:style-name="T2">Chi forgia ciò che non capisce, non forgia. Imita.</text:span>”</text:p>
      <text:p text:style-name="P182"><text:span text:style-name="T1">Harvek chiude il consiglio con atto notarile inciso su pietra</text:span>: “<text:span text:style-name="T2">La Confraternita non ratifica la lega finché il nome di chi l’ha creata non sarà inciso in fuoco e testimoniato da almeno tre mani.</text:span>”</text:p>
      <text:h text:style-name="Heading_20_4" text:outline-level="4"><text:bookmark-start text:name="incisione-funeraria-anonima-nella-cripta-dei-giudicanti-di-orethia"/>Incisione funeraria, anonima, nella cripta dei Giudicanti di Orethia<text:bookmark-end text:name="incisione-funeraria-anonima-nella-cripta-dei-giudicanti-di-orethia"/></text:h>
      <text:p text:style-name="P183">“<text:span text:style-name="T2">Qui giace chi non sbagliò mai. Per questo, nessuno lo ricorda.</text:span>”</text:p>
      <text:h text:style-name="Heading_20_4" text:outline-level="4"><text:bookmark-start text:name="citazione-tramandata-tra-gli-accademici-silenti-di-fahya"/>Citazione tramandata tra gli Accademici Silenti di Fahya<text:bookmark-end text:name="citazione-tramandata-tra-gli-accademici-silenti-di-fahya"/></text:h>
      <text:p text:style-name="P184">“<text:span text:style-name="T2">Una verità detta troppo presto diventa un’eresia. Una detta troppo tardi, un necrologio.</text:span>”</text:p>
      <text:h text:style-name="Heading_20_4" text:outline-level="4"><text:bookmark-start text:name="frammento-su-pergamena-rinvenuto-a-nabad-bruciato-per-metà"/>Frammento su pergamena rinvenuto a Nabad, bruciato per metà<text:bookmark-end text:name="frammento-su-pergamena-rinvenuto-a-nabad-bruciato-per-metà"/></text:h>
      <text:p text:style-name="P185">“<text:span text:style-name="T2">…e quando il terzo leone ruggì, la sabbia dimenticò il nome dell’ombra. Così iniziò il lungo cammino dei senza-polso.</text:span>”</text:p>
      <text:h text:style-name="Heading_20_4" text:outline-level="4"><text:bookmark-start text:name="interrogatorio-informale-trascritto-da-un-funzionario-della-mano-nera"/>Interrogatorio informale – trascritto da un funzionario della Mano Nera<text:bookmark-end text:name="interrogatorio-informale-trascritto-da-un-funzionario-della-mano-nera"/></text:h>
      <text:p text:style-name="First_20_paragraph"><text:span text:style-name="T2">Documento ottenuto in forma anonima, provenienza: Meshdad</text:span></text:p>
      <text:p text:style-name="P186"><text:span text:style-name="T1">Funzionario (F):</text:span> Dunque. Hai visto il serpente?</text:p>
      <text:p text:style-name="P186"><text:span text:style-name="T1">Detenuto (D):</text:span> No.</text:p>
      <text:p text:style-name="P186"><text:span text:style-name="T1">F:</text:span> E allora perché sei qui?</text:p>
      <text:p text:style-name="P186"><text:span text:style-name="T1">D:</text:span> Perché ho smesso di sentire la sabbia sotto i piedi.</text:p>
      <text:p text:style-name="P186"><text:span text:style-name="T1">F:</text:span> Cosa vuol dire?</text:p>
      <text:p text:style-name="P186"><text:span text:style-name="T1">D:</text:span> Vuol dire che era lì. Non con gli occhi. Con l’intento.</text:p>
      <text:p text:style-name="P186"><text:span text:style-name="T1">F:</text:span> Intendi dire che ti ha osservato?</text:p>
      <text:p text:style-name="P186"><text:span text:style-name="T1">D:</text:span> No. Intendo dire che ha aspettato che parlassi. Ma non l’ho fatto. Non ancora.</text:p>
      <text:p text:style-name="P186"><text:span text:style-name="T1">F:</text:span> Cosa vuole?</text:p>
      <text:p text:style-name="P186"><text:span text:style-name="T1">D:</text:span> Vuole un nome.</text:p>
      <text:p text:style-name="P186"><text:span text:style-name="T1">F:</text:span> Il tuo?</text:p>
      <text:p text:style-name="P186"><text:span text:style-name="T1">D:</text:span> No. Il suo.</text:p>
      <text:h text:style-name="Heading_20_4" text:outline-level="4"><text:bookmark-start text:name="appunto-laterale-in-un-diario-di-viaggiatore-allasia"/>Appunto laterale in un diario di viaggiatore, Allasia<text:bookmark-end text:name="appunto-laterale-in-un-diario-di-viaggiatore-allasia"/></text:h>
      <text:p text:style-name="P187">“<text:span text:style-name="T2">La mappa è sbagliata. O peggio: è giusta, ma solo per chi ha già sbagliato la strada.</text:span>”</text:p>
      <text:h text:style-name="Heading_20_3" text:outline-level="3"><text:bookmark-start text:name="come-usarli-in-gioco"/>Come usarli in gioco<text:bookmark-end text:name="come-usarli-in-gioco"/></text:h>
      <text:p text:style-name="First_20_paragraph">I <text:span text:style-name="T1">frammenti e i marginalia</text:span> servono a:</text:p>
      <text:list text:style-name="L97">
        <text:list-item>
          <text:p text:style-name="P188"><text:span text:style-name="T1">Creare atmosfera</text:span>: introduzione di sessione, intermezzi, epigrafi su reliquie o edifici.</text:p>
        </text:list-item>
        <text:list-item>
          <text:p text:style-name="P188"><text:span text:style-name="T1">Suscitare domande</text:span>: i PG trovano un appunto enigmatico che sembra parlare di loro.</text:p>
        </text:list-item>
        <text:list-item>
          <text:p text:style-name="P188"><text:span text:style-name="T1">Ricostruire verità alternative</text:span>: più fonti contraddittorie su uno stesso evento.</text:p>
        </text:list-item>
        <text:list-item>
          <text:p text:style-name="P188"><text:span text:style-name="T1">Sollecitare interpretazione</text:span>: i giocatori devono decidere se dare credito a una voce o distruggerla.</text:p>
        </text:list-item>
      </text:list>
      <text:p text:style-name="P189">Un marginale ben piazzato può cambiare la percezione di un’intera campagna.</text:p>
      <text:h text:style-name="Heading_20_2" text:outline-level="2"><text:bookmark-start text:name="tre-domande-senza-risposta"/>🜓 Tre domande senza risposta<text:bookmark-end text:name="tre-domande-senza-risposta"/></text:h>
      <text:p text:style-name="First_20_paragraph"><text:span text:style-name="T2">Alcune domande non hanno soluzioni. Ma hanno eco.</text:span></text:p>
      <text:p text:style-name="P190">“<text:span text:style-name="T2">La verità nel Marethar è come il vento tra le vesti: la senti, ma nessuno la afferra.</text:span>” — Frammento scolpito su una campana spezzata a Fahya</text:p>
      <text:h text:style-name="Heading_20_3" text:outline-level="3"><text:bookmark-start text:name="che-cosè-veramente-shahin"/>1. Che cos’è veramente Shahin?<text:bookmark-end text:name="che-cosè-veramente-shahin"/></text:h>
      <text:p text:style-name="First_20_paragraph"><text:span text:style-name="T1">Contesto:</text:span> Venerato dagli Aridoniani come un albero sacro, uno spirito, una divinità madre o padre. Alcuni culti dicono che sia un dio. Altri che sia <text:span text:style-name="T1">un processo naturale</text:span>, una coscienza collettiva generata dai riti, o <text:span text:style-name="T1">la memoria della specie</text:span> che si radica come vegetazione sacra.</text:p>
      <text:p text:style-name="Text_20_body"><text:span text:style-name="T1">Ipotesi diffuse:</text:span></text:p>
      <text:list text:style-name="L98">
        <text:list-item>
          <text:p text:style-name="P191">Shahin è reale, ma non ha mai avuto un volto: <text:span text:style-name="T1">è ogni giuramento mantenuto</text:span>, e si manifesta in chi non tradisce.</text:p>
        </text:list-item>
        <text:list-item>
          <text:p text:style-name="P191">Shahin è un’invenzione per unire i clan, creata da un concilio druidico in tempi remoti.</text:p>
        </text:list-item>
        <text:list-item>
          <text:p text:style-name="P191">Shahin <text:span text:style-name="T1">è morto</text:span>, e ciò che si venera oggi è solo il riflesso rituale di un essere scomparso.</text:p>
        </text:list-item>
      </text:list>
      <text:p text:style-name="First_20_paragraph"><text:span text:style-name="T1">Spunti di gioco:</text:span></text:p>
      <text:list text:style-name="L99">
        <text:list-item>
          <text:p text:style-name="P192">Un druido sostiene di aver trovato le radici di Shahin… in una palude thalassiana.</text:p>
        </text:list-item>
        <text:list-item>
          <text:p text:style-name="P192">Un giovane riceve sogni da Shahin che contraddicono tutti i dogmi noti.</text:p>
        </text:list-item>
        <text:list-item>
          <text:p text:style-name="P192">Una nuova setta afferma che Shahin è tornato — ma con un nuovo nome, e nuovi precetti.</text:p>
        </text:list-item>
      </text:list>
      <text:h text:style-name="Heading_20_3" text:outline-level="3"><text:bookmark-start text:name="da-dove-provengono-le-creature-del-marethar"/>2. Da dove provengono le creature del Marethar?<text:bookmark-end text:name="da-dove-provengono-le-creature-del-marethar"/></text:h>
      <text:p text:style-name="First_20_paragraph"><text:span text:style-name="T1">Contesto:</text:span> Sirene, ifrit, grifoni, golem, serpenti arcobaleno… Tutte creature di cui si parla ovunque, ma <text:span text:style-name="T1">nessuno può documentare in modo certo la loro esistenza</text:span>. Eppure, il loro potere nella cultura e nella storia è innegabile.</text:p>
      <text:p text:style-name="Text_20_body"><text:span text:style-name="T1">Ipotesi diffuse:</text:span></text:p>
      <text:list text:style-name="L100">
        <text:list-item>
          <text:p text:style-name="P193">Sono reali, ma <text:span text:style-name="T1">legate a epoche o stati di coscienza alternativi</text:span>: si mostrano solo quando il mondo è “sbilanciato”.</text:p>
        </text:list-item>
        <text:list-item>
          <text:p text:style-name="P193">Sono proiezioni collettive di paure o memorie antiche, <text:span text:style-name="T1">generate dalla fede e dalla trasmissione orale</text:span>.</text:p>
        </text:list-item>
        <text:list-item>
          <text:p text:style-name="P193">Sono “<text:span text:style-name="T1">eoni senzienti</text:span>”, creature che vivono fuori dal tempo e usano il Marethar come veicolo temporaneo.</text:p>
        </text:list-item>
      </text:list>
      <text:p text:style-name="First_20_paragraph"><text:span text:style-name="T1">Spunti di gioco:</text:span></text:p>
      <text:list text:style-name="L101">
        <text:list-item>
          <text:p text:style-name="P194">Una biblioteca ritrovata contiene un trattato con la classificazione biologica degli ifrit. Alcuni nomi coincidono con testimoni recenti.</text:p>
        </text:list-item>
        <text:list-item>
          <text:p text:style-name="P194">Una creatura mitica si presenta a un villaggio… e chiede di essere dimenticata.</text:p>
        </text:list-item>
        <text:list-item>
          <text:p text:style-name="P194">Un cultista afferma di poter “generare” una creatura leggendaria, se abbastanza persone credono nella sua esistenza.</text:p>
        </text:list-item>
      </text:list>
      <text:h text:style-name="Heading_20_3" text:outline-level="3"><text:bookmark-start text:name="quale-fu-la-vera-origine-dellimpero-di-doria"/>3. Quale fu la vera origine dell’Impero di Doria?<text:bookmark-end text:name="quale-fu-la-vera-origine-dellimpero-di-doria"/></text:h>
      <text:p text:style-name="First_20_paragraph"><text:span text:style-name="T1">Contesto:</text:span> Secondo i testi ufficiali, l’Impero fluviale di Doria nacque attorno al fiume Dor grazie a un culto unificato e alla guida di una dinastia illuminata. Ma fonti orali, testi apocrifi e cronache censurate <text:span text:style-name="T1">raccontano versioni inconciliabili</text:span>.</text:p>
      <text:p text:style-name="Text_20_body"><text:span text:style-name="T1">Ipotesi diffuse:</text:span></text:p>
      <text:list text:style-name="L102">
        <text:list-item>
          <text:p text:style-name="P195">Il fiume <text:span text:style-name="T1">esisteva prima delle città</text:span>, ed è stato il suo spirito ad aver scelto i primi governanti.</text:p>
        </text:list-item>
        <text:list-item>
          <text:p text:style-name="P195">L’Impero è <text:span text:style-name="T1">un esperimento magico riuscito</text:span>, una creazione alchemica in forma statale, sostenuta da un rito ancora attivo.</text:p>
        </text:list-item>
        <text:list-item>
          <text:p text:style-name="P195">Il Doria <text:span text:style-name="T1">non è mai esistito come impero unito</text:span>: è una narrazione imposta da accademici di Fahya per giustificare un dominio fluviale.</text:p>
        </text:list-item>
      </text:list>
      <text:p text:style-name="First_20_paragraph"><text:span text:style-name="T1">Spunti di gioco:</text:span></text:p>
      <text:list text:style-name="L103">
        <text:list-item>
          <text:p text:style-name="P196">Un antico sigillo doriano viene ritrovato in un territorio che non compare in nessuna mappa imperiale.</text:p>
        </text:list-item>
        <text:list-item>
          <text:p text:style-name="P196">L’acqua del fiume comincia a “rifiutare” alcuni rituali ufficiali.</text:p>
        </text:list-item>
        <text:list-item>
          <text:p text:style-name="P196">Una nuova dottrina afferma che l’Impero è morto… ma che il fiume ha iniziato a scegliere un nuovo popolo.</text:p>
        </text:list-item>
      </text:list>
      <text:h text:style-name="Heading_20_1" text:outline-level="1"><text:bookmark-start text:name="parte-iv-per-giocare-a-marethar"/>🜚 Parte IV – Per giocare a Marethar<text:bookmark-end text:name="parte-iv-per-giocare-a-marethar"/></text:h>
      <text:p text:style-name="First_20_paragraph"><text:span text:style-name="T2">Tensioni che chiedono protagonisti</text:span></text:p>
      <text:p text:style-name="P197">“<text:span text:style-name="T2">Non tutte le storie si raccontano. Alcune si attraversano.</text:span>”</text:p>
      <text:p text:style-name="First_20_paragraph">Se stai leggendo queste pagine, forse stai cercando un ingresso. Non te lo daremo. Ma troverai ruoli in attesa, mappe rotte, verità negate. Basta una decisione sbagliata, e qualcosa inizierà. Non chiamiamolo gioco. Chiamiamolo tentativo.</text:p>
      <text:h text:style-name="Heading_20_2" text:outline-level="2"><text:bookmark-start text:name="come-si-entra-nel-mondo"/>🜚 Come si entra nel mondo?<text:bookmark-end text:name="come-si-entra-nel-mondo"/></text:h>
      <text:p text:style-name="First_20_paragraph"><text:span text:style-name="T2">Avviare una campagna, una cronaca, una deriva narrativa</text:span></text:p>
      <text:p text:style-name="P198">“<text:span text:style-name="T2">Il Marethar non inizia mai nello stesso punto. A volte è un accordo, a volte un cadavere, a volte una mappa che nessuno ha tracciato.</text:span>”</text:p>
      <text:p text:style-name="First_20_paragraph">Ogni ingresso nel Marethar è una presa di posizione. Non esistono tutorial, né incipit neutrali. Ciò che scegli di vedere per primo — e chi scegli di essere quando lo vedi — determina la direzione in cui il mondo si piegherà. Ecco quattro <text:span text:style-name="T1">strutture d’ingresso</text:span>, ognuna adatta a campagne lunghe o sessioni contenute, ognuna capace di restituire il Marethar sotto una luce diversa.</text:p>
      <text:h text:style-name="Heading_20_3" text:outline-level="3"><text:bookmark-start text:name="campagna-diplomatica-o-politica"/>Campagna diplomatica o politica<text:bookmark-end text:name="campagna-diplomatica-o-politica"/></text:h>
      <text:p text:style-name="First_20_paragraph"><text:span text:style-name="T2">Nazioni in tensione, accordi, trattati, tradimenti</text:span></text:p>
      <text:p text:style-name="Text_20_body"><text:span text:style-name="T1">Dove si gioca:</text:span> tra ambasciate, senati, corti, porti strategici, rotte contese. <text:span text:style-name="T1">Chi si interpreta:</text:span> consiglieri, nobili, spie, ufficiali, religiosi con potere indiretto. <text:span text:style-name="T1">Domande d’avvio:</text:span></text:p>
      <text:list text:style-name="L104">
        <text:list-item>
          <text:p text:style-name="P199">Chi vuole davvero la guerra… e chi finge di volerla?</text:p>
        </text:list-item>
        <text:list-item>
          <text:p text:style-name="P199">Qual è l’accordo che non può essere ufficialmente firmato?</text:p>
        </text:list-item>
        <text:list-item>
          <text:p text:style-name="P199">Che cosa si scambia davvero sotto le insegne diplomatiche?</text:p>
        </text:list-item>
      </text:list>
      <text:p text:style-name="First_20_paragraph"><text:span text:style-name="T1">Toni consigliati:</text:span> cospirazione elegante, linguaggio rituale, maschere civili che cadono.</text:p>
      <text:h text:style-name="Heading_20_3" text:outline-level="3"><text:bookmark-start text:name="micro-fiction-localizzata"/>Micro-fiction localizzata<text:bookmark-end text:name="micro-fiction-localizzata"/></text:h>
      <text:p text:style-name="First_20_paragraph"><text:span text:style-name="T2">Un villaggio, una nave, un monastero, una strada interrotta</text:span></text:p>
      <text:p text:style-name="Text_20_body"><text:span text:style-name="T1">Dove si gioca:</text:span> luoghi isolati, periferici o autonomi. <text:span text:style-name="T1">Chi si interpreta:</text:span> abitanti, viandanti, guardiani, stranieri appena arrivati. <text:span text:style-name="T1">Domande d’avvio:</text:span></text:p>
      <text:list text:style-name="L105">
        <text:list-item>
          <text:p text:style-name="P200">Cosa c’è qui che nessuno vuole venga scoperto?</text:p>
        </text:list-item>
        <text:list-item>
          <text:p text:style-name="P200">Chi è l’unico che non può andarsene?</text:p>
        </text:list-item>
        <text:list-item>
          <text:p text:style-name="P200">Cosa si aspetta che accada, anche se nessuno lo dice?</text:p>
        </text:list-item>
      </text:list>
      <text:p text:style-name="First_20_paragraph"><text:span text:style-name="T1">Toni consigliati:</text:span> mistero lento, sospensione del tempo, ciclicità rotta.</text:p>
      <text:h text:style-name="Heading_20_3" text:outline-level="3"><text:bookmark-start text:name="inchiesta-esoterica"/>🕯 Inchiesta esoterica<text:bookmark-end text:name="inchiesta-esoterica"/></text:h>
      <text:p text:style-name="First_20_paragraph"><text:span text:style-name="T2">Un culto, un oggetto, una creatura che forse non esiste</text:span></text:p>
      <text:p text:style-name="Text_20_body"><text:span text:style-name="T1">Dove si gioca:</text:span> biblioteche chiuse, rovine sigillate, città che mentono. <text:span text:style-name="T1">Chi si interpreta:</text:span> ricercatori, eretici, stregoni, testimoni, vittime. <text:span text:style-name="T1">Domande d’avvio:</text:span></text:p>
      <text:list text:style-name="L106">
        <text:list-item>
          <text:p text:style-name="P201">Perché si cerca questa cosa ora? Chi ne ha parlato per primo?</text:p>
        </text:list-item>
        <text:list-item>
          <text:p text:style-name="P201">Cosa è stato nascosto — e da chi?</text:p>
        </text:list-item>
        <text:list-item>
          <text:p text:style-name="P201">Cosa succede se la verità viene davvero trovata?</text:p>
        </text:list-item>
      </text:list>
      <text:p text:style-name="First_20_paragraph"><text:span text:style-name="T1">Toni consigliati:</text:span> orrore metafisico, ambiguità morale, fede che si incrina.</text:p>
      <text:h text:style-name="Heading_20_3" text:outline-level="3"><text:bookmark-start text:name="esplorazione-memoriale"/>Esplorazione memoriale<text:bookmark-end text:name="esplorazione-memoriale"/></text:h>
      <text:p text:style-name="First_20_paragraph"><text:span text:style-name="T2">Rovine, leggende, sogni che non coincidono con la storia</text:span></text:p>
      <text:p text:style-name="Text_20_body"><text:span text:style-name="T1">Dove si gioca:</text:span> città sommerse, archivi distrutti, deserti percorsi da canti. <text:span text:style-name="T1">Chi si interpreta:</text:span> archeologi, ex-sacerdoti, ultimi sopravvissuti, traduttori falliti. <text:span text:style-name="T1">Domande d’avvio:</text:span></text:p>
      <text:list text:style-name="L107">
        <text:list-item>
          <text:p text:style-name="P202">Di quale evento si ricordano cose troppo diverse?</text:p>
        </text:list-item>
        <text:list-item>
          <text:p text:style-name="P202">Quale presenza non dovrebbe esserci più?</text:p>
        </text:list-item>
        <text:list-item>
          <text:p text:style-name="P202">Chi ha giurato di non raccontare… ma ora è pronto a parlare?</text:p>
        </text:list-item>
      </text:list>
      <text:p text:style-name="First_20_paragraph"><text:span text:style-name="T1">Toni consigliati:</text:span> elegia, destino, scoperta di sé tramite ciò che è stato cancellato.</text:p>
      <text:h text:style-name="Heading_20_2" text:outline-level="2"><text:bookmark-start text:name="tensioni-come-trama"/>🜎 Tensioni come trama<text:bookmark-end text:name="tensioni-come-trama"/></text:h>
      <text:p text:style-name="First_20_paragraph"><text:span text:style-name="T2">Non serve scrivere un’avventura: basta lasciarsi tirare da una frattura</text:span></text:p>
      <text:p text:style-name="P203">“<text:span text:style-name="T2">La tensione non è il problema. È ciò che succede quando nessuno può più evitarla.</text:span>”</text:p>
      <text:p text:style-name="First_20_paragraph">Nel Marethar, la storia non si muove in linea retta. Si allarga come crepe nei muri vecchi: inizia dove nessuno guarda, ma alla fine passa ovunque. Ogni campagna nasce da una <text:span text:style-name="T1">tensione non risolta</text:span>. Una frattura che aspetta solo un soffio, una menzogna, una scelta fuori posto per aprirsi.</text:p>
      <text:p text:style-name="Text_20_body">Ecco cinque <text:span text:style-name="T1">grandi assi tematici</text:span>, ciascuno pronto a generare storie, fazioni, conflitti e dilemmi.</text:p>
      <text:h text:style-name="Heading_20_3" text:outline-level="3"><text:bookmark-start text:name="politica"/>Politica<text:bookmark-end text:name="politica"/></text:h>
      <text:p text:style-name="First_20_paragraph"><text:span text:style-name="T2">Chi comanda. Chi viene escluso. Chi riscrive le leggi.</text:span></text:p>
      <text:p text:style-name="Text_20_body">La politica nel Marethar è <text:span text:style-name="T1">stratificata, rituale, ma mai stabile</text:span>. Ogni titolo nasconde un debito. Ogni riforma una vendetta. Ogni alleanza una rottura futura.</text:p>
      <text:p text:style-name="Text_20_body"><text:span text:style-name="T1">Domande che generano storie:</text:span></text:p>
      <text:list text:style-name="L108">
        <text:list-item>
          <text:p text:style-name="P204">Chi ha appena ottenuto un potere che non sa usare?</text:p>
        </text:list-item>
        <text:list-item>
          <text:p text:style-name="P204">Quale legge si applica, ma nessuno osa pronunciare?</text:p>
        </text:list-item>
        <text:list-item>
          <text:p text:style-name="P204">Quale fazione minoritaria può diventare maggioranza solo grazie a una bugia?</text:p>
        </text:list-item>
      </text:list>
      <text:p text:style-name="First_20_paragraph"><text:span text:style-name="T1">Muoverla in gioco:</text:span></text:p>
      <text:list text:style-name="L109">
        <text:list-item>
          <text:p text:style-name="P205">Introduci un trattato che nessuno vuole firmare, ma tutti fingono di aver letto.</text:p>
        </text:list-item>
        <text:list-item>
          <text:p text:style-name="P205">Fai eleggere un personaggio non previsto.</text:p>
        </text:list-item>
        <text:list-item>
          <text:p text:style-name="P205">Fai dichiarare guerra senza sapere contro chi.</text:p>
        </text:list-item>
      </text:list>
      <text:h text:style-name="Heading_20_3" text:outline-level="3"><text:bookmark-start text:name="religione"/>Religione<text:bookmark-end text:name="religione"/></text:h>
      <text:p text:style-name="First_20_paragraph"><text:span text:style-name="T2">Eresie, apparizioni, silenzi divini.</text:span></text:p>
      <text:p text:style-name="Text_20_body">Le fedi convivono con lo scetticismo, ma <text:span text:style-name="T1">nessuno vive senza un rito</text:span>. Le divinità parlano poco. E a volte parlano a chi non dovrebbe ascoltare.</text:p>
      <text:p text:style-name="Text_20_body"><text:span text:style-name="T1">Domande che generano storie:</text:span></text:p>
      <text:list text:style-name="L110">
        <text:list-item>
          <text:p text:style-name="P206">Quale culto dice una verità che non si può accettare?</text:p>
        </text:list-item>
        <text:list-item>
          <text:p text:style-name="P206">Chi ha avuto una visione… e chi gli crede?</text:p>
        </text:list-item>
        <text:list-item>
          <text:p text:style-name="P206">Cosa succede se il rito sacro fallisce in pubblico?</text:p>
        </text:list-item>
      </text:list>
      <text:p text:style-name="First_20_paragraph"><text:span text:style-name="T1">Muoverla in gioco:</text:span></text:p>
      <text:list text:style-name="L111">
        <text:list-item>
          <text:p text:style-name="P207">Una reliquia sacra è denunciata come falsa.</text:p>
        </text:list-item>
        <text:list-item>
          <text:p text:style-name="P207">Un nuovo profeta dice parole che tutti riconoscono — ma in bocca sbagliata.</text:p>
        </text:list-item>
        <text:list-item>
          <text:p text:style-name="P207">Un tempio smette di funzionare. Ma continua a ricevere offerte.</text:p>
        </text:list-item>
      </text:list>
      <text:h text:style-name="Heading_20_3" text:outline-level="3"><text:bookmark-start text:name="famiglia"/>Famiglia<text:bookmark-end text:name="famiglia"/></text:h>
      <text:p text:style-name="First_20_paragraph"><text:span text:style-name="T2">Lignaggi, eredità contese, onori da riscattare.</text:span></text:p>
      <text:p text:style-name="Text_20_body">Nel Marethar, <text:span text:style-name="T1">ogni famiglia è una mappa di colpe e aspettative</text:span>. I nomi hanno peso. I matrimoni sono guerre. I figli non scelgono mai tutto da soli.</text:p>
      <text:p text:style-name="Text_20_body"><text:span text:style-name="T1">Domande che generano storie:</text:span></text:p>
      <text:list text:style-name="L112">
        <text:list-item>
          <text:p text:style-name="P208">Chi ha cambiato nome… e perché?</text:p>
        </text:list-item>
        <text:list-item>
          <text:p text:style-name="P208">Chi eredita un titolo che non voleva?</text:p>
        </text:list-item>
        <text:list-item>
          <text:p text:style-name="P208">Chi deve vendicare qualcosa che non ricorda?</text:p>
        </text:list-item>
      </text:list>
      <text:p text:style-name="First_20_paragraph"><text:span text:style-name="T1">Muoverla in gioco:</text:span></text:p>
      <text:list text:style-name="L113">
        <text:list-item>
          <text:p text:style-name="P209">Fai comparire un testamento con firme non riconosciute.</text:p>
        </text:list-item>
        <text:list-item>
          <text:p text:style-name="P209">Introdurre un erede illegittimo che tutti preferiscono.</text:p>
        </text:list-item>
        <text:list-item>
          <text:p text:style-name="P209">Svelare un legame di sangue in un luogo in cui sarebbe meglio mentire.</text:p>
        </text:list-item>
      </text:list>
      <text:h text:style-name="Heading_20_3" text:outline-level="3"><text:bookmark-start text:name="sapere"/>Sapere<text:bookmark-end text:name="sapere"/></text:h>
      <text:p text:style-name="First_20_paragraph"><text:span text:style-name="T2">Censura, riscrittura, segreti rivelati troppo presto.</text:span></text:p>
      <text:p text:style-name="Text_20_body">Il sapere è un potere fragile. Chi lo possiede lo difende con fuoco o con silenzio. <text:span text:style-name="T1">Ogni biblioteca è anche una prigione.</text:span></text:p>
      <text:p text:style-name="Text_20_body"><text:span text:style-name="T1">Domande che generano storie:</text:span></text:p>
      <text:list text:style-name="L114">
        <text:list-item>
          <text:p text:style-name="P210">Quale testo non deve essere letto?</text:p>
        </text:list-item>
        <text:list-item>
          <text:p text:style-name="P210">Chi ha mentito scrivendo una cronaca?</text:p>
        </text:list-item>
        <text:list-item>
          <text:p text:style-name="P210">Chi ha scoperto qualcosa… e l’ha subito dimenticato?</text:p>
        </text:list-item>
      </text:list>
      <text:p text:style-name="First_20_paragraph"><text:span text:style-name="T1">Muoverla in gioco:</text:span></text:p>
      <text:list text:style-name="L115">
        <text:list-item>
          <text:p text:style-name="P211">Un manoscritto contraddice l’intera storia ufficiale di una città.</text:p>
        </text:list-item>
        <text:list-item>
          <text:p text:style-name="P211">Una formula arcana viene svelata… e tutti cominciano a sognare nello stesso modo.</text:p>
        </text:list-item>
        <text:list-item>
          <text:p text:style-name="P211">Un oracolo viene reso pubblico. Ma cambia ogni volta che viene citato.</text:p>
        </text:list-item>
      </text:list>
      <text:h text:style-name="Heading_20_3" text:outline-level="3"><text:bookmark-start text:name="territorio"/>Territorio<text:bookmark-end text:name="territorio"/></text:h>
      <text:p text:style-name="First_20_paragraph"><text:span text:style-name="T2">Contese rituali, mappe sbagliate, luoghi che cambiano.</text:span></text:p>
      <text:p text:style-name="Text_20_body">Le terre del Marethar <text:span text:style-name="T1">non sono mai solo geografia</text:span>. Sono alleanze, cicatrici, storie non dette. Alcune valli ricordano. Alcuni fiumi scelgono da che parte scorrere.</text:p>
      <text:p text:style-name="Text_20_body"><text:span text:style-name="T1">Domande che generano storie:</text:span></text:p>
      <text:list text:style-name="L116">
        <text:list-item>
          <text:p text:style-name="P212">Chi vive in un luogo che altri considerano sacro?</text:p>
        </text:list-item>
        <text:list-item>
          <text:p text:style-name="P212">Quale confine è stato tracciato… ma mai accettato?</text:p>
        </text:list-item>
        <text:list-item>
          <text:p text:style-name="P212">Cosa accade quando una città scompare dalla mappa?</text:p>
        </text:list-item>
      </text:list>
      <text:p text:style-name="First_20_paragraph"><text:span text:style-name="T1">Muoverla in gioco:</text:span></text:p>
      <text:list text:style-name="L117">
        <text:list-item>
          <text:p text:style-name="P213">Una zona neutrale viene rivendicata da due culti diversi.</text:p>
        </text:list-item>
        <text:list-item>
          <text:p text:style-name="P213">Il suolo stesso cambia: si abbassa, si solleva, scompare un ponte.</text:p>
        </text:list-item>
        <text:list-item>
          <text:p text:style-name="P213">Una mappa ufficiale mostra un luogo che non è mai esistito. Fino a oggi.</text:p>
        </text:list-item>
      </text:list>
      <text:h text:style-name="Heading_20_2" text:outline-level="2"><text:bookmark-start text:name="ruoli-emersi-dal-mondo"/>🜛 Ruoli emersi dal mondo<text:bookmark-end text:name="ruoli-emersi-dal-mondo"/></text:h>
      <text:p text:style-name="First_20_paragraph"><text:span text:style-name="T2">Chi giochi, dice già cosa rischi</text:span></text:p>
      <text:p text:style-name="P214">“<text:span text:style-name="T2">Nel Marethar nessuno è neutrale. Anche chi non sceglie, è già stato scelto da qualcosa.</text:span>”</text:p>
      <text:p text:style-name="First_20_paragraph">Questi ruoli non sono classi, né professioni. Sono <text:span text:style-name="T1">figure di tensione</text:span>, archi incompleti che aspettano di essere incarnati. Non definiscono poteri, ma <text:span text:style-name="T1">posizioni morali, culturali, esistenziali</text:span> da cui partire per muoversi nel mondo.</text:p>
      <text:p text:style-name="Text_20_body">Possono essere usati per:</text:p>
      <text:list text:style-name="L118">
        <text:list-item>
          <text:p text:style-name="P215">creare un personaggio da zero,</text:p>
        </text:list-item>
        <text:list-item>
          <text:p text:style-name="P215">reimmaginare un PNG,</text:p>
        </text:list-item>
        <text:list-item>
          <text:p text:style-name="P215">ispirare un’intera campagna tematica.</text:p>
        </text:list-item>
      </text:list>
      <text:h text:style-name="Heading_20_3" text:outline-level="3"><text:bookmark-start text:name="la-figlia-della-sabbia"/>La Figlia della Sabbia<text:bookmark-end text:name="la-figlia-della-sabbia"/></text:h>
      <text:p text:style-name="First_20_paragraph"><text:span text:style-name="T2">Shahin l’ha vista nascere, ma non l’ha mai riconosciuta.</text:span></text:p>
      <text:list text:style-name="L119">
        <text:list-item>
          <text:p text:style-name="P216"><text:span text:style-name="T1">Origine</text:span>: Aridonia nomade</text:p>
        </text:list-item>
        <text:list-item>
          <text:p text:style-name="P216"><text:span text:style-name="T1">Conflitto</text:span>: sa che la sua parola muove i clan, ma non sa se dirla</text:p>
        </text:list-item>
        <text:list-item>
          <text:p text:style-name="P216"><text:span text:style-name="T1">Oggetto simbolico</text:span>: ciotola d’argilla non cotta, piena d’acqua</text:p>
        </text:list-item>
        <text:list-item>
          <text:p text:style-name="P216"><text:span text:style-name="T1">Voce</text:span>: “<text:span text:style-name="T2">Tutti mi chiamano custode. Nessuno mi ha chiesto cosa voglio davvero conservare.</text:span>”</text:p>
        </text:list-item>
      </text:list>
      <text:h text:style-name="Heading_20_3" text:outline-level="3"><text:bookmark-start text:name="il-mercante-del-patto"/>Il Mercante del Patto<text:bookmark-end text:name="il-mercante-del-patto"/></text:h>
      <text:p text:style-name="First_20_paragraph"><text:span text:style-name="T2">Non crede nei culti, ma crede negli accordi.</text:span></text:p>
      <text:list text:style-name="L120">
        <text:list-item>
          <text:p text:style-name="P217"><text:span text:style-name="T1">Origine</text:span>: Allasia o Meshdad</text:p>
        </text:list-item>
        <text:list-item>
          <text:p text:style-name="P217"><text:span text:style-name="T1">Conflitto</text:span>: ha firmato un contratto impossibile da rispettare</text:p>
        </text:list-item>
        <text:list-item>
          <text:p text:style-name="P217"><text:span text:style-name="T1">Oggetto simbolico</text:span>: registro contabile scritto in tre lingue, di cui una scomparsa</text:p>
        </text:list-item>
        <text:list-item>
          <text:p text:style-name="P217"><text:span text:style-name="T1">Voce</text:span>: “<text:span text:style-name="T2">Non sono mai stato religioso. Eppure, ogni sera accendo la candela. Per rispetto del margine.</text:span>”</text:p>
        </text:list-item>
      </text:list>
      <text:h text:style-name="Heading_20_3" text:outline-level="3"><text:bookmark-start text:name="il-duca-votato-alla-rovina"/>Il Duca votato alla rovina<text:bookmark-end text:name="il-duca-votato-alla-rovina"/></text:h>
      <text:p text:style-name="First_20_paragraph"><text:span text:style-name="T2">Sa che cadrà. La domanda è: quanto può salvare prima?</text:span></text:p>
      <text:list text:style-name="L121">
        <text:list-item>
          <text:p text:style-name="P218"><text:span text:style-name="T1">Origine</text:span>: Linia o Vallan</text:p>
        </text:list-item>
        <text:list-item>
          <text:p text:style-name="P218"><text:span text:style-name="T1">Conflitto</text:span>: è l’unico in grado di rompere il ciclo, ma dovrebbe farlo dall’interno</text:p>
        </text:list-item>
        <text:list-item>
          <text:p text:style-name="P218"><text:span text:style-name="T1">Oggetto simbolico</text:span>: medaglia imperiale segata a metà</text:p>
        </text:list-item>
        <text:list-item>
          <text:p text:style-name="P218"><text:span text:style-name="T1">Voce</text:span>: “<text:span text:style-name="T2">Mio padre ha costruito il senato. Io lo guardo bruciare. In silenzio.</text:span>”</text:p>
        </text:list-item>
      </text:list>
      <text:h text:style-name="Heading_20_3" text:outline-level="3"><text:bookmark-start text:name="la-druidessa-dellequilibrio"/>La Druidessa dell’Equilibrio<text:bookmark-end text:name="la-druidessa-dellequilibrio"/></text:h>
      <text:p text:style-name="First_20_paragraph"><text:span text:style-name="T2">Credeva nei cicli. Ora crede nella necessità della rottura.</text:span></text:p>
      <text:list text:style-name="L122">
        <text:list-item>
          <text:p text:style-name="P219"><text:span text:style-name="T1">Origine</text:span>: Dimilalica o Ashania</text:p>
        </text:list-item>
        <text:list-item>
          <text:p text:style-name="P219"><text:span text:style-name="T1">Conflitto</text:span>: ha visto la natura cambiare e si rifiuta di riportarla all’ordine</text:p>
        </text:list-item>
        <text:list-item>
          <text:p text:style-name="P219"><text:span text:style-name="T1">Oggetto simbolico</text:span>: rametto secco in una teca d’ambra</text:p>
        </text:list-item>
        <text:list-item>
          <text:p text:style-name="P219"><text:span text:style-name="T1">Voce</text:span>: “<text:span text:style-name="T2">Ogni volta che fermiamo il cambiamento lo chiamiamo equilibrio. Ma il vento non è mai tornato indietro.</text:span>”</text:p>
        </text:list-item>
      </text:list>
      <text:h text:style-name="Heading_20_3" text:outline-level="3"><text:bookmark-start text:name="il-cartografo-muto"/>Il Cartografo Muto<text:bookmark-end text:name="il-cartografo-muto"/></text:h>
      <text:p text:style-name="First_20_paragraph"><text:span text:style-name="T2">Ha tracciato un luogo che non esiste. Ma insiste.</text:span></text:p>
      <text:list text:style-name="L123">
        <text:list-item>
          <text:p text:style-name="P220"><text:span text:style-name="T1">Origine</text:span>: Premia o Rhithia</text:p>
        </text:list-item>
        <text:list-item>
          <text:p text:style-name="P220"><text:span text:style-name="T1">Conflitto</text:span>: conosce la strada verso qualcosa che nessuno riconosce</text:p>
        </text:list-item>
        <text:list-item>
          <text:p text:style-name="P220"><text:span text:style-name="T1">Oggetto simbolico</text:span>: mappa incompleta con una sola macchia d’inchiostro mobile</text:p>
        </text:list-item>
        <text:list-item>
          <text:p text:style-name="P220"><text:span text:style-name="T1">Voce</text:span>: “<text:span text:style-name="T2">La mappa è corretta. Non è il mondo ad essere sbagliato. È solo in ritardo.</text:span>”</text:p>
        </text:list-item>
      </text:list>
      <text:h text:style-name="Heading_20_3" text:outline-level="3"><text:bookmark-start text:name="lerede-bastardo-del-culto"/>L’Erede Bastardo del Culto<text:bookmark-end text:name="lerede-bastardo-del-culto"/></text:h>
      <text:p text:style-name="First_20_paragraph"><text:span text:style-name="T2">Porta nel sangue una divinità che non lo vuole.</text:span></text:p>
      <text:list text:style-name="L124">
        <text:list-item>
          <text:p text:style-name="P221"><text:span text:style-name="T1">Origine</text:span>: Doria o Fahya</text:p>
        </text:list-item>
        <text:list-item>
          <text:p text:style-name="P221"><text:span text:style-name="T1">Conflitto</text:span>: è l’unico testimone di un dogma dimenticato</text:p>
        </text:list-item>
        <text:list-item>
          <text:p text:style-name="P221"><text:span text:style-name="T1">Oggetto simbolico</text:span>: collana cerimoniale che si stringe ogni volta che mente</text:p>
        </text:list-item>
        <text:list-item>
          <text:p text:style-name="P221"><text:span text:style-name="T1">Voce</text:span>: “<text:span text:style-name="T2">Non è vero che gli dèi non esistono. È solo che nessuno li riconosce quando non si inginocchiano.</text:span>”</text:p>
        </text:list-item>
      </text:list>
      <text:h text:style-name="Heading_20_3" text:outline-level="3"><text:bookmark-start text:name="il-testimone-del-vuoto"/>Il Testimone del Vuoto<text:bookmark-end text:name="il-testimone-del-vuoto"/></text:h>
      <text:p text:style-name="First_20_paragraph"><text:span text:style-name="T2">Non ha visto nulla. Eppure, ora tutti lo ascoltano.</text:span></text:p>
      <text:list text:style-name="L125">
        <text:list-item>
          <text:p text:style-name="P222"><text:span text:style-name="T1">Origine</text:span>: qualsiasi frontiera</text:p>
        </text:list-item>
        <text:list-item>
          <text:p text:style-name="P222"><text:span text:style-name="T1">Conflitto</text:span>: ciò che ha <text:span text:style-name="T2">visto</text:span> potrebbe non essere reale. Ma cambia le cose.</text:p>
        </text:list-item>
        <text:list-item>
          <text:p text:style-name="P222"><text:span text:style-name="T1">Oggetto simbolico</text:span>: pezzo di vetro annerito che riflette solo quando è buio</text:p>
        </text:list-item>
        <text:list-item>
          <text:p text:style-name="P222"><text:span text:style-name="T1">Voce</text:span>: “<text:span text:style-name="T2">Non posso descriverlo. Ma posso portarci chi vuole sapere.</text:span>”</text:p>
        </text:list-item>
      </text:list>
      <text:h text:style-name="Heading_20_2" text:outline-level="2"><text:bookmark-start text:name="attivare-i-materiali"/>🝑 Attivare i materiali<text:bookmark-end text:name="attivare-i-materiali"/></text:h>
      <text:p text:style-name="First_20_paragraph"><text:span text:style-name="T2">Le cose non servono per quello che fanno. Servono per come cambiano chi le tocca.</text:span></text:p>
      <text:p text:style-name="P223">“<text:span text:style-name="T2">Non tutti gli oggetti sono utili. Alcuni sono inevitabili.</text:span>”</text:p>
      <text:p text:style-name="First_20_paragraph">Tutti gli elementi presentati nella Parte III — le creature leggendarie, le reliquie contese, i frammenti marginali e le domande senza risposta — non sono pensati per essere “inseriti” in una storia. Sono <text:span text:style-name="T1">pesi che alterano l’equilibrio narrativo</text:span>, elementi che <text:span text:style-name="T1">cambiano la forma del mondo</text:span> appena vengono osservati.</text:p>
      <text:h text:style-name="Heading_20_3" text:outline-level="3"><text:bookmark-start text:name="creature-mitiche"/>Creature mitiche<text:bookmark-end text:name="creature-mitiche"/></text:h>
      <text:p text:style-name="First_20_paragraph">Non sono mostri da affrontare. Sono presagi, nodi di sogno, conseguenze in attesa. Chi le incontra raramente ne esce vittorioso — ma quasi sempre esce diverso.</text:p>
      <text:p text:style-name="Text_20_body"><text:span text:style-name="T1">Usi possibili:</text:span></text:p>
      <text:list text:style-name="L126">
        <text:list-item>
          <text:p text:style-name="P224">Presenza fuori scena (avvistamenti, tracce, sogni comuni).</text:p>
        </text:list-item>
        <text:list-item>
          <text:p text:style-name="P224">Entità rituale: una creatura appare <text:span text:style-name="T2">perché qualcosa è stato detto</text:span> o <text:span text:style-name="T2">non detto</text:span>.</text:p>
        </text:list-item>
        <text:list-item>
          <text:p text:style-name="P224">Interlocutore simbolico: non parla, ma risponde a gesti, errori, offerte.</text:p>
        </text:list-item>
        <text:list-item>
          <text:p text:style-name="P224">Verifica morale: reagisce alla verità, alla paura o alla fede.</text:p>
        </text:list-item>
      </text:list>
      <text:p text:style-name="P225"><text:span text:style-name="T2">Esempio</text:span>: un grifone d’oro sorvola la città nel giorno della proclamazione di un nuovo governante. È un buon segno? Solo se nessuno finge di crederlo.</text:p>
      <text:h text:style-name="Heading_20_3" text:outline-level="3"><text:bookmark-start text:name="reliquie-e-oggetti-leggendari"/>Reliquie e oggetti leggendari<text:bookmark-end text:name="reliquie-e-oggetti-leggendari"/></text:h>
      <text:p text:style-name="First_20_paragraph">Non servono per quello che fanno. Servono per quello che implicano. Alcuni danno potere, altri attirano conseguenze. Nessuno è mai neutrale.</text:p>
      <text:p text:style-name="Text_20_body"><text:span text:style-name="T1">Usi possibili:</text:span></text:p>
      <text:list text:style-name="L127">
        <text:list-item>
          <text:p text:style-name="P226">MacGuffin narrativo: intere fazioni si muovono solo perché l’oggetto <text:span text:style-name="T2">potrebbe</text:span> esistere.</text:p>
        </text:list-item>
        <text:list-item>
          <text:p text:style-name="P226">Oggetto morale: attivabile solo da chi ha fatto qualcosa di irreversibile.</text:p>
        </text:list-item>
        <text:list-item>
          <text:p text:style-name="P226">Bugia rituale: si sa che è falso, ma distruggerlo romperebbe un equilibrio.</text:p>
        </text:list-item>
        <text:list-item>
          <text:p text:style-name="P226">Rivelatore: l’oggetto mostra qualcosa <text:span text:style-name="T2">non del mondo, ma di chi lo usa</text:span>.</text:p>
        </text:list-item>
      </text:list>
      <text:p text:style-name="P227"><text:span text:style-name="T2">Esempio</text:span>: un amuleto che protegge solo chi non ha mai tradito. I personaggi lo ricevono… ma a chi funziona davvero?</text:p>
      <text:h text:style-name="Heading_20_3" text:outline-level="3"><text:bookmark-start text:name="frammenti-e-marginalia-1"/>Frammenti e marginalia<text:bookmark-end text:name="frammenti-e-marginalia-1"/></text:h>
      <text:p text:style-name="First_20_paragraph">Non servono a spiegare. Servono a disturbare. Sono l’equivalente narrativo di un sussurro nel momento sbagliato. Una frase di troppo. Un documento che qualcuno voleva dimenticare.</text:p>
      <text:p text:style-name="Text_20_body"><text:span text:style-name="T1">Usi possibili:</text:span></text:p>
      <text:list text:style-name="L128">
        <text:list-item>
          <text:p text:style-name="P228">Epigrafe di sessione: apre con un tono che altera ogni scena.</text:p>
        </text:list-item>
        <text:list-item>
          <text:p text:style-name="P228">Indizio ambiguo: contraddice la narrazione ufficiale.</text:p>
        </text:list-item>
        <text:list-item>
          <text:p text:style-name="P228">Ricordo sopravvissuto: trovato in una rovina o in una biblioteca censurata.</text:p>
        </text:list-item>
        <text:list-item>
          <text:p text:style-name="P228">Specchio narrativo: parla indirettamente del personaggio o del gruppo.</text:p>
        </text:list-item>
      </text:list>
      <text:p text:style-name="P229"><text:span text:style-name="T2">Esempio</text:span>: un graffito su una parete “Non è questa la città. È solo la sua memoria.”</text:p>
      <text:h text:style-name="Heading_20_3" text:outline-level="3"><text:bookmark-start text:name="domande-aperte"/>Domande aperte<text:bookmark-end text:name="domande-aperte"/></text:h>
      <text:p text:style-name="First_20_paragraph">Non devono essere risolte. Devono essere scelte. Ogni campagna può rispondere diversamente — e la risposta cambia il Marethar.</text:p>
      <text:p text:style-name="Text_20_body"><text:span text:style-name="T1">Usi possibili:</text:span></text:p>
      <text:list text:style-name="L129">
        <text:list-item>
          <text:p text:style-name="P230">Motore tematico: la campagna nasce attorno a una domanda.</text:p>
        </text:list-item>
        <text:list-item>
          <text:p text:style-name="P230">Rivelazione parziale: la risposta compare… ma in una forma che nessuno capisce.</text:p>
        </text:list-item>
        <text:list-item>
          <text:p text:style-name="P230">Innesco di fazioni: ogni gruppo ha una risposta diversa, e vuole imporla.</text:p>
        </text:list-item>
        <text:list-item>
          <text:p text:style-name="P230">Chiave mistica: la domanda <text:span text:style-name="T2">è</text:span> il rituale. Chi la pronuncia, cambia le cose.</text:p>
        </text:list-item>
      </text:list>
      <text:p text:style-name="P231"><text:span text:style-name="T2">Esempio</text:span>: “Cos’è Shahin?” Se la risposta è <text:span text:style-name="T2">memoria condivisa</text:span>, allora chi mente rompe il culto.</text:p>
      <text:h text:style-name="Heading_20_2" text:outline-level="2"><text:bookmark-start text:name="avventure-e-campagne"/>🝰 Avventure e Campagne<text:bookmark-end text:name="avventure-e-campagne"/></text:h>
      <text:p text:style-name="First_20_paragraph"><text:span text:style-name="T1">Descrizione:</text:span> Questo capitolo offre suggerimenti per avventure e campagne ambientate nel Marethar, fornendo spunti narrativi, trame e missioni per i giocatori. Le idee presentate coprono una vasta gamma di temi, dall’esplorazione e l’avventura alla diplomazia e al conflitto, offrendo ai giocatori l’opportunità di immergersi profondamente nel mondo del Marethar.</text:p>
      <text:h text:style-name="Heading_20_3" text:outline-level="3"><text:bookmark-start text:name="idee-per-avventure"/><text:span text:style-name="T1">Idee per Avventure</text:span><text:bookmark-end text:name="idee-per-avventure"/></text:h>
      <text:h text:style-name="Heading_20_4" text:outline-level="4"><text:bookmark-start text:name="la-caccia-al-tesoro-di-thalassia"/>La Caccia al Tesoro di Thalassia<text:bookmark-end text:name="la-caccia-al-tesoro-di-thalassia"/></text:h>
      <text:list text:style-name="L130">
        <text:list-item>
          <text:p text:style-name="P232"><text:span text:style-name="T1">Spunto:</text:span> I giocatori ricevono una mappa che conduce a un antico tesoro nascosto nelle profondità delle acque di Thalassia.</text:p>
        </text:list-item>
        <text:list-item>
          <text:p text:style-name="P232"><text:span text:style-name="T1">Obiettivi:</text:span> Decifrare la mappa, navigare attraverso acque infestate da pirati e mostri marini, trovare e recuperare il tesoro.</text:p>
        </text:list-item>
      </text:list>
      <text:h text:style-name="Heading_20_4" text:outline-level="4"><text:bookmark-start text:name="la-rivolta-dei-minatori-di-orethia"/>La Rivolta dei Minatori di Orethia<text:bookmark-end text:name="la-rivolta-dei-minatori-di-orethia"/></text:h>
      <text:list text:style-name="L131">
        <text:list-item>
          <text:p text:style-name="P233"><text:span text:style-name="T1">Spunto:</text:span> I minatori delle montagne di Orethia si ribellano contro le dure condizioni di lavoro, e i giocatori vengono incaricati di risolvere il conflitto.</text:p>
        </text:list-item>
        <text:list-item>
          <text:p text:style-name="P233"><text:span text:style-name="T1">Obiettivi:</text:span> Negoziare con i ribelli, investigare le condizioni di lavoro, trovare una soluzione pacifica o reprimere la rivolta.</text:p>
        </text:list-item>
      </text:list>
      <text:h text:style-name="Heading_20_4" text:outline-level="4"><text:bookmark-start text:name="il-segreto-di-meshdad"/>Il Segreto di Meshdad<text:bookmark-end text:name="il-segreto-di-meshdad"/></text:h>
      <text:list text:style-name="L132">
        <text:list-item>
          <text:p text:style-name="P234"><text:span text:style-name="T1">Spunto:</text:span> Voci di una potente artefatto magico nascosto nelle paludi di Meshdad attirano l’attenzione dei giocatori.</text:p>
        </text:list-item>
        <text:list-item>
          <text:p text:style-name="P234"><text:span text:style-name="T1">Obiettivi:</text:span> Esplorare le paludi, svelare antichi segreti, confrontarsi con guardiani magici e rivali.</text:p>
        </text:list-item>
      </text:list>
      <text:h text:style-name="Heading_20_3" text:outline-level="3"><text:bookmark-start text:name="trame-e-missioni"/><text:span text:style-name="T1">Trame e Missioni</text:span><text:bookmark-end text:name="trame-e-missioni"/></text:h>
      <text:h text:style-name="Heading_20_4" text:outline-level="4"><text:bookmark-start text:name="la-guerra-delle-spezie"/>La Guerra delle Spezie<text:bookmark-end text:name="la-guerra-delle-spezie"/></text:h>
      <text:list text:style-name="L133">
        <text:list-item>
          <text:p text:style-name="P235"><text:span text:style-name="T1">Trama:</text:span> Due nazioni rivali, Meshdad e Rashia, entrano in conflitto per il controllo delle rotte commerciali delle spezie.</text:p>
        </text:list-item>
        <text:list-item>
          <text:p text:style-name="P235"><text:span text:style-name="T1">Missioni:</text:span> Proteggere i convogli di spezie, sabotare le operazioni nemiche, negoziare alleanze e trattati di pace, combattere in battaglie decisive.</text:p>
        </text:list-item>
      </text:list>
      <text:h text:style-name="Heading_20_4" text:outline-level="4"><text:bookmark-start text:name="il-culto-di-shahin"/>Il Culto di Shahin<text:bookmark-end text:name="il-culto-di-shahin"/></text:h>
      <text:list text:style-name="L134">
        <text:list-item>
          <text:p text:style-name="P236"><text:span text:style-name="T1">Trama:</text:span> Una setta radicale all’interno della Setta di Shahin minaccia di destabilizzare l’equilibrio politico di Aridonia.</text:p>
        </text:list-item>
        <text:list-item>
          <text:p text:style-name="P236"><text:span text:style-name="T1">Missioni:</text:span> Infiltrarsi nella setta, scoprire i piani segreti, prevenire un colpo di stato, eliminare i leader radicali.</text:p>
        </text:list-item>
      </text:list>
      <text:h text:style-name="Heading_20_4" text:outline-level="4"><text:bookmark-start text:name="la-conquista-di-dajilia"/>La Conquista di Dajilia<text:bookmark-end text:name="la-conquista-di-dajilia"/></text:h>
      <text:list text:style-name="L135">
        <text:list-item>
          <text:p text:style-name="P237"><text:span text:style-name="T1">Trama:</text:span> L’Impero Rashiano pianifica l’invasione del Principato di Dajilia, e i giocatori devono difendere il regno.</text:p>
        </text:list-item>
        <text:list-item>
          <text:p text:style-name="P237"><text:span text:style-name="T1">Missioni:</text:span> Fortificare le difese, sabotare l’avanzata nemica, reclutare alleati, partecipare a battaglie strategiche.</text:p>
        </text:list-item>
      </text:list>
      <text:h text:style-name="Heading_20_3" text:outline-level="3"><text:bookmark-start text:name="personaggi-non-giocanti-png"/><text:span text:style-name="T1">Personaggi Non Giocanti (PNG)</text:span><text:bookmark-end text:name="personaggi-non-giocanti-png"/></text:h>
      <text:h text:style-name="Heading_20_4" text:outline-level="4"><text:bookmark-start text:name="gran-sacerdote-khalil"/>Gran Sacerdote Khalil<text:bookmark-end text:name="gran-sacerdote-khalil"/></text:h>
      <text:list text:style-name="L136">
        <text:list-item>
          <text:p text:style-name="P238"><text:span text:style-name="T1">Ruolo:</text:span> Leader spirituale della Setta di Shahin.</text:p>
        </text:list-item>
        <text:list-item>
          <text:p text:style-name="P238"><text:span text:style-name="T1">Descrizione:</text:span> Saggio e carismatico, Khalil è rispettato e temuto. La sua saggezza è leggendaria, e la sua influenza si estende ben oltre i confini di Aridonia.</text:p>
        </text:list-item>
        <text:list-item>
          <text:p text:style-name="P238"><text:span text:style-name="T1">Obiettivi:</text:span> Mantenere l’unità della setta, prevenire conflitti interni, guidare il popolo verso la prosperità spirituale.</text:p>
        </text:list-item>
      </text:list>
      <text:h text:style-name="Heading_20_4" text:outline-level="4"><text:bookmark-start text:name="comandante-zara"/>Comandante Zara<text:bookmark-end text:name="comandante-zara"/></text:h>
      <text:list text:style-name="L137">
        <text:list-item>
          <text:p text:style-name="P239"><text:span text:style-name="T1">Ruolo:</text:span> Leader delle Truppe Ombra di Linia.</text:p>
        </text:list-item>
        <text:list-item>
          <text:p text:style-name="P239"><text:span text:style-name="T1">Descrizione:</text:span> Abile stratega e guerriera formidabile, Zara è conosciuta per la sua determinazione e il suo coraggio.</text:p>
        </text:list-item>
        <text:list-item>
          <text:p text:style-name="P239"><text:span text:style-name="T1">Obiettivi:</text:span> Proteggere l’impero, condurre operazioni segrete, addestrare nuovi membri delle Truppe Ombra.</text:p>
        </text:list-item>
      </text:list>
      <text:h text:style-name="Heading_20_4" text:outline-level="4"><text:bookmark-start text:name="mercante-rashid"/>Mercante Rashid<text:bookmark-end text:name="mercante-rashid"/></text:h>
      <text:list text:style-name="L138">
        <text:list-item>
          <text:p text:style-name="P240"><text:span text:style-name="T1">Ruolo:</text:span> Ricco mercante di spezie di Meshdad.</text:p>
        </text:list-item>
        <text:list-item>
          <text:p text:style-name="P240"><text:span text:style-name="T1">Descrizione:</text:span> Astuto e ambizioso, Rashid è sempre alla ricerca di nuove opportunità commerciali.</text:p>
        </text:list-item>
        <text:list-item>
          <text:p text:style-name="P240"><text:span text:style-name="T1">Obiettivi:</text:span> Espandere la sua rete commerciale, accumulare ricchezza, influenzare le politiche locali a suo favore.</text:p>
        </text:list-item>
      </text:list>
      <text:h text:style-name="Heading_20_3" text:outline-level="3"><text:bookmark-start text:name="luoghi-interessanti-e-pericolosi"/><text:span text:style-name="T1">Luoghi Interessanti e Pericolosi</text:span><text:bookmark-end text:name="luoghi-interessanti-e-pericolosi"/></text:h>
      <text:h text:style-name="Heading_20_4" text:outline-level="4"><text:bookmark-start text:name="le-rovine-di-alasia"/>Le Rovine di Alasia<text:bookmark-end text:name="le-rovine-di-alasia"/></text:h>
      <text:list text:style-name="L139">
        <text:list-item>
          <text:p text:style-name="P241"><text:span text:style-name="T1">Descrizione:</text:span> Antiche rovine situate su un’isola vicino alla città-stato di Allasia, ricche di storia e misteri.</text:p>
        </text:list-item>
        <text:list-item>
          <text:p text:style-name="P241"><text:span text:style-name="T1">Pericoli:</text:span> Creature mitiche, trappole ancestrali, competizione con altri avventurieri.</text:p>
        </text:list-item>
        <text:list-item>
          <text:p text:style-name="P241"><text:span text:style-name="T1">Ricompense:</text:span> Tesori nascosti, artefatti magici, conoscenze perdute.</text:p>
        </text:list-item>
      </text:list>
      <text:h text:style-name="Heading_20_4" text:outline-level="4"><text:bookmark-start text:name="la-foresta-di-linia"/>La Foresta di Linia<text:bookmark-end text:name="la-foresta-di-linia"/></text:h>
      <text:list text:style-name="L140">
        <text:list-item>
          <text:p text:style-name="P242"><text:span text:style-name="T1">Descrizione:</text:span> Una vasta foresta nell’Impero di Linia, conosciuta per la sua densa vegetazione e fauna variegata.</text:p>
        </text:list-item>
        <text:list-item>
          <text:p text:style-name="P242"><text:span text:style-name="T1">Pericoli:</text:span> Animali selvatici, spiriti della foresta, condizioni climatiche avverse.</text:p>
        </text:list-item>
        <text:list-item>
          <text:p text:style-name="P242"><text:span text:style-name="T1">Ricompense:</text:span> Erbe medicinali rare, legname prezioso, segreti naturali.</text:p>
        </text:list-item>
      </text:list>
      <text:h text:style-name="Heading_20_4" text:outline-level="4"><text:bookmark-start text:name="le-miniere-di-ferro-di-orethia"/>Le Miniere di Ferro di Orethia<text:bookmark-end text:name="le-miniere-di-ferro-di-orethia"/></text:h>
      <text:list text:style-name="L141">
        <text:list-item>
          <text:p text:style-name="P243"><text:span text:style-name="T1">Descrizione:</text:span> Miniere profonde e labirintiche situate nelle montagne di Orethia, ricche di minerali preziosi.</text:p>
        </text:list-item>
        <text:list-item>
          <text:p text:style-name="P243"><text:span text:style-name="T1">Pericoli:</text:span> Crolli, creature sotterranee, rivalità tra minatori.</text:p>
        </text:list-item>
        <text:list-item>
          <text:p text:style-name="P243"><text:span text:style-name="T1">Ricompense:</text:span> Minerali preziosi, antichi artefatti nascosti, tecnologia mineraria avanzata.</text:p>
        </text:list-item>
      </text:list>
      <text:h text:style-name="Heading_20_4" text:outline-level="4"><text:bookmark-start text:name="la-cittadella-fluviale-di-dor"/>La Cittadella Fluviale di Dor<text:bookmark-end text:name="la-cittadella-fluviale-di-dor"/></text:h>
      <text:list text:style-name="L142">
        <text:list-item>
          <text:p text:style-name="P244"><text:span text:style-name="T1">Descrizione:</text:span> Una maestosa cittadella situata lungo il grande fiume Dor, cuore dell’Impero Doriano.</text:p>
        </text:list-item>
        <text:list-item>
          <text:p text:style-name="P244"><text:span text:style-name="T1">Pericoli:</text:span> Guardie imperiali, intrighi politici, magie fluviali.</text:p>
        </text:list-item>
        <text:list-item>
          <text:p text:style-name="P244"><text:span text:style-name="T1">Ricompense:</text:span> Accesso a potenti alleati, risorse fluviali, segreti della magia dell’acqua.</text:p>
        </text:list-item>
      </text:list>
      <text:h text:style-name="Heading_20_1" text:outline-level="1"><text:bookmark-start text:name="parte-v---codice-delle-terre-note"/>🝖 Parte V - Codice delle Terre Note<text:bookmark-end text:name="parte-v---codice-delle-terre-note"/></text:h>
      <text:p text:style-name="First_20_paragraph"><text:span text:style-name="T2">Compendio utile a chi cammina senza mappa certa</text:span></text:p>
      <text:p text:style-name="P245">“<text:span text:style-name="T2">Ogni luogo ha almeno tre nomi: quello che gli diedero i suoi primi abitanti, quello che gli imposero i vincitori, e quello che si dice sottovoce tra chi non ha mai lasciato le sue strade.</text:span>”</text:p>
      <text:p text:style-name="First_20_paragraph">Questo Codice non contiene la verità. Contiene <text:span text:style-name="T1">le cose che si possono dire senza che il mondo cambi forma mentre le si nomina</text:span>. È una raccolta di voci, dati, titoli, ruoli, confini disegnati male ma ancora in uso. Le terre qui descritte <text:span text:style-name="T1">non sono fisse</text:span>, ma <text:span text:style-name="T1">note</text:span>: appoggiate su testimonianze ripetute, usi, appunti superstiti, e su ciò che più spesso è stato sussurrato uguale in luoghi diversi.</text:p>
      <text:p text:style-name="Text_20_body">È pensato per chi deve orientarsi — nel gioco, nella parola, nella trama. Per chi cerca un punto d’appoggio prima di entrare in scena. Non serve leggerlo tutto. Serve <text:span text:style-name="T1">sfogliarlo quando manca un nome, una tensione, un pretesto</text:span>.</text:p>
      <text:p text:style-name="Text_20_body">Contiene:</text:p>
      <text:list text:style-name="L143">
        <text:list-item>
          <text:p text:style-name="P246">luoghi noti e confusi;</text:p>
        </text:list-item>
        <text:list-item>
          <text:p text:style-name="P246">culti diffusi e contestati;</text:p>
        </text:list-item>
        <text:list-item>
          <text:p text:style-name="P246">eventi registrati e negati;</text:p>
        </text:list-item>
        <text:list-item>
          <text:p text:style-name="P246">poteri definiti dal loro uso, più che dalla loro origine.</text:p>
        </text:list-item>
      </text:list>
      <text:p text:style-name="First_20_paragraph"><text:span text:style-name="T1">Usatelo come base. Ma dubitatene sempre.</text:span> Ogni codice è scritto in un momento in cui il mondo tace. Ma il Marethar non tace mai a lungo.</text:p>
      <text:h text:style-name="Heading_20_2" text:outline-level="2"><text:bookmark-start text:name="le-culture-del-marethar"/>🜄 Le culture del Marethar<text:bookmark-end text:name="le-culture-del-marethar"/></text:h>
      <text:h text:style-name="Heading_20_3" text:outline-level="3"><text:bookmark-start text:name="aridonia"/>Aridonia<text:bookmark-end text:name="aridonia"/></text:h>
      <text:p text:style-name="First_20_paragraph"><text:span text:style-name="T1">Nome della Cultura:</text:span> Aridoniania</text:p>
      <text:p text:style-name="Text_20_body"><text:span text:style-name="T1">Informazioni di Base:</text:span></text:p>
      <text:list text:style-name="L144">
        <text:list-item>
          <text:p text:style-name="P247"><text:span text:style-name="T1">Origini:</text:span> Gli Aridonianii discendono dalle antiche tribù nomadi che abitavano le pianure e i deserti del Marethar. Queste tribù si sono evolute in società più strutturate e sofisticate con il passare dei secoli, mantenendo tuttavia molte delle loro tradizioni ancestrali.</text:p>
        </text:list-item>
        <text:list-item>
          <text:p text:style-name="P247"><text:span text:style-name="T1">Lingua Principale:</text:span> Aridonianio</text:p>
        </text:list-item>
        <text:list-item>
          <text:p text:style-name="P247"><text:span text:style-name="T1">Popolazione Totale:</text:span> 14,401,227</text:p>
        </text:list-item>
      </text:list>
      <text:p text:style-name="First_20_paragraph"><text:span text:style-name="T1">Informazioni Culturali:</text:span></text:p>
      <text:list text:style-name="L145">
        <text:list-item>
          <text:p text:style-name="P248"><text:span text:style-name="T1">Tradizioni Principali:</text:span> Le tradizioni Aridonianie sono profondamente radicate nella vita nomade e nelle pratiche di sopravvivenza nel deserto. La celebrazione del Solstizio d’Estate, durante la quale le tribù si riuniscono per festeggiare con danze, canti e gare di resistenza, è uno degli eventi più importanti dell’anno. La cultura Aridoniania pone grande enfasi sull’onore, la famiglia e la comunità.</text:p>
        </text:list-item>
        <text:list-item>
          <text:p text:style-name="P248"><text:span text:style-name="T1">Feste e Celebrazioni:</text:span> Oltre al Solstizio d’Estate, gli Aridoniani celebrano l’Anno del Leone, una festa che si tiene ogni dodici anni per onorare la forza e il coraggio, simbolizzati dal leone del deserto. La Cerimonia della Sabbia è un altro rituale importante, in cui i giovani adulti dimostrano la loro maturità attraverso una serie di prove fisiche e mentali.</text:p>
        </text:list-item>
        <text:list-item>
          <text:p text:style-name="P248"><text:span text:style-name="T1">Struttura Sociale:</text:span> La società Aridoniania è organizzata in clan e tribù, ciascuna guidata da un capo tribù eletto. Il consiglio dei capi tribù si riunisce regolarmente per prendere decisioni importanti a livello regionale. Le donne Aridonianie godono di grande rispetto e spesso occupano posizioni di potere all’interno delle tribù.</text:p>
        </text:list-item>
        <text:list-item>
          <text:p text:style-name="P248"><text:span text:style-name="T1">Arte e Architettura:</text:span> L’arte Aridoniania è nota per le sue intricate decorazioni in metallo e gioielli, spesso adornati con pietre preziose e motivi tribali. L’architettura è caratterizzata da strutture di adobe e tende decorate con tessuti vivaci. Le città-oasi fungono da centri culturali e commerciali.</text:p>
        </text:list-item>
      </text:list>
      <text:p text:style-name="First_20_paragraph"><text:span text:style-name="T1">Informazioni Religiose:</text:span></text:p>
      <text:list text:style-name="L146">
        <text:list-item>
          <text:p text:style-name="P249"><text:span text:style-name="T1">Religione Principale:</text:span></text:p>
          <text:list text:style-name="L147">
            <text:list-item>
              <text:p text:style-name="P250"><text:span text:style-name="T1">Nome della Religione:</text:span> Setta di Shahin</text:p>
            </text:list-item>
            <text:list-item>
              <text:p text:style-name="P250"><text:span text:style-name="T1">Divinità Suprema:</text:span> Shahin, il Dio dell’Albero</text:p>
            </text:list-item>
            <text:list-item>
              <text:p text:style-name="P250"><text:span text:style-name="T1">Descrizione:</text:span> La Setta di Shahin venera Shahin, una divinità che rappresenta la vita, la crescita e la protezione. La religione è caratterizzata da un forte senso comunitario e da pratiche mistico-religiose che enfatizzano l’armonia con la natura e gli spiriti ancestrali.</text:p>
            </text:list-item>
            <text:list-item>
              <text:p text:style-name="P250"><text:span text:style-name="T1">Numero di Fedeli:</text:span> 5,909,228</text:p>
            </text:list-item>
          </text:list>
        </text:list-item>
        <text:list-item>
          <text:p text:style-name="P249"><text:span text:style-name="T1">Religioni Minori:</text:span></text:p>
          <text:list text:style-name="L148">
            <text:list-item>
              <text:p text:style-name="P251"><text:span text:style-name="T1">Nome della Religione:</text:span> Credenze di Golat</text:p>
            </text:list-item>
            <text:list-item>
              <text:p text:style-name="P251"><text:span text:style-name="T1">Divinità Suprema:</text:span> Golat, la Pantera Gialla</text:p>
            </text:list-item>
            <text:list-item>
              <text:p text:style-name="P251"><text:span text:style-name="T1">Descrizione:</text:span> Le Credenze di Golat si focalizzano sullo sciamanesimo, con Golat come divinità suprema. I fedeli eseguono rituali sciamanici per comunicare con gli spiriti e ottenere protezione e saggezza.</text:p>
            </text:list-item>
            <text:list-item>
              <text:p text:style-name="P251"><text:span text:style-name="T1">Numero di Fedeli:</text:span> 1,445,255</text:p>
            </text:list-item>
          </text:list>
        </text:list-item>
      </text:list>
      <text:p text:style-name="First_20_paragraph"><text:span text:style-name="T1">Informazioni Tecnologiche:</text:span></text:p>
      <text:list text:style-name="L149">
        <text:list-item>
          <text:p text:style-name="P252"><text:span text:style-name="T1">Livello Tecnologico Generale:</text:span> Medio</text:p>
        </text:list-item>
        <text:list-item>
          <text:p text:style-name="P252"><text:span text:style-name="T1">Tecnologie Chiave:</text:span> Avanzate tecniche di metallurgia e lavorazione del bronzo, ingegneria idraulica per l’irrigazione delle oasi, e sofisticate armi da fuoco e cannoni.</text:p>
        </text:list-item>
        <text:list-item>
          <text:p text:style-name="P252"><text:span text:style-name="T1">Innovazioni Importanti:</text:span> Gli Aridoniani sono noti per i loro sistemi di irrigazione avanzati che permettono l’agricoltura nel deserto, e per le loro tecniche di estrazione e lavorazione dei metalli, particolarmente il bronzo e l’argento.</text:p>
        </text:list-item>
      </text:list>
      <text:h text:style-name="Heading_20_3" text:outline-level="3"><text:bookmark-start text:name="aurelia"/>Aurelia<text:bookmark-end text:name="aurelia"/></text:h>
      <text:p text:style-name="First_20_paragraph"><text:span text:style-name="T1">Nome della Cultura:</text:span> Aureliana</text:p>
      <text:p text:style-name="Text_20_body"><text:span text:style-name="T1">Informazioni di Base:</text:span></text:p>
      <text:list text:style-name="L150">
        <text:list-item>
          <text:p text:style-name="P253"><text:span text:style-name="T1">Origini:</text:span> Gli Aureliani discendono da un antico impero che dominava la regione centrale del Marethar. Con il tempo, hanno assorbito influenze culturali da popoli confinanti, creando una civiltà ricca e complessa.</text:p>
        </text:list-item>
        <text:list-item>
          <text:p text:style-name="P253"><text:span text:style-name="T1">Lingua Principale:</text:span> Aureliano</text:p>
        </text:list-item>
        <text:list-item>
          <text:p text:style-name="P253"><text:span text:style-name="T1">Popolazione Totale:</text:span> 3,095,627</text:p>
        </text:list-item>
      </text:list>
      <text:p text:style-name="First_20_paragraph"><text:span text:style-name="T1">Informazioni Culturali:</text:span></text:p>
      <text:list text:style-name="L151">
        <text:list-item>
          <text:p text:style-name="P254"><text:span text:style-name="T1">Tradizioni Principali:</text:span> La cultura aureliana è fortemente influenzata dall’eredità imperiale. Le celebrazioni delle vittorie militari, i giochi pubblici e le feste in onore degli dei sono comuni. La Settimana delle Lanterne, un evento che celebra l’arte e la scienza con spettacoli di luci e conferenze pubbliche, è un appuntamento annuale molto atteso.</text:p>
        </text:list-item>
        <text:list-item>
          <text:p text:style-name="P254"><text:span text:style-name="T1">Feste e Celebrazioni:</text:span> Le feste religiose come il Dies Natalis (giorno di nascita degli dei principali) e il Lupercalia (festa della purificazione e della fertilità) sono celebrate con grande fervore. Il Carnevale dell’Eterna Gloria è un evento annuale che celebra la cultura e le tradizioni aureliane con parate, spettacoli teatrali e banchetti.</text:p>
        </text:list-item>
        <text:list-item>
          <text:p text:style-name="P254"><text:span text:style-name="T1">Struttura Sociale:</text:span> La società aureliana è stratificata, con una chiara divisione tra la nobiltà, i cittadini comuni e gli schiavi. Tuttavia, la mobilità sociale è possibile attraverso il servizio militare e l’acquisizione di ricchezza. Le donne di rango nobile possono detenere notevoli influenze politiche e culturali.</text:p>
        </text:list-item>
        <text:list-item>
          <text:p text:style-name="P254"><text:span text:style-name="T1">Arte e Architettura:</text:span> L’arte aureliana è conosciuta per i suoi affreschi, mosaici e statue, spesso raffiguranti scene mitologiche e storiche. L’architettura combina elementi classici con innovazioni recenti, come archi monumentali, cupole e anfiteatri.</text:p>
        </text:list-item>
      </text:list>
      <text:p text:style-name="First_20_paragraph"><text:span text:style-name="T1">Informazioni Religiose:</text:span></text:p>
      <text:list text:style-name="L152">
        <text:list-item>
          <text:p text:style-name="P255"><text:span text:style-name="T1">Religione Principale:</text:span></text:p>
          <text:list text:style-name="L153">
            <text:list-item>
              <text:p text:style-name="P256"><text:span text:style-name="T1">Nome della Religione:</text:span> Fede di Pulbium</text:p>
            </text:list-item>
            <text:list-item>
              <text:p text:style-name="P256"><text:span text:style-name="T1">Divinità Suprema:</text:span> Pulbium, l’Antico</text:p>
            </text:list-item>
            <text:list-item>
              <text:p text:style-name="P256"><text:span text:style-name="T1">Descrizione:</text:span> La Fede di Pulbium venera l’Antico come simbolo di saggezza e protezione. I rituali sciamanici e la venerazione degli antenati sono parte integrante della pratica religiosa.</text:p>
            </text:list-item>
            <text:list-item>
              <text:p text:style-name="P256"><text:span text:style-name="T1">Numero di Fedeli:</text:span> 24,860</text:p>
            </text:list-item>
          </text:list>
        </text:list-item>
        <text:list-item>
          <text:p text:style-name="P255"><text:span text:style-name="T1">Religioni Minori:</text:span></text:p>
          <text:list text:style-name="L154">
            <text:list-item>
              <text:p text:style-name="P257"><text:span text:style-name="T1">Nome della Religione:</text:span> Druidi di Dimilalica</text:p>
            </text:list-item>
            <text:list-item>
              <text:p text:style-name="P257"><text:span text:style-name="T1">Divinità Suprema:</text:span> Dimilalica, il Giaguaro dell’Estate</text:p>
            </text:list-item>
            <text:list-item>
              <text:p text:style-name="P257"><text:span text:style-name="T1">Descrizione:</text:span> Questa religione celebra la natura e i cicli stagionali, con rituali che onorano il sole e la terra. I Druidi di Dimilalica praticano il culto della natura attraverso cerimonie sacre e preghiere.</text:p>
            </text:list-item>
            <text:list-item>
              <text:p text:style-name="P257"><text:span text:style-name="T1">Numero di Fedeli:</text:span> 2,330</text:p>
            </text:list-item>
          </text:list>
        </text:list-item>
      </text:list>
      <text:p text:style-name="First_20_paragraph"><text:span text:style-name="T1">Informazioni Tecnologiche:</text:span></text:p>
      <text:list text:style-name="L155">
        <text:list-item>
          <text:p text:style-name="P258"><text:span text:style-name="T1">Livello Tecnologico Generale:</text:span> Alto</text:p>
        </text:list-item>
        <text:list-item>
          <text:p text:style-name="P258"><text:span text:style-name="T1">Tecnologie Chiave:</text:span> Ingegneria avanzata, architettura monumentale, tecniche agricole e di irrigazione avanzate, e sofisticate armi da fuoco e artiglieria.</text:p>
        </text:list-item>
        <text:list-item>
          <text:p text:style-name="P258"><text:span text:style-name="T1">Innovazioni Importanti:</text:span> Gli Aureliani sono noti per la costruzione di strade, acquedotti e anfiteatri, nonché per l’uso di tecniche avanzate nella produzione di armi e armature.</text:p>
        </text:list-item>
      </text:list>
      <text:h text:style-name="Heading_20_3" text:outline-level="3"><text:bookmark-start text:name="lysandria"/>Lysandria<text:bookmark-end text:name="lysandria"/></text:h>
      <text:p text:style-name="First_20_paragraph"><text:span text:style-name="T1">Nome della Cultura:</text:span> Lysandriana</text:p>
      <text:p text:style-name="Text_20_body"><text:span text:style-name="T1">Informazioni di Base:</text:span></text:p>
      <text:list text:style-name="L156">
        <text:list-item>
          <text:p text:style-name="P259"><text:span text:style-name="T1">Origini:</text:span> I Lysandriani derivano dalle antiche città-stato che fiorirono lungo le coste del Marethar. La loro storia è ricca di commerci marittimi e esplorazioni, portandoli a diventare una delle culture più influenti della regione.</text:p>
        </text:list-item>
        <text:list-item>
          <text:p text:style-name="P259"><text:span text:style-name="T1">Lingua Principale:</text:span> Lysandrico</text:p>
        </text:list-item>
        <text:list-item>
          <text:p text:style-name="P259"><text:span text:style-name="T1">Popolazione Totale:</text:span> 3,020,137</text:p>
        </text:list-item>
      </text:list>
      <text:p text:style-name="First_20_paragraph"><text:span text:style-name="T1">Informazioni Culturali:</text:span></text:p>
      <text:list text:style-name="L157">
        <text:list-item>
          <text:p text:style-name="P260"><text:span text:style-name="T1">Tradizioni Principali:</text:span> Le tradizioni lysandriane ruotano intorno al commercio, alla navigazione e all’esplorazione. Le competizioni navali, i giochi sportivi e le celebrazioni delle scoperte sono eventi comuni. La cultura celebra l’arte della navigazione e l’astuzia commerciale.</text:p>
        </text:list-item>
        <text:list-item>
          <text:p text:style-name="P260"><text:span text:style-name="T1">Feste e Celebrazioni:</text:span> Il Festival del Mare è la festa più importante, dove le città-stato si sfidano in gare navali e festeggiano con banchetti e spettacoli pirotecnici. La Giornata del Mercante celebra le tradizioni commerciali con mercati aperti e scambi culturali.</text:p>
        </text:list-item>
        <text:list-item>
          <text:p text:style-name="P260"><text:span text:style-name="T1">Struttura Sociale:</text:span> La società lysandriana è composta da una classe mercantile dominante, cittadini liberi e schiavi. Le città-stato sono governate da consigli di anziani o oligarchie mercantili. Le donne partecipano attivamente al commercio e possono ricoprire ruoli di rilievo nelle città-stato.</text:p>
        </text:list-item>
        <text:list-item>
          <text:p text:style-name="P260"><text:span text:style-name="T1">Arte e Architettura:</text:span> L’arte lysandriana è nota per le sue elaborate sculture navali, affreschi marini e mosaici. L’architettura è caratterizzata da edifici con facciate ornate e porti ben progettati. Le città-stato sono famose per i loro maestosi templi e mercati vivaci.</text:p>
        </text:list-item>
      </text:list>
      <text:p text:style-name="First_20_paragraph"><text:span text:style-name="T1">Informazioni Religiose:</text:span></text:p>
      <text:list text:style-name="L158">
        <text:list-item>
          <text:p text:style-name="P261"><text:span text:style-name="T1">Religione Principale:</text:span></text:p>
          <text:list text:style-name="L159">
            <text:list-item>
              <text:p text:style-name="P262"><text:span text:style-name="T1">Nome della Religione:</text:span> Fede di Lysandria</text:p>
            </text:list-item>
            <text:list-item>
              <text:p text:style-name="P262"><text:span text:style-name="T1">Divinità Suprema:</text:span> Thalassos, il Dio del Mare</text:p>
            </text:list-item>
            <text:list-item>
              <text:p text:style-name="P262"><text:span text:style-name="T1">Descrizione:</text:span> La Fede di Lysandria venera Thalassos, il Dio del Mare, considerato il protettore dei marinai e dei mercanti. I rituali includono offerte di pesce e oggetti preziosi gettati in mare per assicurarsi la protezione divina durante i viaggi.</text:p>
            </text:list-item>
            <text:list-item>
              <text:p text:style-name="P262"><text:span text:style-name="T1">Numero di Fedeli:</text:span> 2,000,000</text:p>
            </text:list-item>
          </text:list>
        </text:list-item>
        <text:list-item>
          <text:p text:style-name="P261"><text:span text:style-name="T1">Religioni Minori:</text:span></text:p>
          <text:list text:style-name="L160">
            <text:list-item>
              <text:p text:style-name="P263"><text:span text:style-name="T1">Nome della Religione:</text:span> Culto di Nautilos</text:p>
            </text:list-item>
            <text:list-item>
              <text:p text:style-name="P263"><text:span text:style-name="T1">Divinità Suprema:</text:span> Nautilos, il Signore delle Onde</text:p>
            </text:list-item>
            <text:list-item>
              <text:p text:style-name="P263"><text:span text:style-name="T1">Descrizione:</text:span> Il Culto di Nautilos è una religione minoritaria che adora Nautilos, il Signore delle Onde. I fedeli credono che Nautilos controlli le maree e possa portare prosperità o distruzione. I rituali includono preghiere e canti rituali vicino al mare.</text:p>
            </text:list-item>
            <text:list-item>
              <text:p text:style-name="P263"><text:span text:style-name="T1">Numero di Fedeli:</text:span> 1,020,137</text:p>
            </text:list-item>
          </text:list>
        </text:list-item>
      </text:list>
      <text:p text:style-name="First_20_paragraph"><text:span text:style-name="T1">Informazioni Tecnologiche:</text:span></text:p>
      <text:list text:style-name="L161">
        <text:list-item>
          <text:p text:style-name="P264"><text:span text:style-name="T1">Livello Tecnologico Generale:</text:span> Alto</text:p>
        </text:list-item>
        <text:list-item>
          <text:p text:style-name="P264"><text:span text:style-name="T1">Tecnologie Chiave:</text:span> Tecniche avanzate di costruzione navale, strumenti di navigazione, architettura marittima e tecniche di commercio marittimo.</text:p>
        </text:list-item>
        <text:list-item>
          <text:p text:style-name="P264"><text:span text:style-name="T1">Innovazioni Importanti:</text:span> I Lysandriani sono noti per la costruzione di navi rapide e resistenti, lo sviluppo di mappe nautiche dettagliate e la creazione di fari avanzati per guidare le navi nei porti.</text:p>
        </text:list-item>
      </text:list>
      <text:h text:style-name="Heading_20_3" text:outline-level="3"><text:bookmark-start text:name="naharim-1"/>Naharim<text:bookmark-end text:name="naharim-1"/></text:h>
      <text:p text:style-name="First_20_paragraph"><text:span text:style-name="T1">Nome della Cultura:</text:span> Naharim</text:p>
      <text:p text:style-name="Text_20_body"><text:span text:style-name="T1">Informazioni di Base:</text:span></text:p>
      <text:list text:style-name="L162">
        <text:list-item>
          <text:p text:style-name="P265"><text:span text:style-name="T1">Origini:</text:span> I Naharim sono una cultura fluviale che ha prosperato lungo i grandi fiumi del Marethar. La loro civiltà si è sviluppata attorno all’irrigazione e all’agricoltura intensiva, diventando uno dei centri più importanti della regione.</text:p>
        </text:list-item>
        <text:list-item>
          <text:p text:style-name="P265"><text:span text:style-name="T1">Lingua Principale:</text:span> Naharimico</text:p>
        </text:list-item>
        <text:list-item>
          <text:p text:style-name="P265"><text:span text:style-name="T1">Popolazione Totale:</text:span> 5,158,319</text:p>
        </text:list-item>
      </text:list>
      <text:p text:style-name="First_20_paragraph"><text:span text:style-name="T1">Informazioni Culturali:</text:span></text:p>
      <text:list text:style-name="L163">
        <text:list-item>
          <text:p text:style-name="P266"><text:span text:style-name="T1">Tradizioni Principali:</text:span> Le tradizioni naharimiche sono strettamente legate al ciclo del fiume e all’agricoltura. Le celebrazioni del raccolto e le festività in onore dei fiumi sono centrali nella loro cultura. La società naharimica pone grande enfasi sulla collaborazione comunitaria e sul rispetto per la natura.</text:p>
        </text:list-item>
        <text:list-item>
          <text:p text:style-name="P266"><text:span text:style-name="T1">Feste e Celebrazioni:</text:span> La Festa del Fiume, che segna l’inizio della stagione delle inondazioni, è la più grande celebrazione dell’anno. Durante questa festa, la popolazione si riunisce per ringraziare il fiume per la sua abbondanza e per fare offerte agli dei fluviali. La Festa del Raccolto è un’altra celebrazione importante, che include danze, canti e banchetti.</text:p>
        </text:list-item>
        <text:list-item>
          <text:p text:style-name="P266"><text:span text:style-name="T1">Struttura Sociale:</text:span> La società naharimica è organizzata in villaggi e città-stato governati da anziani e sacerdoti. La struttura sociale è egalitaria, con un forte senso di comunità e collaborazione.</text:p>
          <text:p text:style-name="P266">Le donne giocano un ruolo centrale nella gestione delle risorse agricole e nella vita spirituale.</text:p>
        </text:list-item>
        <text:list-item>
          <text:p text:style-name="P266"><text:span text:style-name="T1">Arte e Architettura:</text:span> L’arte naharimica è caratterizzata da intricati lavori di ceramica, tessuti riccamente decorati e murales che raffigurano scene di vita quotidiana e mitologica. L’architettura include templi monumentali, ponti e canali ingegnosamente progettati per l’irrigazione.</text:p>
        </text:list-item>
      </text:list>
      <text:p text:style-name="First_20_paragraph"><text:span text:style-name="T1">Informazioni Religiose:</text:span></text:p>
      <text:list text:style-name="L164">
        <text:list-item>
          <text:p text:style-name="P267"><text:span text:style-name="T1">Religione Principale:</text:span></text:p>
          <text:list text:style-name="L165">
            <text:list-item>
              <text:p text:style-name="P268"><text:span text:style-name="T1">Nome della Religione:</text:span> Culto di Dor</text:p>
            </text:list-item>
            <text:list-item>
              <text:p text:style-name="P268"><text:span text:style-name="T1">Divinità Suprema:</text:span> Dor, il Dio del Fiume</text:p>
            </text:list-item>
            <text:list-item>
              <text:p text:style-name="P268"><text:span text:style-name="T1">Descrizione:</text:span> Il Culto di Dor venera Dor, il Dio del Fiume, che è considerato la fonte di vita e prosperità per la civiltà naharimica. I rituali includono offerte di frutti, fiori e oggetti d’arte al fiume per assicurarsi il favore divino.</text:p>
            </text:list-item>
            <text:list-item>
              <text:p text:style-name="P268"><text:span text:style-name="T1">Numero di Fedeli:</text:span> 4,000,000</text:p>
            </text:list-item>
          </text:list>
        </text:list-item>
        <text:list-item>
          <text:p text:style-name="P267"><text:span text:style-name="T1">Religioni Minori:</text:span></text:p>
          <text:list text:style-name="L166">
            <text:list-item>
              <text:p text:style-name="P269"><text:span text:style-name="T1">Nome della Religione:</text:span> Fede degli Spiriti dell’Acqua</text:p>
            </text:list-item>
            <text:list-item>
              <text:p text:style-name="P269"><text:span text:style-name="T1">Divinità Suprema:</text:span> Naiad, la Regina delle Acque</text:p>
            </text:list-item>
            <text:list-item>
              <text:p text:style-name="P269"><text:span text:style-name="T1">Descrizione:</text:span> La Fede degli Spiriti dell’Acqua adora Naiad, la Regina delle Acque, e una serie di spiriti minori che abitano fiumi e sorgenti. I rituali includono cerimonie di purificazione e preghiere per la protezione delle acque.</text:p>
            </text:list-item>
            <text:list-item>
              <text:p text:style-name="P269"><text:span text:style-name="T1">Numero di Fedeli:</text:span> 1,158,319</text:p>
            </text:list-item>
          </text:list>
        </text:list-item>
      </text:list>
      <text:p text:style-name="First_20_paragraph"><text:span text:style-name="T1">Informazioni Tecnologiche:</text:span></text:p>
      <text:list text:style-name="L167">
        <text:list-item>
          <text:p text:style-name="P270"><text:span text:style-name="T1">Livello Tecnologico Generale:</text:span> Medio</text:p>
        </text:list-item>
        <text:list-item>
          <text:p text:style-name="P270"><text:span text:style-name="T1">Tecnologie Chiave:</text:span> Tecniche avanzate di irrigazione, ingegneria fluviale, agricoltura intensiva e costruzione di templi e infrastrutture idriche.</text:p>
        </text:list-item>
        <text:list-item>
          <text:p text:style-name="P270"><text:span text:style-name="T1">Innovazioni Importanti:</text:span> I Naharim sono noti per i loro sistemi di canali e dighe che controllano le inondazioni e migliorano la produttività agricola. Hanno anche sviluppato tecniche avanzate di conservazione del cibo e coltivazione intensiva.</text:p>
        </text:list-item>
      </text:list>
      <text:h text:style-name="Heading_20_3" text:outline-level="3"><text:bookmark-start text:name="orethia"/>Orethia<text:bookmark-end text:name="orethia"/></text:h>
      <text:p text:style-name="First_20_paragraph"><text:span text:style-name="T1">Nome della Cultura:</text:span> Orethiana</text:p>
      <text:p text:style-name="Text_20_body"><text:span text:style-name="T1">Informazioni di Base:</text:span></text:p>
      <text:list text:style-name="L168">
        <text:list-item>
          <text:p text:style-name="P271"><text:span text:style-name="T1">Origini:</text:span> Gli Orethiani derivano dalle antiche popolazioni montane che abitavano le regioni elevate del Marethar. La loro cultura si è evoluta attorno all’estrazione mineraria e alla produzione di armi, diventando una delle civiltà più militarizzate della regione.</text:p>
        </text:list-item>
        <text:list-item>
          <text:p text:style-name="P271"><text:span text:style-name="T1">Lingua Principale:</text:span> Orethiano</text:p>
        </text:list-item>
        <text:list-item>
          <text:p text:style-name="P271"><text:span text:style-name="T1">Popolazione Totale:</text:span> 1,888,322</text:p>
        </text:list-item>
      </text:list>
      <text:p text:style-name="First_20_paragraph"><text:span text:style-name="T1">Informazioni Culturali:</text:span></text:p>
      <text:list text:style-name="L169">
        <text:list-item>
          <text:p text:style-name="P272"><text:span text:style-name="T1">Tradizioni Principali:</text:span> Le tradizioni orethiane sono strettamente legate alla vita montana e alla guerra. Le cerimonie di iniziazione militare e le feste in onore degli dei della guerra sono eventi centrali. La cultura orethiana celebra la forza, il coraggio e la lealtà.</text:p>
        </text:list-item>
        <text:list-item>
          <text:p text:style-name="P272"><text:span text:style-name="T1">Feste e Celebrazioni:</text:span> La Festa del Guerriero, che onora gli eroi militari e celebra le vittorie in battaglia, è una delle più importanti. Durante questa festa, i partecipanti indossano armature cerimoniali e partecipano a gare di abilità marziali. La Festa della Forgiatura è un’altra celebrazione chiave, dedicata agli artigiani e alle loro creazioni.</text:p>
        </text:list-item>
        <text:list-item>
          <text:p text:style-name="P272"><text:span text:style-name="T1">Struttura Sociale:</text:span> La società orethiana è fortemente gerarchica, con una classe militare dominante e un rigido sistema di caste. I capi tribù e i signori della guerra detengono il potere, mentre gli artigiani e i minatori sono rispettati per le loro abilità. Le donne possono raggiungere posizioni di comando sia in ambito militare che sociale.</text:p>
        </text:list-item>
        <text:list-item>
          <text:p text:style-name="P272"><text:span text:style-name="T1">Arte e Architettura:</text:span> L’arte orethiana è caratterizzata da intricate lavorazioni in metallo, sculture di eroi e scene di battaglia. L’architettura comprende fortezze montane, castelli robusti e miniere ingegnosamente costruite. Le città sono spesso fortificate e costruite in pietra.</text:p>
        </text:list-item>
      </text:list>
      <text:p text:style-name="First_20_paragraph"><text:span text:style-name="T1">Informazioni Religiose:</text:span></text:p>
      <text:list text:style-name="L170">
        <text:list-item>
          <text:p text:style-name="P273"><text:span text:style-name="T1">Religione Principale:</text:span></text:p>
          <text:list text:style-name="L171">
            <text:list-item>
              <text:p text:style-name="P274"><text:span text:style-name="T1">Nome della Religione:</text:span> Fede di Tudeshkhast</text:p>
            </text:list-item>
            <text:list-item>
              <text:p text:style-name="P274"><text:span text:style-name="T1">Divinità Suprema:</text:span> Tudeshkhast, il Saggio Volante del Destino</text:p>
            </text:list-item>
            <text:list-item>
              <text:p text:style-name="P274"><text:span text:style-name="T1">Descrizione:</text:span> La Fede di Tudeshkhast è basata sul dualismo e venera Tudeshkhast come simbolo dell’equilibrio tra luce e oscurità, vita e morte. I rituali includono offerte e preghiere nei templi dedicati, situati sulle cime delle montagne.</text:p>
            </text:list-item>
            <text:list-item>
              <text:p text:style-name="P274"><text:span text:style-name="T1">Numero di Fedeli:</text:span> 6,012,780</text:p>
            </text:list-item>
          </text:list>
        </text:list-item>
        <text:list-item>
          <text:p text:style-name="P273"><text:span text:style-name="T1">Religioni Minori:</text:span></text:p>
          <text:list text:style-name="L172">
            <text:list-item>
              <text:p text:style-name="P275"><text:span text:style-name="T1">Nome della Religione:</text:span> Fede di Shemshahva</text:p>
            </text:list-item>
            <text:list-item>
              <text:p text:style-name="P275"><text:span text:style-name="T1">Divinità Suprema:</text:span> Shemshahva, il Cobra Marrone</text:p>
            </text:list-item>
            <text:list-item>
              <text:p text:style-name="P275"><text:span text:style-name="T1">Descrizione:</text:span> La Fede di Shemshahva è centrata sul culto degli antenati e sulla venerazione di Shemshahva. I rituali includono offerte agli antenati e preghiere per la guida e la protezione.</text:p>
            </text:list-item>
            <text:list-item>
              <text:p text:style-name="P275"><text:span text:style-name="T1">Numero di Fedeli:</text:span> 1,372,268</text:p>
            </text:list-item>
          </text:list>
        </text:list-item>
      </text:list>
      <text:p text:style-name="First_20_paragraph"><text:span text:style-name="T1">Informazioni Tecnologiche:</text:span></text:p>
      <text:list text:style-name="L173">
        <text:list-item>
          <text:p text:style-name="P276"><text:span text:style-name="T1">Livello Tecnologico Generale:</text:span> Medio-Alto</text:p>
        </text:list-item>
        <text:list-item>
          <text:p text:style-name="P276"><text:span text:style-name="T1">Tecnologie Chiave:</text:span> Tecniche avanzate di estrazione mineraria, lavorazione dei metalli, ingegneria militare e costruzione di fortificazioni.</text:p>
        </text:list-item>
        <text:list-item>
          <text:p text:style-name="P276"><text:span text:style-name="T1">Innovazioni Importanti:</text:span> Gli Orethiani sono noti per la creazione di armi e armature di alta qualità, l’uso di tecniche avanzate di estrazione mineraria e la costruzione di complessi sistemi di difesa montana.</text:p>
        </text:list-item>
      </text:list>
      <text:h text:style-name="Heading_20_3" text:outline-level="3"><text:bookmark-start text:name="thalassia"/>Thalassia<text:bookmark-end text:name="thalassia"/></text:h>
      <text:p text:style-name="First_20_paragraph"><text:span text:style-name="T1">Nome della Cultura:</text:span> Thalassiana</text:p>
      <text:p text:style-name="Text_20_body"><text:span text:style-name="T1">Informazioni di Base:</text:span></text:p>
      <text:list text:style-name="L174">
        <text:list-item>
          <text:p text:style-name="P277"><text:span text:style-name="T1">Origini:</text:span> I Thalassians derivano dalle antiche popolazioni costiere che abitavano le isole e le coste del Marethar. La loro cultura si è evoluta attorno al commercio marittimo, alla navigazione e alla pesca, diventando una delle potenze navali della regione.</text:p>
        </text:list-item>
        <text:list-item>
          <text:p text:style-name="P277"><text:span text:style-name="T1">Lingua Principale:</text:span> Thalassico</text:p>
        </text:list-item>
        <text:list-item>
          <text:p text:style-name="P277"><text:span text:style-name="T1">Popolazione Totale:</text:span> 3,611,967</text:p>
        </text:list-item>
      </text:list>
      <text:p text:style-name="First_20_paragraph"><text:span text:style-name="T1">Informazioni Culturali:</text:span></text:p>
      <text:list text:style-name="L175">
        <text:list-item>
          <text:p text:style-name="P278"><text:span text:style-name="T1">Tradizioni Principali:</text:span> Le tradizioni thalassiane sono profondamente radicate nella vita marinaresca e nel commercio. Le competizioni di vela, le feste in onore dei marinai e le celebrazioni delle grandi scoperte sono centrali nella loro cultura. La società thalassiana valorizza l’abilità nautica, l’ingegno commerciale e la collaborazione.</text:p>
        </text:list-item>
        <text:list-item>
          <text:p text:style-name="P278"><text:span text:style-name="T1">Feste e Celebrazioni:</text:span> Il Festival delle Onde è la celebrazione più importante, in cui le comunità costiere si riuniscono per festeggiare con gare di navigazione, banchetti di pesce e spettacoli pirotecnici. La Giornata del Commercio celebra le tradizioni mercantili con mercati aperti e scambi culturali.</text:p>
        </text:list-item>
        <text:list-item>
          <text:p text:style-name="P278"><text:span text:style-name="T1">Struttura Sociale:</text:span> La società thalassiana è composta da una classe mercantile dominante, marinai, pescatori e artigiani. Le città-stato sono governate da consigli di mercanti o oligarchie navali. Le donne possono ricoprire ruoli significativi nel commercio e nell’amministrazione delle città-stato.</text:p>
        </text:list-item>
        <text:list-item>
          <text:p text:style-name="P278"><text:span text:style-name="T1">Arte e Architettura:</text:span> L’arte thalassiana è nota per le sue intricate sculture navali, affreschi marini e mosaici. L’architettura comprende porti ben progettati, fari, magazzini e templi dedicati alle divinità del mare. Le città costiere sono caratterizzate da case colorate e vivaci mercati.</text:p>
        </text:list-item>
      </text:list>
      <text:p text:style-name="First_20_paragraph"><text:span text:style-name="T1">Informazioni Religiose:</text:span></text:p>
      <text:list text:style-name="L176">
        <text:list-item>
          <text:p text:style-name="P279"><text:span text:style-name="T1">Religione Principale:</text:span></text:p>
          <text:list text:style-name="L177">
            <text:list-item>
              <text:p text:style-name="P280"><text:span text:style-name="T1">Nome della Religione:</text:span> Spiriti di Thalaran</text:p>
            </text:list-item>
            <text:list-item>
              <text:p text:style-name="P280"><text:span text:style-name="T1">Divinità Suprema:</text:span> Thalaran, lo Spirito del Mare</text:p>
            </text:list-item>
            <text:list-item>
              <text:p text:style-name="P280"><text:span text:style-name="T1">Descrizione:</text:span> Gli Spiriti di Thalaran venerano Thalaran come protettore dei mari e delle acque. I rituali includono offerte di pesce e oggetti preziosi gettati in mare per assicurarsi la protezione durante i viaggi.</text:p>
            </text:list-item>
            <text:list-item>
              <text:p text:style-name="P280"><text:span text:style-name="T1">Numero di Fedeli:</text:span> 6,621,114</text:p>
            </text:list-item>
          </text:list>
        </text:list-item>
        <text:list-item>
          <text:p text:style-name="P279"><text:span text:style-name="T1">Religioni Minori:</text:span></text:p>
          <text:list text:style-name="L178">
            <text:list-item>
              <text:p text:style-name="P281"><text:span text:style-name="T1">Nome della Religione:</text:span> Culto di Carthara</text:p>
            </text:list-item>
            <text:list-item>
              <text:p text:style-name="P281"><text:span text:style-name="T1">Divinità Suprema:</text:span> Carthara, il Protettore dei Mercanti</text:p>
            </text:list-item>
            <text:list-item>
              <text:p text:style-name="P281"><text:span text:style-name="T1">Descrizione:</text:span> Il Culto di Carthara adora Carthara come divinità protettrice dei commercianti e dei viaggiatori marittimi. I fedeli offrono sacrifici e preghiere per ottenere prosperità e protezione.</text:p>
            </text:list-item>
            <text:list-item>
              <text:p text:style-name="P281"><text:span text:style-name="T1">Numero di Fedeli:</text:span> 1,630,629</text:p>
            </text:list-item>
          </text:list>
        </text:list-item>
      </text:list>
      <text:p text:style-name="First_20_paragraph"><text:span text:style-name="T1">Informazioni Tecnologiche:</text:span></text:p>
      <text:list text:style-name="L179">
        <text:list-item>
          <text:p text:style-name="P282"><text:span text:style-name="T1">Livello Tecnologico Generale:</text:span> Alto</text:p>
        </text:list-item>
        <text:list-item>
          <text:p text:style-name="P282"><text:span text:style-name="T1">Tecnologie Chiave:</text:span> Tecniche avanzate di costruzione navale, strumenti di navigazione, architettura portuale e tecniche di commercio marittimo.</text:p>
        </text:list-item>
        <text:list-item>
          <text:p text:style-name="P282"><text:span text:style-name="T1">Innovazioni Importanti:</text:span> I Thalassiani sono noti per la costruzione di navi rapide e resistenti, lo sviluppo di mappe nautiche dettagliate e la creazione di fari avanzati per guidare le navi nei porti.</text:p>
        </text:list-item>
      </text:list>
      <text:h text:style-name="Heading_20_2" text:outline-level="2"><text:bookmark-start text:name="le-nazioni-del-marethar"/>🝣 Le nazioni del Marethar<text:bookmark-end text:name="le-nazioni-del-marethar"/></text:h>
      <text:h text:style-name="Heading_20_3" text:outline-level="3"><text:bookmark-start text:name="principato-di-dajilia"/>Principato di Dajilia<text:bookmark-end text:name="principato-di-dajilia"/></text:h>
      <text:p text:style-name="First_20_paragraph"><text:span text:style-name="T1">Sistema Politico:</text:span></text:p>
      <text:list text:style-name="L180">
        <text:list-item>
          <text:p text:style-name="P283"><text:span text:style-name="T1">Tipo di Governo:</text:span> Principato</text:p>
        </text:list-item>
        <text:list-item>
          <text:p text:style-name="P283"><text:span text:style-name="T1">Capitale:</text:span> Nabad</text:p>
        </text:list-item>
        <text:list-item>
          <text:p text:style-name="P283"><text:span text:style-name="T1">Leader Attuale:</text:span> Principe Aram II</text:p>
        </text:list-item>
        <text:list-item>
          <text:p text:style-name="P283"><text:span text:style-name="T1">Struttura del Governo:</text:span> Monarchia ereditaria con un consiglio di anziani che consiglia il principe</text:p>
        </text:list-item>
      </text:list>
      <text:p text:style-name="First_20_paragraph"><text:span text:style-name="T1">Territori:</text:span></text:p>
      <text:list text:style-name="L181">
        <text:list-item>
          <text:p text:style-name="P284"><text:span text:style-name="T1">Area Totale (km²):</text:span> 734.784</text:p>
        </text:list-item>
        <text:list-item>
          <text:p text:style-name="P284"><text:span text:style-name="T1">Regioni Principali:</text:span> Alture di Nabad, Altopiani di Alak, Valli dei Venti</text:p>
        </text:list-item>
        <text:list-item>
          <text:p text:style-name="P284"><text:span text:style-name="T1">Confini Naturali:</text:span> Crinali rocciosi, zone umide stagionali, linee d’ombra vegetale</text:p>
        </text:list-item>
      </text:list>
      <text:p text:style-name="First_20_paragraph"><text:span text:style-name="T1">Cultura Dominante:</text:span></text:p>
      <text:list text:style-name="L182">
        <text:list-item>
          <text:p text:style-name="P285"><text:span text:style-name="T1">Nome della Cultura:</text:span> Aridoniani delle Praterie</text:p>
        </text:list-item>
        <text:list-item>
          <text:p text:style-name="P285"><text:span text:style-name="T1">Tradizioni e Costumi:</text:span> Vita semi-nomade, carovane rituali, celebrazioni solari e votive, forte senso del giuramento</text:p>
        </text:list-item>
        <text:list-item>
          <text:p text:style-name="P285"><text:span text:style-name="T1">Lingua Ufficiale:</text:span> Aridoniano</text:p>
        </text:list-item>
      </text:list>
      <text:p text:style-name="First_20_paragraph"><text:span text:style-name="T1">Risorse ed Economia:</text:span></text:p>
      <text:list text:style-name="L183">
        <text:list-item>
          <text:p text:style-name="P286"><text:span text:style-name="T1">Risorse Naturali Principali:</text:span> Rame, salgemma, erbe rituali</text:p>
        </text:list-item>
        <text:list-item>
          <text:p text:style-name="P286"><text:span text:style-name="T1">Industrie Principali:</text:span> Estrazione mineraria leggera, lavorazione del rame, allevamento transumante, commercio carovaniero</text:p>
        </text:list-item>
        <text:list-item>
          <text:p text:style-name="P286"><text:span text:style-name="T1">Commercio e Scambi:</text:span> Attivo con i territori centrali e orientali; le carovane rituali mantengono vive le rotte ancestrali</text:p>
        </text:list-item>
        <text:list-item>
          <text:p text:style-name="P286"><text:span text:style-name="T1">Moneta:</text:span> Dinaro di Dajilia</text:p>
        </text:list-item>
        <text:list-item>
          <text:p text:style-name="P286"><text:span text:style-name="T1">Descrizione Generale dell’Economia:</text:span> Economia mobile ma strutturata, fondata sul controllo dei passaggi e sulla ritualizzazione delle vie di scambio. L’agricoltura è limitata ma supportata da tecniche di irrigazione altopianese.</text:p>
        </text:list-item>
      </text:list>
      <text:p text:style-name="First_20_paragraph"><text:span text:style-name="T1">Forze Militari:</text:span></text:p>
      <text:list text:style-name="L184">
        <text:list-item>
          <text:p text:style-name="P287"><text:span text:style-name="T1">Dimensione dell’Esercito:</text:span> Moderata</text:p>
        </text:list-item>
        <text:list-item>
          <text:p text:style-name="P287"><text:span text:style-name="T1">Struttura Militare:</text:span> Truppe leggere, cavalleria rapida, arcieri montani</text:p>
        </text:list-item>
        <text:list-item>
          <text:p text:style-name="P287"><text:span text:style-name="T1">Tecnologie e Armamenti:</text:span> Armi da fuoco leggere, archi compositi, armature flessibili</text:p>
        </text:list-item>
        <text:list-item>
          <text:p text:style-name="P287"><text:span text:style-name="T1">Flotta Navale:</text:span> Irrilevante; flotta fluviale e carovaniera</text:p>
        </text:list-item>
        <text:list-item>
          <text:p text:style-name="P287"><text:span text:style-name="T1">Strategie Militari:</text:span> Schermaglie mobili, controllo dei valichi, pattugliamenti simbolici</text:p>
        </text:list-item>
      </text:list>
      <text:p text:style-name="First_20_paragraph"><text:span text:style-name="T1">Informazioni Aggiuntive:</text:span></text:p>
      <text:list text:style-name="L185">
        <text:list-item>
          <text:p text:style-name="P288"><text:span text:style-name="T1">Relazioni Internazionali:</text:span> Neutrale con Rhithia, diffidenza storica verso Hamania, tensioni latenti con Rashia e Meshdad</text:p>
        </text:list-item>
        <text:list-item>
          <text:p text:style-name="P288"><text:span text:style-name="T1">Problemi Interni:</text:span> Frizioni interclaniche, tensioni su giuramenti non rispettati, controllo delle fonti d’acqua</text:p>
        </text:list-item>
        <text:list-item>
          <text:p text:style-name="P288"><text:span text:style-name="T1">Storia Breve:</text:span> Nacque come confederazione di clan fuggiti dal sud, mantenne la forma rituale delle carovane e si consolidò come Principato con capitale nelle alture. Ogni alleanza è fondata su parole pronunciate e ricordate.</text:p>
        </text:list-item>
      </text:list>
      <text:h text:style-name="Heading_20_3" text:outline-level="3"><text:bookmark-start text:name="impero-rashiano"/>Impero Rashiano<text:bookmark-end text:name="impero-rashiano"/></text:h>
      <text:p text:style-name="First_20_paragraph"><text:span text:style-name="T1">Sistema Politico:</text:span></text:p>
      <text:list text:style-name="L186">
        <text:list-item>
          <text:p text:style-name="P289"><text:span text:style-name="T1">Tipo di Governo:</text:span> Impero</text:p>
        </text:list-item>
        <text:list-item>
          <text:p text:style-name="P289"><text:span text:style-name="T1">Capitale:</text:span> Fahya</text:p>
        </text:list-item>
        <text:list-item>
          <text:p text:style-name="P289"><text:span text:style-name="T1">Leader Attuale:</text:span> Imperatore Khalid IV</text:p>
        </text:list-item>
        <text:list-item>
          <text:p text:style-name="P289"><text:span text:style-name="T1">Struttura del Governo:</text:span> Monarca assoluto con un consiglio di nobili e generali</text:p>
        </text:list-item>
      </text:list>
      <text:p text:style-name="First_20_paragraph"><text:span text:style-name="T1">Territori:</text:span></text:p>
      <text:list text:style-name="L187">
        <text:list-item>
          <text:p text:style-name="P290"><text:span text:style-name="T1">Area Totale (km²):</text:span> 3,193,456</text:p>
        </text:list-item>
        <text:list-item>
          <text:p text:style-name="P290"><text:span text:style-name="T1">Regioni Principali:</text:span> Pianure di Rashia, Foreste di Fahya, Montagne di Khaldun</text:p>
        </text:list-item>
        <text:list-item>
          <text:p text:style-name="P290"><text:span text:style-name="T1">Confini Naturali:</text:span> Deserti, montagne, fiumi</text:p>
        </text:list-item>
      </text:list>
      <text:p text:style-name="First_20_paragraph"><text:span text:style-name="T1">Cultura Dominante:</text:span></text:p>
      <text:list text:style-name="L188">
        <text:list-item>
          <text:p text:style-name="P291"><text:span text:style-name="T1">Nome della Cultura:</text:span> Aridoniani</text:p>
        </text:list-item>
        <text:list-item>
          <text:p text:style-name="P291"><text:span text:style-name="T1">Tradizioni e Costumi:</text:span> Vita semi-nomade, celebrazioni di conquiste militari, rigido codice d’onore</text:p>
        </text:list-item>
        <text:list-item>
          <text:p text:style-name="P291"><text:span text:style-name="T1">Lingua Ufficiale:</text:span> Aridonianio</text:p>
        </text:list-item>
      </text:list>
      <text:p text:style-name="First_20_paragraph"><text:span text:style-name="T1">Risorse ed Economia:</text:span></text:p>
      <text:list text:style-name="L189">
        <text:list-item>
          <text:p text:style-name="P292"><text:span text:style-name="T1">Risorse Naturali Principali:</text:span> Metalli preziosi, spezie, sale</text:p>
        </text:list-item>
        <text:list-item>
          <text:p text:style-name="P292"><text:span text:style-name="T1">Industrie Principali:</text:span> Estrazione mineraria, commercio di spezie, agricoltura irrigua</text:p>
        </text:list-item>
        <text:list-item>
          <text:p text:style-name="P292"><text:span text:style-name="T1">Commercio e Scambi:</text:span> Attivo commercio di metalli e spezie con altre nazioni</text:p>
        </text:list-item>
        <text:list-item>
          <text:p text:style-name="P292"><text:span text:style-name="T1">Moneta:</text:span> Dinaro Rashiano</text:p>
        </text:list-item>
        <text:list-item>
          <text:p text:style-name="P292"><text:span text:style-name="T1">Descrizione Generale dell’Economia:</text:span> Economia diversificata basata su risorse naturali, commercio e agricoltura irrigua. L’impero ha una forte rete commerciale.</text:p>
        </text:list-item>
      </text:list>
      <text:p text:style-name="First_20_paragraph"><text:span text:style-name="T1">Forze Militari:</text:span></text:p>
      <text:list text:style-name="L190">
        <text:list-item>
          <text:p text:style-name="P293"><text:span text:style-name="T1">Dimensione dell’Esercito:</text:span> Grande</text:p>
        </text:list-item>
        <text:list-item>
          <text:p text:style-name="P293"><text:span text:style-name="T1">Struttura Militare:</text:span> Esercito permanente con fanteria, cavalleria e artiglieria</text:p>
        </text:list-item>
        <text:list-item>
          <text:p text:style-name="P293"><text:span text:style-name="T1">Tecnologie e Armamenti:</text:span> Armi da fuoco, cannoni, armature pesanti</text:p>
        </text:list-item>
        <text:list-item>
          <text:p text:style-name="P293"><text:span text:style-name="T1">Flotta Navale:</text:span> Moderata, principalmente per il commercio</text:p>
        </text:list-item>
        <text:list-item>
          <text:p text:style-name="P293"><text:span text:style-name="T1">Strategie Militari:</text:span> Tattiche di assedio, difesa fortificata e attacchi su larga scala</text:p>
        </text:list-item>
      </text:list>
      <text:p text:style-name="First_20_paragraph"><text:span text:style-name="T1">Informazioni Aggiuntive:</text:span></text:p>
      <text:list text:style-name="L191">
        <text:list-item>
          <text:p text:style-name="P294"><text:span text:style-name="T1">Relazioni Internazionali:</text:span> Relazioni ostili con Dajilia, Meshdad e Hamania; alleanza con Doria</text:p>
        </text:list-item>
        <text:list-item>
          <text:p text:style-name="P294"><text:span text:style-name="T1">Problemi Interni:</text:span> Rivalità nobiliari e tensioni tra le province</text:p>
        </text:list-item>
        <text:list-item>
          <text:p text:style-name="P294"><text:span text:style-name="T1">Storia Breve:</text:span> Un tempo un insieme di tribù indipendenti, Rashia si è unificato sotto un unico impero che ha espanso il suo dominio grazie a campagne militari e matrimoni politici.</text:p>
        </text:list-item>
      </text:list>
      <text:h text:style-name="Heading_20_3" text:outline-level="3"><text:bookmark-start text:name="repubblica-di-meshdad"/>Repubblica di Meshdad<text:bookmark-end text:name="repubblica-di-meshdad"/></text:h>
      <text:p text:style-name="First_20_paragraph"><text:span text:style-name="T1">Sistema Politico:</text:span></text:p>
      <text:list text:style-name="L192">
        <text:list-item>
          <text:p text:style-name="P295"><text:span text:style-name="T1">Tipo di Governo:</text:span> Sultanato</text:p>
        </text:list-item>
        <text:list-item>
          <text:p text:style-name="P295"><text:span text:style-name="T1">Capitale:</text:span> Meshdad</text:p>
        </text:list-item>
        <text:list-item>
          <text:p text:style-name="P295"><text:span text:style-name="T1">Leader Attuale:</text:span> Sultano Farid II</text:p>
        </text:list-item>
        <text:list-item>
          <text:p text:style-name="P295"><text:span text:style-name="T1">Struttura del Governo:</text:span> Monarchia con un consiglio di visir e governatori provinciali</text:p>
        </text:list-item>
      </text:list>
      <text:p text:style-name="First_20_paragraph"><text:span text:style-name="T1">Territori:</text:span></text:p>
      <text:list text:style-name="L193">
        <text:list-item>
          <text:p text:style-name="P296"><text:span text:style-name="T1">Area Totale (km²):</text:span> 341,872</text:p>
        </text:list-item>
        <text:list-item>
          <text:p text:style-name="P296"><text:span text:style-name="T1">Regioni Principali:</text:span> Città di Meshdad, Deserto di Suleiman, Pianure di Tarik</text:p>
        </text:list-item>
        <text:list-item>
          <text:p text:style-name="P296"><text:span text:style-name="T1">Confini Naturali:</text:span> Deserti, pianure</text:p>
        </text:list-item>
      </text:list>
      <text:p text:style-name="First_20_paragraph"><text:span text:style-name="T1">Cultura Dominante:</text:span></text:p>
      <text:list text:style-name="L194">
        <text:list-item>
          <text:p text:style-name="P297"><text:span text:style-name="T1">Nome della Cultura:</text:span> Aridoniani</text:p>
        </text:list-item>
        <text:list-item>
          <text:p text:style-name="P297"><text:span text:style-name="T1">Tradizioni e Costumi:</text:span> Celebrazioni di eredità nomadica, feste delle spezie, mercati vivaci</text:p>
        </text:list-item>
        <text:list-item>
          <text:p text:style-name="P297"><text:span text:style-name="T1">Lingua Ufficiale:</text:span> Aridonianio</text:p>
        </text:list-item>
      </text:list>
      <text:p text:style-name="First_20_paragraph"><text:span text:style-name="T1">Risorse ed Economia:</text:span></text:p>
      <text:list text:style-name="L195">
        <text:list-item>
          <text:p text:style-name="P298"><text:span text:style-name="T1">Risorse Naturali Principali:</text:span> Spezie, metalli preziosi, tessuti</text:p>
        </text:list-item>
        <text:list-item>
          <text:p text:style-name="P298"><text:span text:style-name="T1">Industrie Principali:</text:span> Commercio di spezie, estrazione mineraria, produzione tessile</text:p>
        </text:list-item>
        <text:list-item>
          <text:p text:style-name="P298"><text:span text:style-name="T1">Commercio e Scambi:</text:span> Forte commercio con nazioni vicine e lontane, conosciuti per le loro spezie esotiche</text:p>
        </text:list-item>
        <text:list-item>
          <text:p text:style-name="P298"><text:span text:style-name="T1">Moneta:</text:span> Dinaro di Meshdad</text:p>
        </text:list-item>
        <text:list-item>
          <text:p text:style-name="P298"><text:span text:style-name="T1">Descrizione Generale dell’Economia:</text:span> Economia prospera grazie al commercio internazionale di spezie e tessuti, supportata dall’estrazione mineraria.</text:p>
        </text:list-item>
      </text:list>
      <text:p text:style-name="First_20_paragraph"><text:span text:style-name="T1">Forze Militari:</text:span></text:p>
      <text:list text:style-name="L196">
        <text:list-item>
          <text:p text:style-name="P299"><text:span text:style-name="T1">Dimensione dell’Esercito:</text:span> Moderata</text:p>
        </text:list-item>
        <text:list-item>
          <text:p text:style-name="P299"><text:span text:style-name="T1">Struttura Militare:</text:span> Milizia cittadina e truppe mercenarie</text:p>
        </text:list-item>
        <text:list-item>
          <text:p text:style-name="P299"><text:span text:style-name="T1">Tecnologie e Armamenti:</text:span> Armi da fuoco leggere, artiglieria, difese cittadine</text:p>
        </text:list-item>
        <text:list-item>
          <text:p text:style-name="P299"><text:span text:style-name="T1">Flotta Navale:</text:span> Limitata, principalmente per il commercio</text:p>
        </text:list-item>
        <text:list-item>
          <text:p text:style-name="P299"><text:span text:style-name="T1">Strategie Militari:</text:span> Difesa mobile, uso di truppe mercenarie per difesa e incursioni</text:p>
        </text:list-item>
      </text:list>
      <text:p text:style-name="First_20_paragraph"><text:span text:style-name="T1">Informazioni Aggiuntive:</text:span></text:p>
      <text:list text:style-name="L197">
        <text:list-item>
          <text:p text:style-name="P300"><text:span text:style-name="T1">Relazioni Internazionali:</text:span> Relazioni ostili con Dajilia, alleanze commerciali con altre nazioni</text:p>
        </text:list-item>
        <text:list-item>
          <text:p text:style-name="P300"><text:span text:style-name="T1">Problemi Interni:</text:span> Tensioni tra mercanti e nobiltà, gestione delle risorse idriche</text:p>
        </text:list-item>
        <text:list-item>
          <text:p text:style-name="P300"><text:span text:style-name="T1">Storia Breve:</text:span> Meshdad è cresciuta come un importante centro di commercio di spezie, diventando una delle città più ricche della regione grazie ai suoi mercanti intraprendenti.</text:p>
        </text:list-item>
      </text:list>
      <text:h text:style-name="Heading_20_3" text:outline-level="3"><text:bookmark-start text:name="granducato-di-hamania"/>Granducato di Hamania<text:bookmark-end text:name="granducato-di-hamania"/></text:h>
      <text:p text:style-name="First_20_paragraph"><text:span text:style-name="T1">Sistema Politico:</text:span></text:p>
      <text:list text:style-name="L198">
        <text:list-item>
          <text:p text:style-name="P301"><text:span text:style-name="T1">Tipo di Governo:</text:span> Satrapia</text:p>
        </text:list-item>
        <text:list-item>
          <text:p text:style-name="P301"><text:span text:style-name="T1">Capitale:</text:span> Busgalerey</text:p>
        </text:list-item>
        <text:list-item>
          <text:p text:style-name="P301"><text:span text:style-name="T1">Leader Attuale:</text:span> Granduca Arslan III</text:p>
        </text:list-item>
        <text:list-item>
          <text:p text:style-name="P301"><text:span text:style-name="T1">Struttura del Governo:</text:span> Monarchia con un consiglio di satrapi e capi tribù</text:p>
        </text:list-item>
      </text:list>
      <text:p text:style-name="First_20_paragraph"><text:span text:style-name="T1">Territori:</text:span></text:p>
      <text:list text:style-name="L199">
        <text:list-item>
          <text:p text:style-name="P302"><text:span text:style-name="T1">Area Totale (km²):</text:span> 402,480</text:p>
        </text:list-item>
        <text:list-item>
          <text:p text:style-name="P302"><text:span text:style-name="T1">Regioni Principali:</text:span> Pianure di Hamania, Deserto di Qadmath, Montagne di Karnak</text:p>
        </text:list-item>
        <text:list-item>
          <text:p text:style-name="P302"><text:span text:style-name="T1">Confini Naturali:</text:span> Deserti, montagne</text:p>
        </text:list-item>
      </text:list>
      <text:p text:style-name="First_20_paragraph"><text:span text:style-name="T1">Cultura Dominante:</text:span></text:p>
      <text:list text:style-name="L200">
        <text:list-item>
          <text:p text:style-name="P303"><text:span text:style-name="T1">Nome della Cultura:</text:span> Aridoniani</text:p>
        </text:list-item>
        <text:list-item>
          <text:p text:style-name="P303"><text:span text:style-name="T1">Tradizioni e Costumi:</text:span> Vita semi-nomade, celebrazioni di conquiste militari, rigido codice d’onore</text:p>
        </text:list-item>
        <text:list-item>
          <text:p text:style-name="P303"><text:span text:style-name="T1">Lingua Ufficiale:</text:span> Aridonianio</text:p>
        </text:list-item>
      </text:list>
      <text:p text:style-name="First_20_paragraph"><text:span text:style-name="T1">Risorse ed Economia:</text:span></text:p>
      <text:list text:style-name="L201">
        <text:list-item>
          <text:p text:style-name="P304"><text:span text:style-name="T1">Risorse Naturali Principali:</text:span> Metalli preziosi, spezie, sale</text:p>
        </text:list-item>
        <text:list-item>
          <text:p text:style-name="P304"><text:span text:style-name="T1">Industrie Principali:</text:span> Estrazione mineraria, commercio di spezie, agricoltura irrigua</text:p>
        </text:list-item>
        <text:list-item>
          <text:p text:style-name="P304"><text:span text:style-name="T1">Commercio e Scambi:</text:span> Attivo commercio di metalli e spezie con altre nazioni</text:p>
        </text:list-item>
        <text:list-item>
          <text:p text:style-name="P304"><text:span text:style-name="T1">Moneta:</text:span> Dinaro Hamaniano</text:p>
        </text:list-item>
        <text:list-item>
          <text:p text:style-name="P304"><text:span text:style-name="T1">Descrizione Generale dell’Economia:</text:span> Economia diversificata basata su risorse naturali, commercio e agricoltura irrigua. Il granducato ha una forte rete commerciale.</text:p>
        </text:list-item>
      </text:list>
      <text:p text:style-name="First_20_paragraph"><text:span text:style-name="T1">Forze Militari:</text:span></text:p>
      <text:list text:style-name="L202">
        <text:list-item>
          <text:p text:style-name="P305"><text:span text:style-name="T1">Dimensione dell’Esercito:</text:span> Grande</text:p>
        </text:list-item>
        <text:list-item>
          <text:p text:style-name="P305"><text:span text:style-name="T1">Struttura Militare:</text:span> Esercito permanente con fanteria, cavalleria e artiglieria</text:p>
        </text:list-item>
        <text:list-item>
          <text:p text:style-name="P305"><text:span text:style-name="T1">Tecnologie e Armamenti:</text:span> Armi da fuoco, cannoni, armature pesanti</text:p>
        </text:list-item>
        <text:list-item>
          <text:p text:style-name="P305"><text:span text:style-name="T1">Flotta Navale:</text:span> Moderata, principalmente per il commercio</text:p>
        </text:list-item>
        <text:list-item>
          <text:p text:style-name="P305"><text:span text:style-name="T1">Strategie Militari:</text:span> Tattiche di assedio, difesa</text:p>
        </text:list-item>
      </text:list>
      <text:p text:style-name="First_20_paragraph"><text:span text:style-name="T1">Strategie Militari:</text:span> Tattiche di assedio, difesa fortificata e attacchi su larga scala</text:p>
      <text:p text:style-name="Text_20_body"><text:span text:style-name="T1">Informazioni Aggiuntive:</text:span></text:p>
      <text:list text:style-name="L203">
        <text:list-item>
          <text:p text:style-name="P306"><text:span text:style-name="T1">Relazioni Internazionali:</text:span> Relazioni sospettose con Dajilia, alleanza con Rhithia, ostilità con Rashia e Meshdad</text:p>
        </text:list-item>
        <text:list-item>
          <text:p text:style-name="P306"><text:span text:style-name="T1">Problemi Interni:</text:span> Rivalità tra nobili e capi tribù, gestione delle risorse idriche</text:p>
        </text:list-item>
        <text:list-item>
          <text:p text:style-name="P306"><text:span text:style-name="T1">Storia Breve:</text:span> Hamania si è sviluppata come un potente granducato grazie alle sue risorse naturali e alla sua posizione strategica nel commercio. La sua storia è segnata da conflitti con vicini potenti e rivalità interne.</text:p>
        </text:list-item>
      </text:list>
      <text:h text:style-name="Heading_20_3" text:outline-level="3"><text:bookmark-start text:name="repubblica-di-premia"/>Repubblica di Premia<text:bookmark-end text:name="repubblica-di-premia"/></text:h>
      <text:p text:style-name="First_20_paragraph"><text:span text:style-name="T1">Sistema Politico:</text:span></text:p>
      <text:list text:style-name="L204">
        <text:list-item>
          <text:p text:style-name="P307"><text:span text:style-name="T1">Tipo di Governo:</text:span> Repubblica</text:p>
        </text:list-item>
        <text:list-item>
          <text:p text:style-name="P307"><text:span text:style-name="T1">Capitale:</text:span> Preiacoria</text:p>
        </text:list-item>
        <text:list-item>
          <text:p text:style-name="P307"><text:span text:style-name="T1">Leader Attuale:</text:span> Console Julia Verus</text:p>
        </text:list-item>
        <text:list-item>
          <text:p text:style-name="P307"><text:span text:style-name="T1">Struttura del Governo:</text:span> Repubblica elettiva con un senato e consoli eletti</text:p>
        </text:list-item>
      </text:list>
      <text:p text:style-name="First_20_paragraph"><text:span text:style-name="T1">Territori:</text:span></text:p>
      <text:list text:style-name="L205">
        <text:list-item>
          <text:p text:style-name="P308"><text:span text:style-name="T1">Area Totale (km²):</text:span> 456,352</text:p>
        </text:list-item>
        <text:list-item>
          <text:p text:style-name="P308"><text:span text:style-name="T1">Regioni Principali:</text:span> Piane di Preiacoria, Colline di Livia, Foresta di Aurel</text:p>
        </text:list-item>
        <text:list-item>
          <text:p text:style-name="P308"><text:span text:style-name="T1">Confini Naturali:</text:span> Fiumi, colline, foreste</text:p>
        </text:list-item>
      </text:list>
      <text:p text:style-name="First_20_paragraph"><text:span text:style-name="T1">Cultura Dominante:</text:span></text:p>
      <text:list text:style-name="L206">
        <text:list-item>
          <text:p text:style-name="P309"><text:span text:style-name="T1">Nome della Cultura:</text:span> Aurelia</text:p>
        </text:list-item>
        <text:list-item>
          <text:p text:style-name="P309"><text:span text:style-name="T1">Tradizioni e Costumi:</text:span> Celebrazioni delle vittorie militari, giochi pubblici, feste in onore degli dei</text:p>
        </text:list-item>
        <text:list-item>
          <text:p text:style-name="P309"><text:span text:style-name="T1">Lingua Ufficiale:</text:span> Aureliano</text:p>
        </text:list-item>
      </text:list>
      <text:p text:style-name="First_20_paragraph"><text:span text:style-name="T1">Risorse ed Economia:</text:span></text:p>
      <text:list text:style-name="L207">
        <text:list-item>
          <text:p text:style-name="P310"><text:span text:style-name="T1">Risorse Naturali Principali:</text:span> Metalli preziosi, legname, grano</text:p>
        </text:list-item>
        <text:list-item>
          <text:p text:style-name="P310"><text:span text:style-name="T1">Industrie Principali:</text:span> Agricoltura, estrazione mineraria, artigianato</text:p>
        </text:list-item>
        <text:list-item>
          <text:p text:style-name="P310"><text:span text:style-name="T1">Commercio e Scambi:</text:span> Forte commercio interno e con nazioni vicine</text:p>
        </text:list-item>
        <text:list-item>
          <text:p text:style-name="P310"><text:span text:style-name="T1">Moneta:</text:span> Denario Premiano</text:p>
        </text:list-item>
        <text:list-item>
          <text:p text:style-name="P310"><text:span text:style-name="T1">Descrizione Generale dell’Economia:</text:span> Economia basata sull’agricoltura, l’estrazione mineraria e il commercio. La repubblica gode di una stabilità economica grazie alle sue risorse naturali e alla sua organizzazione politica.</text:p>
        </text:list-item>
      </text:list>
      <text:p text:style-name="First_20_paragraph"><text:span text:style-name="T1">Forze Militari:</text:span></text:p>
      <text:list text:style-name="L208">
        <text:list-item>
          <text:p text:style-name="P311"><text:span text:style-name="T1">Dimensione dell’Esercito:</text:span> Moderata</text:p>
        </text:list-item>
        <text:list-item>
          <text:p text:style-name="P311"><text:span text:style-name="T1">Struttura Militare:</text:span> Milizia cittadina e legioni repubblicane</text:p>
        </text:list-item>
        <text:list-item>
          <text:p text:style-name="P311"><text:span text:style-name="T1">Tecnologie e Armamenti:</text:span> Armi da fuoco, artiglieria leggera, armature standard</text:p>
        </text:list-item>
        <text:list-item>
          <text:p text:style-name="P311"><text:span text:style-name="T1">Flotta Navale:</text:span> Limitata, principalmente per il commercio</text:p>
        </text:list-item>
        <text:list-item>
          <text:p text:style-name="P311"><text:span text:style-name="T1">Strategie Militari:</text:span> Difesa territoriale, uso strategico delle legioni</text:p>
        </text:list-item>
      </text:list>
      <text:p text:style-name="First_20_paragraph"><text:span text:style-name="T1">Informazioni Aggiuntive:</text:span></text:p>
      <text:list text:style-name="L209">
        <text:list-item>
          <text:p text:style-name="P312"><text:span text:style-name="T1">Relazioni Internazionali:</text:span> Relazioni amichevoli con Ashania e Linia, sospettose con Hamania</text:p>
        </text:list-item>
        <text:list-item>
          <text:p text:style-name="P312"><text:span text:style-name="T1">Problemi Interni:</text:span> Disuguaglianze sociali e tensioni politiche interne</text:p>
        </text:list-item>
        <text:list-item>
          <text:p text:style-name="P312"><text:span text:style-name="T1">Storia Breve:</text:span> Fondata come una repubblica libera, Premia ha prosperato grazie alla sua struttura politica stabile e alla sua economia diversificata. La sua storia è caratterizzata da alleanze strategiche e una forte identità repubblicana.</text:p>
        </text:list-item>
      </text:list>
      <text:h text:style-name="Heading_20_3" text:outline-level="3"><text:bookmark-start text:name="diarchia-di-ashania"/>Diarchia di Ashania<text:bookmark-end text:name="diarchia-di-ashania"/></text:h>
      <text:p text:style-name="First_20_paragraph"><text:span text:style-name="T1">Sistema Politico:</text:span></text:p>
      <text:list text:style-name="L210">
        <text:list-item>
          <text:p text:style-name="P313"><text:span text:style-name="T1">Tipo di Governo:</text:span> Diarchia</text:p>
        </text:list-item>
        <text:list-item>
          <text:p text:style-name="P313"><text:span text:style-name="T1">Capitale:</text:span> Durtus</text:p>
        </text:list-item>
        <text:list-item>
          <text:p text:style-name="P313"><text:span text:style-name="T1">Leader Attuale:</text:span> Re Athelstan e Regina Elara</text:p>
        </text:list-item>
        <text:list-item>
          <text:p text:style-name="P313"><text:span text:style-name="T1">Struttura del Governo:</text:span> Monarchia condivisa tra due sovrani, con un consiglio di nobili e saggi</text:p>
        </text:list-item>
      </text:list>
      <text:p text:style-name="First_20_paragraph"><text:span text:style-name="T1">Territori:</text:span></text:p>
      <text:list text:style-name="L211">
        <text:list-item>
          <text:p text:style-name="P314"><text:span text:style-name="T1">Area Totale (km²):</text:span> 99,440</text:p>
        </text:list-item>
        <text:list-item>
          <text:p text:style-name="P314"><text:span text:style-name="T1">Regioni Principali:</text:span> Valli di Durtus, Monti Elara, Foreste di Mirath</text:p>
        </text:list-item>
        <text:list-item>
          <text:p text:style-name="P314"><text:span text:style-name="T1">Confini Naturali:</text:span> Montagne, foreste</text:p>
        </text:list-item>
      </text:list>
      <text:p text:style-name="First_20_paragraph"><text:span text:style-name="T1">Cultura Dominante:</text:span></text:p>
      <text:list text:style-name="L212">
        <text:list-item>
          <text:p text:style-name="P315"><text:span text:style-name="T1">Nome della Cultura:</text:span> Aurelia</text:p>
        </text:list-item>
        <text:list-item>
          <text:p text:style-name="P315"><text:span text:style-name="T1">Tradizioni e Costumi:</text:span> Feste religiose, celebrazioni delle stagioni, giochi di corte</text:p>
        </text:list-item>
        <text:list-item>
          <text:p text:style-name="P315"><text:span text:style-name="T1">Lingua Ufficiale:</text:span> Aureliano</text:p>
        </text:list-item>
      </text:list>
      <text:p text:style-name="First_20_paragraph"><text:span text:style-name="T1">Risorse ed Economia:</text:span></text:p>
      <text:list text:style-name="L213">
        <text:list-item>
          <text:p text:style-name="P316"><text:span text:style-name="T1">Risorse Naturali Principali:</text:span> Minerali, legname, erbe medicinali</text:p>
        </text:list-item>
        <text:list-item>
          <text:p text:style-name="P316"><text:span text:style-name="T1">Industrie Principali:</text:span> Estrazione mineraria, produzione di legname, erboristeria</text:p>
        </text:list-item>
        <text:list-item>
          <text:p text:style-name="P316"><text:span text:style-name="T1">Commercio e Scambi:</text:span> Attivo commercio di minerali e legname con nazioni vicine</text:p>
        </text:list-item>
        <text:list-item>
          <text:p text:style-name="P316"><text:span text:style-name="T1">Moneta:</text:span> Corona Ashaniana</text:p>
        </text:list-item>
        <text:list-item>
          <text:p text:style-name="P316"><text:span text:style-name="T1">Descrizione Generale dell’Economia:</text:span> Economia basata sull’estrazione mineraria, la produzione di legname e l’erboristeria. La diarchia è conosciuta per i suoi prodotti di alta qualità e le sue erbe medicinali.</text:p>
        </text:list-item>
      </text:list>
      <text:p text:style-name="First_20_paragraph"><text:span text:style-name="T1">Forze Militari:</text:span></text:p>
      <text:list text:style-name="L214">
        <text:list-item>
          <text:p text:style-name="P317"><text:span text:style-name="T1">Dimensione dell’Esercito:</text:span> Piccola</text:p>
        </text:list-item>
        <text:list-item>
          <text:p text:style-name="P317"><text:span text:style-name="T1">Struttura Militare:</text:span> Guardia reale e milizie locali</text:p>
        </text:list-item>
        <text:list-item>
          <text:p text:style-name="P317"><text:span text:style-name="T1">Tecnologie e Armamenti:</text:span> Armi da fuoco leggere, armature leggere</text:p>
        </text:list-item>
        <text:list-item>
          <text:p text:style-name="P317"><text:span text:style-name="T1">Flotta Navale:</text:span> Nessuna</text:p>
        </text:list-item>
        <text:list-item>
          <text:p text:style-name="P317"><text:span text:style-name="T1">Strategie Militari:</text:span> Difesa territoriale, uso di guerriglia nelle foreste</text:p>
        </text:list-item>
      </text:list>
      <text:p text:style-name="First_20_paragraph"><text:span text:style-name="T1">Informazioni Aggiuntive:</text:span></text:p>
      <text:list text:style-name="L215">
        <text:list-item>
          <text:p text:style-name="P318"><text:span text:style-name="T1">Relazioni Internazionali:</text:span> Alleanza con Premia e Linia, relazioni sospettose con nazioni vicine</text:p>
        </text:list-item>
        <text:list-item>
          <text:p text:style-name="P318"><text:span text:style-name="T1">Problemi Interni:</text:span> Tensioni tra nobili e popolazione rurale</text:p>
        </text:list-item>
        <text:list-item>
          <text:p text:style-name="P318"><text:span text:style-name="T1">Storia Breve:</text:span> Ashania è nota per la sua struttura di governo unica, con due sovrani che condividono il potere. La diarchia ha mantenuto la pace interna attraverso un equilibrio delicato tra le fazioni nobiliari e rurali.</text:p>
        </text:list-item>
      </text:list>
      <text:h text:style-name="Heading_20_3" text:outline-level="3"><text:bookmark-start text:name="impero-di-linia"/>Impero di Linia<text:bookmark-end text:name="impero-di-linia"/></text:h>
      <text:p text:style-name="First_20_paragraph"><text:span text:style-name="T1">Sistema Politico:</text:span></text:p>
      <text:list text:style-name="L216">
        <text:list-item>
          <text:p text:style-name="P319"><text:span text:style-name="T1">Tipo di Governo:</text:span> Impero</text:p>
        </text:list-item>
        <text:list-item>
          <text:p text:style-name="P319"><text:span text:style-name="T1">Capitale:</text:span> Marnorum</text:p>
        </text:list-item>
        <text:list-item>
          <text:p text:style-name="P319"><text:span text:style-name="T1">Leader Attuale:</text:span> Imperatore Valerian III</text:p>
        </text:list-item>
        <text:list-item>
          <text:p text:style-name="P319"><text:span text:style-name="T1">Struttura del Governo:</text:span> Monarchia assoluta con un senato consultivo</text:p>
        </text:list-item>
      </text:list>
      <text:p text:style-name="First_20_paragraph"><text:span text:style-name="T1">Territori:</text:span></text:p>
      <text:list text:style-name="L217">
        <text:list-item>
          <text:p text:style-name="P320"><text:span text:style-name="T1">Area Totale (km²):</text:span> 3,745,584</text:p>
        </text:list-item>
        <text:list-item>
          <text:p text:style-name="P320"><text:span text:style-name="T1">Regioni Principali:</text:span> Piane di Marnorum, Monti Imperiali, Foreste di Linia</text:p>
        </text:list-item>
        <text:list-item>
          <text:p text:style-name="P320"><text:span text:style-name="T1">Confini Naturali:</text:span> Montagne, fiumi, foreste</text:p>
        </text:list-item>
      </text:list>
      <text:p text:style-name="First_20_paragraph"><text:span text:style-name="T1">Cultura Dominante:</text:span></text:p>
      <text:list text:style-name="L218">
        <text:list-item>
          <text:p text:style-name="P321"><text:span text:style-name="T1">Nome della Cultura:</text:span> Aurelia</text:p>
        </text:list-item>
        <text:list-item>
          <text:p text:style-name="P321"><text:span text:style-name="T1">Tradizioni e Costumi:</text:span> Celebrazioni imperiali, giochi gladiatori, feste religiose</text:p>
        </text:list-item>
        <text:list-item>
          <text:p text:style-name="P321"><text:span text:style-name="T1">Lingua Ufficiale:</text:span> Aureliano</text:p>
        </text:list-item>
      </text:list>
      <text:p text:style-name="First_20_paragraph"><text:span text:style-name="T1">Risorse ed Economia:</text:span></text:p>
      <text:list text:style-name="L219">
        <text:list-item>
          <text:p text:style-name="P322"><text:span text:style-name="T1">Risorse Naturali Principali:</text:span> Minerali, grano, vino</text:p>
        </text:list-item>
        <text:list-item>
          <text:p text:style-name="P322"><text:span text:style-name="T1">Industrie Principali:</text:span> Agricoltura, estrazione mineraria, produzione di vino</text:p>
        </text:list-item>
        <text:list-item>
          <text:p text:style-name="P322"><text:span text:style-name="T1">Commercio e Scambi:</text:span> Forte rete commerciale interna ed esterna</text:p>
        </text:list-item>
        <text:list-item>
          <text:p text:style-name="P322"><text:span text:style-name="T1">Moneta:</text:span> Sesterzio Liniano</text:p>
        </text:list-item>
        <text:list-item>
          <text:p text:style-name="P322"><text:span text:style-name="T1">Descrizione Generale dell’Economia:</text:span> Economia basata sull’agricoltura intensiva, l’estrazione mineraria e la produzione vinicola. Linia ha una delle economie più forti e diversificate della regione.</text:p>
        </text:list-item>
      </text:list>
      <text:p text:style-name="First_20_paragraph"><text:span text:style-name="T1">Forze Militari:</text:span></text:p>
      <text:list text:style-name="L220">
        <text:list-item>
          <text:p text:style-name="P323"><text:span text:style-name="T1">Dimensione dell’Esercito:</text:span> Grande</text:p>
        </text:list-item>
        <text:list-item>
          <text:p text:style-name="P323"><text:span text:style-name="T1">Struttura Militare:</text:span> Esercito permanente con legioni, cavalleria e artiglieria</text:p>
        </text:list-item>
        <text:list-item>
          <text:p text:style-name="P323"><text:span text:style-name="T1">Tecnologie e Armamenti:</text:span> Armi da fuoco avanzate, cannoni, armature pesanti</text:p>
        </text:list-item>
        <text:list-item>
          <text:p text:style-name="P323"><text:span text:style-name="T1">Flotta Navale:</text:span> Estesa, con navi da guerra e da commercio</text:p>
        </text:list-item>
        <text:list-item>
          <text:p text:style-name="P323"><text:span text:style-name="T1">Strategie Militari:</text:span> Tattiche di assedio, difesa fortificata e espansione territoriale</text:p>
        </text:list-item>
      </text:list>
      <text:p text:style-name="First_20_paragraph"><text:span text:style-name="T1">Informazioni Aggiuntive:</text:span></text:p>
      <text:list text:style-name="L221">
        <text:list-item>
          <text:p text:style-name="P324"><text:span text:style-name="T1">Relazioni Internazionali:</text:span> Alleanza con Premia e Ashania, relazioni ostili con Vallan</text:p>
        </text:list-item>
        <text:list-item>
          <text:p text:style-name="P324"><text:span text:style-name="T1">Problemi Interni:</text:span> Rivalità tra nobili e senatori, tensioni tra città e campagna</text:p>
        </text:list-item>
        <text:list-item>
          <text:p text:style-name="P324"><text:span text:style-name="T1">Storia Breve:</text:span> Linia è uno degli imperi più antichi e potenti del Marethar, conosciuto per le sue campagne militari di successo e la sua ricca cultura. L’impero ha mantenuto la sua influenza attraverso una combinazione di forza militare e diplomazia abile.</text:p>
        </text:list-item>
      </text:list>
      <text:h text:style-name="Heading_20_3" text:outline-level="3"><text:bookmark-start text:name="lega-rhithiana-1"/>Lega Rhithiana<text:bookmark-end text:name="lega-rhithiana-1"/></text:h>
      <text:p text:style-name="First_20_paragraph"><text:span text:style-name="T1">Sistema Politico:</text:span></text:p>
      <text:list text:style-name="L222">
        <text:list-item>
          <text:p text:style-name="P325"><text:span text:style-name="T1">Tipo di Governo:</text:span> Lega</text:p>
        </text:list-item>
        <text:list-item>
          <text:p text:style-name="P325"><text:span text:style-name="T1">Capitale:</text:span> Lurocedina</text:p>
        </text:list-item>
        <text:list-item>
          <text:p text:style-name="P325"><text:span text:style-name="T1">Leader Attuale:</text:span> Arconte Lysander</text:p>
        </text:list-item>
        <text:list-item>
          <text:p text:style-name="P325"><text:span text:style-name="T1">Struttura del Governo:</text:span> Confederazione di città-stato con un consiglio di arconti</text:p>
        </text:list-item>
      </text:list>
      <text:p text:style-name="First_20_paragraph"><text:span text:style-name="T1">Territori:</text:span></text:p>
      <text:list text:style-name="L223">
        <text:list-item>
          <text:p text:style-name="P326"><text:span text:style-name="T1">Area Totale (km²):</text:span> 1,552,864</text:p>
        </text:list-item>
        <text:list-item>
          <text:p text:style-name="P326"><text:span text:style-name="T1">Regioni Principali:</text:span> Città-stato di Lurocedina, Isole Rhithiane, Costa di Lysandria</text:p>
        </text:list-item>
        <text:list-item>
          <text:p text:style-name="P326"><text:span text:style-name="T1">Confini Naturali:</text:span> Coste, isole, colline</text:p>
        </text:list-item>
      </text:list>
      <text:p text:style-name="First_20_paragraph"><text:span text:style-name="T1">Cultura Dominante:</text:span></text:p>
      <text:list text:style-name="L224">
        <text:list-item>
          <text:p text:style-name="P327"><text:span text:style-name="T1">Nome della Cultura:</text:span> Lysandria</text:p>
        </text:list-item>
        <text:list-item>
          <text:p text:style-name="P327"><text:span text:style-name="T1">Tradizioni e Costumi:</text:span> Competizioni navali, feste mercantili, celebrazioni delle scoperte</text:p>
        </text:list-item>
        <text:list-item>
          <text:p text:style-name="P327"><text:span text:style-name="T1">Lingua Ufficiale:</text:span> Lysandrico</text:p>
        </text:list-item>
      </text:list>
      <text:p text:style-name="First_20_paragraph"><text:span text:style-name="T1">Risorse ed Economia:</text:span></text:p>
      <text:list text:style-name="L225">
        <text:list-item>
          <text:p text:style-name="P328"><text:span text:style-name="T1">Industrie Principali:</text:span> Pesca, commercio marittimo, costruzione navale</text:p>
        </text:list-item>
        <text:list-item>
          <text:p text:style-name="P328"><text:span text:style-name="T1">Commercio e Scambi:</text:span> Forte commercio marittimo con numerose rotte commerciali che attraversano Marethar</text:p>
        </text:list-item>
        <text:list-item>
          <text:p text:style-name="P328"><text:span text:style-name="T1">Moneta:</text:span> Dracma Rhithiana</text:p>
        </text:list-item>
        <text:list-item>
          <text:p text:style-name="P328"><text:span text:style-name="T1">Descrizione Generale dell’Economia:</text:span> L’economia della Lega Rhithiana è altamente dipendente dal commercio marittimo e dalla pesca. Le città-stato della lega sono centri di attività mercantile e costruzione navale, con mercati vivaci e porti ben sviluppati.</text:p>
        </text:list-item>
      </text:list>
      <text:p text:style-name="First_20_paragraph"><text:span text:style-name="T1">Forze Militari:</text:span></text:p>
      <text:list text:style-name="L226">
        <text:list-item>
          <text:p text:style-name="P329"><text:span text:style-name="T1">Dimensione dell’Esercito:</text:span> Moderata</text:p>
        </text:list-item>
        <text:list-item>
          <text:p text:style-name="P329"><text:span text:style-name="T1">Struttura Militare:</text:span> Milizie cittadine, guardie costiere e flotte navali</text:p>
        </text:list-item>
        <text:list-item>
          <text:p text:style-name="P329"><text:span text:style-name="T1">Tecnologie e Armamenti:</text:span> Navi da guerra avanzate, armi da fuoco leggere, cannoni navali</text:p>
        </text:list-item>
        <text:list-item>
          <text:p text:style-name="P329"><text:span text:style-name="T1">Flotta Navale:</text:span> Estesa, con numerose navi da guerra e mercantili</text:p>
        </text:list-item>
        <text:list-item>
          <text:p text:style-name="P329"><text:span text:style-name="T1">Strategie Militari:</text:span> Dominio navale, difesa costiera e protezione delle rotte commerciali</text:p>
        </text:list-item>
      </text:list>
      <text:p text:style-name="First_20_paragraph"><text:span text:style-name="T1">Informazioni Aggiuntive:</text:span></text:p>
      <text:list text:style-name="L227">
        <text:list-item>
          <text:p text:style-name="P330"><text:span text:style-name="T1">Relazioni Internazionali:</text:span> Relazioni sospettose con Dajilia, alleanza con Hamania, relazioni neutrali con altre nazioni</text:p>
        </text:list-item>
        <text:list-item>
          <text:p text:style-name="P330"><text:span text:style-name="T1">Problemi Interni:</text:span> Conflitti tra le città-stato per il controllo delle risorse e delle rotte commerciali</text:p>
        </text:list-item>
        <text:list-item>
          <text:p text:style-name="P330"><text:span text:style-name="T1">Storia Breve:</text:span> La Lega Rhithiana è nata come un’alleanza tra città-stato indipendenti per proteggere i loro interessi commerciali e difendersi dalle minacce esterne. La lega è diventata una delle potenze navali più importanti del Marethar.</text:p>
        </text:list-item>
      </text:list>
      <text:h text:style-name="Heading_20_3" text:outline-level="3"><text:bookmark-start text:name="impero-doriano"/>Impero Doriano<text:bookmark-end text:name="impero-doriano"/></text:h>
      <text:p text:style-name="First_20_paragraph"><text:span text:style-name="T1">Sistema Politico:</text:span></text:p>
      <text:list text:style-name="L228">
        <text:list-item>
          <text:p text:style-name="P331"><text:span text:style-name="T1">Tipo di Governo:</text:span> Impero</text:p>
        </text:list-item>
        <text:list-item>
          <text:p text:style-name="P331"><text:span text:style-name="T1">Capitale:</text:span> Dor</text:p>
        </text:list-item>
        <text:list-item>
          <text:p text:style-name="P331"><text:span text:style-name="T1">Leader Attuale:</text:span> Imperatore Anubis III</text:p>
        </text:list-item>
        <text:list-item>
          <text:p text:style-name="P331"><text:span text:style-name="T1">Struttura del Governo:</text:span> Monarchia assoluta con un consiglio di nobili e sacerdoti</text:p>
        </text:list-item>
      </text:list>
      <text:p text:style-name="First_20_paragraph"><text:span text:style-name="T1">Territori:</text:span></text:p>
      <text:list text:style-name="L229">
        <text:list-item>
          <text:p text:style-name="P332"><text:span text:style-name="T1">Area Totale (km²):</text:span> 1,839,872</text:p>
        </text:list-item>
        <text:list-item>
          <text:p text:style-name="P332"><text:span text:style-name="T1">Regioni Principali:</text:span> Valle del Dor, Pianure di Horus, Delta del Nilo</text:p>
        </text:list-item>
        <text:list-item>
          <text:p text:style-name="P332"><text:span text:style-name="T1">Confini Naturali:</text:span> Fiumi, delta, pianure</text:p>
        </text:list-item>
      </text:list>
      <text:p text:style-name="First_20_paragraph"><text:span text:style-name="T1">Cultura Dominante:</text:span></text:p>
      <text:list text:style-name="L230">
        <text:list-item>
          <text:p text:style-name="P333"><text:span text:style-name="T1">Nome della Cultura:</text:span> Naharim</text:p>
        </text:list-item>
        <text:list-item>
          <text:p text:style-name="P333"><text:span text:style-name="T1">Tradizioni e Costumi:</text:span> Celebrazioni fluviali, feste del raccolto, riti di inondazione</text:p>
        </text:list-item>
        <text:list-item>
          <text:p text:style-name="P333"><text:span text:style-name="T1">Lingua Ufficiale:</text:span> Naharimico</text:p>
        </text:list-item>
      </text:list>
      <text:p text:style-name="First_20_paragraph"><text:span text:style-name="T1">Risorse ed Economia:</text:span></text:p>
      <text:list text:style-name="L231">
        <text:list-item>
          <text:p text:style-name="P334"><text:span text:style-name="T1">Risorse Naturali Principali:</text:span> Acqua, grano, pesce</text:p>
        </text:list-item>
        <text:list-item>
          <text:p text:style-name="P334"><text:span text:style-name="T1">Industrie Principali:</text:span> Agricoltura irrigua, pesca, artigianato</text:p>
        </text:list-item>
        <text:list-item>
          <text:p text:style-name="P334"><text:span text:style-name="T1">Commercio e Scambi:</text:span> Attivo commercio fluviale con numerose città lungo i fiumi</text:p>
        </text:list-item>
        <text:list-item>
          <text:p text:style-name="P334"><text:span text:style-name="T1">Moneta:</text:span> Dracma Doriana</text:p>
        </text:list-item>
        <text:list-item>
          <text:p text:style-name="P334"><text:span text:style-name="T1">Descrizione Generale dell’Economia:</text:span> L’economia dell’Impero Doriano è fortemente basata sull’agricoltura irrigua e sulla pesca. I fiumi sono il cuore dell’economia, fornendo sia risorse alimentari che vie di trasporto.</text:p>
        </text:list-item>
      </text:list>
      <text:p text:style-name="First_20_paragraph"><text:span text:style-name="T1">Forze Militari:</text:span></text:p>
      <text:list text:style-name="L232">
        <text:list-item>
          <text:p text:style-name="P335"><text:span text:style-name="T1">Dimensione dell’Esercito:</text:span> Grande</text:p>
        </text:list-item>
        <text:list-item>
          <text:p text:style-name="P335"><text:span text:style-name="T1">Struttura Militare:</text:span> Esercito permanente con fanteria, cavalleria e marina fluviale</text:p>
        </text:list-item>
        <text:list-item>
          <text:p text:style-name="P335"><text:span text:style-name="T1">Tecnologie e Armamenti:</text:span> Armi da fuoco, cannoni, fortificazioni fluviali</text:p>
        </text:list-item>
        <text:list-item>
          <text:p text:style-name="P335"><text:span text:style-name="T1">Flotta Navale:</text:span> Estesa, principalmente navi fluviali</text:p>
        </text:list-item>
        <text:list-item>
          <text:p text:style-name="P335"><text:span text:style-name="T1">Strategie Militari:</text:span> Dominio fluviale, difesa delle rive e delle rotte commerciali</text:p>
        </text:list-item>
      </text:list>
      <text:p text:style-name="First_20_paragraph"><text:span text:style-name="T1">Informazioni Aggiuntive:</text:span></text:p>
      <text:list text:style-name="L233">
        <text:list-item>
          <text:p text:style-name="P336"><text:span text:style-name="T1">Relazioni Internazionali:</text:span> Alleanza con Rashia, relazioni sospettose con altre nazioni</text:p>
        </text:list-item>
        <text:list-item>
          <text:p text:style-name="P336"><text:span text:style-name="T1">Problemi Interni:</text:span> Tensioni tra nobili e contadini, gestione delle risorse idriche</text:p>
        </text:list-item>
        <text:list-item>
          <text:p text:style-name="P336"><text:span text:style-name="T1">Storia Breve:</text:span> L’Impero Doriano ha prosperato grazie ai suoi fiumi fertili e alle sue avanzate tecniche di irrigazione. La sua storia è caratterizzata da una forte leadership imperiale e una tradizione di celebrazioni fluviali.</text:p>
        </text:list-item>
      </text:list>
      <text:h text:style-name="Heading_20_3" text:outline-level="3"><text:bookmark-start text:name="regno-di-vallan"/>Regno di Vallan<text:bookmark-end text:name="regno-di-vallan"/></text:h>
      <text:p text:style-name="First_20_paragraph"><text:span text:style-name="T1">Sistema Politico:</text:span></text:p>
      <text:list text:style-name="L234">
        <text:list-item>
          <text:p text:style-name="P337"><text:span text:style-name="T1">Tipo di Governo:</text:span> Regno</text:p>
        </text:list-item>
        <text:list-item>
          <text:p text:style-name="P337"><text:span text:style-name="T1">Capitale:</text:span> Natzrel</text:p>
        </text:list-item>
        <text:list-item>
          <text:p text:style-name="P337"><text:span text:style-name="T1">Leader Attuale:</text:span> Re Thane I</text:p>
        </text:list-item>
        <text:list-item>
          <text:p text:style-name="P337"><text:span text:style-name="T1">Struttura del Governo:</text:span> Monarchia ereditaria con un consiglio di nobili</text:p>
        </text:list-item>
      </text:list>
      <text:p text:style-name="First_20_paragraph"><text:span text:style-name="T1">Territori:</text:span></text:p>
      <text:list text:style-name="L235">
        <text:list-item>
          <text:p text:style-name="P338"><text:span text:style-name="T1">Area Totale (km²):</text:span> 2,669,856</text:p>
        </text:list-item>
        <text:list-item>
          <text:p text:style-name="P338"><text:span text:style-name="T1">Regioni Principali:</text:span> Montagne di Natzrel, Valle di Vallan, Foreste di Khazar</text:p>
        </text:list-item>
        <text:list-item>
          <text:p text:style-name="P338"><text:span text:style-name="T1">Confini Naturali:</text:span> Montagne, foreste</text:p>
        </text:list-item>
      </text:list>
      <text:p text:style-name="First_20_paragraph"><text:span text:style-name="T1">Cultura Dominante:</text:span></text:p>
      <text:list text:style-name="L236">
        <text:list-item>
          <text:p text:style-name="P339"><text:span text:style-name="T1">Nome della Cultura:</text:span> Orethia</text:p>
        </text:list-item>
        <text:list-item>
          <text:p text:style-name="P339"><text:span text:style-name="T1">Tradizioni e Costumi:</text:span> Celebrazioni guerriere, feste della forgia, riti degli antenati</text:p>
        </text:list-item>
        <text:list-item>
          <text:p text:style-name="P339"><text:span text:style-name="T1">Lingua Ufficiale:</text:span> Orethiano</text:p>
        </text:list-item>
      </text:list>
      <text:p text:style-name="First_20_paragraph"><text:span text:style-name="T1">Risorse ed Economia:</text:span></text:p>
      <text:list text:style-name="L237">
        <text:list-item>
          <text:p text:style-name="P340"><text:span text:style-name="T1">Risorse Naturali Principali:</text:span> Minerali, legname, erbe medicinali</text:p>
        </text:list-item>
        <text:list-item>
          <text:p text:style-name="P340"><text:span text:style-name="T1">Industrie Principali:</text:span> Estrazione mineraria, lavorazione del legno, erboristeria</text:p>
        </text:list-item>
        <text:list-item>
          <text:p text:style-name="P340"><text:span text:style-name="T1">Commercio e Scambi:</text:span> Attivo commercio di minerali e legname con altre nazioni</text:p>
        </text:list-item>
        <text:list-item>
          <text:p text:style-name="P340"><text:span text:style-name="T1">Moneta:</text:span> Dracma Vallaniana</text:p>
        </text:list-item>
        <text:list-item>
          <text:p text:style-name="P340"><text:span text:style-name="T1">Descrizione Generale dell’Economia:</text:span> L’economia del Regno di Vallan è basata sull’estrazione mineraria e la lavorazione del legno. Le risorse naturali sono abbondanti e ben sfruttate grazie alle tecniche avanzate.</text:p>
        </text:list-item>
      </text:list>
      <text:p text:style-name="First_20_paragraph"><text:span text:style-name="T1">Forze Militari:</text:span></text:p>
      <text:list text:style-name="L238">
        <text:list-item>
          <text:p text:style-name="P341"><text:span text:style-name="T1">Dimensione dell’Esercito:</text:span> Grande</text:p>
        </text:list-item>
        <text:list-item>
          <text:p text:style-name="P341"><text:span text:style-name="T1">Struttura Militare:</text:span> Esercito permanente con fanteria, cavalleria e artiglieria</text:p>
        </text:list-item>
        <text:list-item>
          <text:p text:style-name="P341"><text:span text:style-name="T1">Tecnologie e Armamenti:</text:span> Armi da fuoco, cannoni, armature pesanti</text:p>
        </text:list-item>
        <text:list-item>
          <text:p text:style-name="P341"><text:span text:style-name="T1">Flotta Navale:</text:span> Limitata</text:p>
        </text:list-item>
        <text:list-item>
          <text:p text:style-name="P341"><text:span text:style-name="T1">Strategie Militari:</text:span> Tattiche di montagna, difesa fortificata, attacchi rapidi</text:p>
        </text:list-item>
      </text:list>
      <text:p text:style-name="First_20_paragraph"><text:span text:style-name="T1">Informazioni Aggiuntive:</text:span></text:p>
      <text:list text:style-name="L239">
        <text:list-item>
          <text:p text:style-name="P342"><text:span text:style-name="T1">Relazioni Internazionali:</text:span> Relazioni ostili con Linia, relazioni neutrali con altre nazioni</text:p>
        </text:list-item>
        <text:list-item>
          <text:p text:style-name="P342"><text:span text:style-name="T1">Problemi Interni:</text:span> Rivalità tra nobili, gestione delle risorse naturali</text:p>
        </text:list-item>
        <text:list-item>
          <text:p text:style-name="P342"><text:span text:style-name="T1">Storia Breve:</text:span> Il Regno di Vallan è noto per le sue risorse minerarie e la sua tradizione guerriera. La sua storia è segnata da conflitti con nazioni confinanti e una forte identità culturale basata sulla forza e il coraggio.</text:p>
        </text:list-item>
      </text:list>
      <text:h text:style-name="Heading_20_3" text:outline-level="3"><text:bookmark-start text:name="città-stato-di-allasia"/>Città-stato di Allasia<text:bookmark-end text:name="città-stato-di-allasia"/></text:h>
      <text:p text:style-name="First_20_paragraph"><text:span text:style-name="T1">Sistema Politico:</text:span></text:p>
      <text:list text:style-name="L240">
        <text:list-item>
          <text:p text:style-name="P343"><text:span text:style-name="T1">Tipo di Governo:</text:span> Città-stato</text:p>
        </text:list-item>
        <text:list-item>
          <text:p text:style-name="P343"><text:span text:style-name="T1">Capitale:</text:span> Allasia</text:p>
        </text:list-item>
        <text:list-item>
          <text:p text:style-name="P343"><text:span text:style-name="T1">Leader Attuale:</text:span> Doge Loranis</text:p>
        </text:list-item>
        <text:list-item>
          <text:p text:style-name="P343"><text:span text:style-name="T1">Struttura del Governo:</text:span> Oligarchia con un consiglio di mercanti e nobili</text:p>
        </text:list-item>
      </text:list>
      <text:p text:style-name="First_20_paragraph"><text:span text:style-name="T1">Territori:</text:span></text:p>
      <text:list text:style-name="L241">
        <text:list-item>
          <text:p text:style-name="P344"><text:span text:style-name="T1">Area Totale (km²):</text:span> 824,784</text:p>
        </text:list-item>
        <text:list-item>
          <text:p text:style-name="P344"><text:span text:style-name="T1">Regioni Principali:</text:span> Città di Allasia, Costa di Allasia, Isole Thalassiane</text:p>
        </text:list-item>
        <text:list-item>
          <text:p text:style-name="P344"><text:span text:style-name="T1">Confini Naturali:</text:span> Coste, isole</text:p>
        </text:list-item>
      </text:list>
      <text:p text:style-name="First_20_paragraph"><text:span text:style-name="T1">Cultura Dominante:</text:span></text:p>
      <text:list text:style-name="L242">
        <text:list-item>
          <text:p text:style-name="P345"><text:span text:style-name="T1">Nome della Cultura:</text:span> Thalassiana</text:p>
        </text:list-item>
        <text:list-item>
          <text:p text:style-name="P345"><text:span text:style-name="T1">Tradizioni e Costumi:</text:span> Celebrazioni marittime, competizioni navali, feste mercantili</text:p>
        </text:list-item>
        <text:list-item>
          <text:p text:style-name="P345"><text:span text:style-name="T1">Lingua Ufficiale:</text:span> Thalassico</text:p>
        </text:list-item>
      </text:list>
      <text:p text:style-name="First_20_paragraph"><text:span text:style-name="T1">Risorse ed Economia:</text:span></text:p>
      <text:list text:style-name="L243">
        <text:list-item>
          <text:p text:style-name="P346"><text:span text:style-name="T1">Risorse Naturali Principali:</text:span> Pesce, sale, perle</text:p>
        </text:list-item>
        <text:list-item>
          <text:p text:style-name="P346"><text:span text:style-name="T1">Industrie Principali:</text:span> Pesca, commercio marittimo, costruzione navale</text:p>
        </text:list-item>
        <text:list-item>
          <text:p text:style-name="P346"><text:span text:style-name="T1">Commercio e Scambi:</text:span> Forte commercio marittimo con numerose rotte commerciali che attraversano Marethar</text:p>
        </text:list-item>
        <text:list-item>
          <text:p text:style-name="P346"><text:span text:style-name="T1">Moneta:</text:span> Ducato Allasiano</text:p>
        </text:list-item>
        <text:list-item>
          <text:p text:style-name="P346"><text:span text:style-name="T1">Descrizione Generale dell’Economia:</text:span> L’economia di Allasia è altamente dipendente dal commercio marittimo e dalla pesca. La città-stato è un centro di attività mercantile e costruzione navale, con mercati vivaci e porti ben sviluppati.</text:p>
        </text:list-item>
      </text:list>
      <text:p text:style-name="First_20_paragraph"><text:span text:style-name="T1">Forze Militari:</text:span></text:p>
      <text:list text:style-name="L244">
        <text:list-item>
          <text:p text:style-name="P347"><text:span text:style-name="T1">Dimensione dell’Esercito:</text:span> Piccola</text:p>
        </text:list-item>
        <text:list-item>
          <text:p text:style-name="P347"><text:span text:style-name="T1">Struttura Militare:</text:span> Guardia cittadina e flotta navale</text:p>
        </text:list-item>
        <text:list-item>
          <text:p text:style-name="P347"><text:span text:style-name="T1">Tecnologie e Armamenti:</text:span> Navi da guerra avanzate, armi da fuoco leggere, cannoni navali</text:p>
        </text:list-item>
        <text:list-item>
          <text:p text:style-name="P347"><text:span text:style-name="T1">Flotta Navale:</text:span> Estesa, con numerose navi da guerra e mercantili</text:p>
        </text:list-item>
        <text:list-item>
          <text:p text:style-name="P347"><text:span text:style-name="T1">Strategie Militari:</text:span> Dominio navale, difesa costiera e protezione delle rotte commerciali</text:p>
        </text:list-item>
      </text:list>
      <text:p text:style-name="First_20_paragraph"><text:span text:style-name="T1">Informazioni Aggiuntive:</text:span></text:p>
      <text:list text:style-name="L245">
        <text:list-item>
          <text:p text:style-name="P348"><text:span text:style-name="T1">Relazioni Internazionali:</text:span> Relazioni ostili con Dajilia, alleanza con Rhithia, relazioni neutrali con altre nazioni</text:p>
        </text:list-item>
        <text:list-item>
          <text:p text:style-name="P348"><text:span text:style-name="T1">Problemi Interni:</text:span> Conflitti tra i mercanti per il controllo delle risorse e delle rotte commerciali</text:p>
        </text:list-item>
        <text:list-item>
          <text:p text:style-name="P348"><text:span text:style-name="T1">Storia Breve:</text:span> Allasia è nata come un importante porto commerciale e centro navale. La città-stato ha prosperato grazie alla sua posizione strategica e alla sua abilità nel commercio marittimo, diventando un punto di riferimento per le rotte commerciali del Marethar.</text:p>
        </text:list-item>
      </text:list>
      <text:h text:style-name="Heading_20_3" text:outline-level="3"><text:bookmark-start text:name="matrice-delle-relazioni-tra-le-nazioni"/>Matrice delle Relazioni tra le Nazioni<text:bookmark-end text:name="matrice-delle-relazioni-tra-le-nazioni"/></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header-rows>
          <table:table-row>
            <table:table-cell table:style-name="TableHeaderRowCell" office:value-type="string">
      </table:table-cell>
            <table:table-cell table:style-name="TableHeaderRowCell" office:value-type="string">
              <text:p text:style-name="Table_20_Heading">Dajilia</text:p>
            </table:table-cell>
            <table:table-cell table:style-name="TableHeaderRowCell" office:value-type="string">
              <text:p text:style-name="Table_20_Heading">Rhithia</text:p>
            </table:table-cell>
            <table:table-cell table:style-name="TableHeaderRowCell" office:value-type="string">
              <text:p text:style-name="Table_20_Heading">Vallan</text:p>
            </table:table-cell>
            <table:table-cell table:style-name="TableHeaderRowCell" office:value-type="string">
              <text:p text:style-name="Table_20_Heading">Rashia</text:p>
            </table:table-cell>
            <table:table-cell table:style-name="TableHeaderRowCell" office:value-type="string">
              <text:p text:style-name="Table_20_Heading">Premia</text:p>
            </table:table-cell>
            <table:table-cell table:style-name="TableHeaderRowCell" office:value-type="string">
              <text:p text:style-name="Table_20_Heading">Ashania</text:p>
            </table:table-cell>
            <table:table-cell table:style-name="TableHeaderRowCell" office:value-type="string">
              <text:p text:style-name="Table_20_Heading">Meshdad</text:p>
            </table:table-cell>
            <table:table-cell table:style-name="TableHeaderRowCell" office:value-type="string">
              <text:p text:style-name="Table_20_Heading">Allasia</text:p>
            </table:table-cell>
            <table:table-cell table:style-name="TableHeaderRowCell" office:value-type="string">
              <text:p text:style-name="Table_20_Heading">Hamania</text:p>
            </table:table-cell>
            <table:table-cell table:style-name="TableHeaderRowCell" office:value-type="string">
              <text:p text:style-name="Table_20_Heading">Doria</text:p>
            </table:table-cell>
            <table:table-cell table:style-name="TableHeaderRowCell" office:value-type="string">
              <text:p text:style-name="Table_20_Heading">Linia</text:p>
            </table:table-cell>
          </table:table-row>
        </table:table-header-rows>
        <table:table-row>
          <table:table-cell table:style-name="TableRowCell" office:value-type="string">
            <text:p text:style-name="Table_20_Contents"><text:span text:style-name="T1">Dajilia</text:span></text:p>
          </table:table-cell>
          <table:table-cell table:style-name="TableRowCell" office:value-type="string">
            <text:p text:style-name="Table_20_Contents">x</text:p>
          </table:table-cell>
          <table:table-cell table:style-name="TableRowCell" office:value-type="string">
            <text:p text:style-name="Table_20_Contents">Sospetto</text:p>
          </table:table-cell>
          <table:table-cell table:style-name="TableRowCell" office:value-type="string">
            <text:p text:style-name="Table_20_Contents">Neutrale</text:p>
          </table:table-cell>
          <table:table-cell table:style-name="TableRowCell" office:value-type="string">
            <text:p text:style-name="Table_20_Contents">Nemico</text:p>
          </table:table-cell>
          <table:table-cell table:style-name="TableRowCell" office:value-type="string">
            <text:p text:style-name="Table_20_Contents">Sconosciuto</text:p>
          </table:table-cell>
          <table:table-cell table:style-name="TableRowCell" office:value-type="string">
            <text:p text:style-name="Table_20_Contents">Sconosciuto</text:p>
          </table:table-cell>
          <table:table-cell table:style-name="TableRowCell" office:value-type="string">
            <text:p text:style-name="Table_20_Contents">Nemico</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Nemico</text:p>
          </table:table-cell>
          <table:table-cell table:style-name="TableRowCell" office:value-type="string">
            <text:p text:style-name="Table_20_Contents">Sconosciuto</text:p>
          </table:table-cell>
        </table:table-row>
        <table:table-row>
          <table:table-cell table:style-name="TableRowCell" office:value-type="string">
            <text:p text:style-name="Table_20_Contents"><text:span text:style-name="T1">Rhithia</text:span></text:p>
          </table:table-cell>
          <table:table-cell table:style-name="TableRowCell" office:value-type="string">
            <text:p text:style-name="Table_20_Contents">Sospetto</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row>
        <table:table-row>
          <table:table-cell table:style-name="TableRowCell" office:value-type="string">
            <text:p text:style-name="Table_20_Contents"><text:span text:style-name="T1">Vallan</text:span></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Sospetto</text:p>
          </table:table-cell>
          <table:table-cell table:style-name="TableRowCell" office:value-type="string">
            <text:p text:style-name="Table_20_Contents">Amichevole</text:p>
          </table:table-cell>
        </table:table-row>
        <table:table-row>
          <table:table-cell table:style-name="TableRowCell" office:value-type="string">
            <text:p text:style-name="Table_20_Contents"><text:span text:style-name="T1">Rashia</text:span></text:p>
          </table:table-cell>
          <table:table-cell table:style-name="TableRowCell" office:value-type="string">
            <text:p text:style-name="Table_20_Contents">Nemico</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Alleato</text:p>
          </table:table-cell>
          <table:table-cell table:style-name="TableRowCell" office:value-type="string">
            <text:p text:style-name="Table_20_Contents">Sospetto</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row>
        <table:table-row>
          <table:table-cell table:style-name="TableRowCell" office:value-type="string">
            <text:p text:style-name="Table_20_Contents"><text:span text:style-name="T1">Premia</text:span></text:p>
          </table:table-cell>
          <table:table-cell table:style-name="TableRowCell" office:value-type="string">
            <text:p text:style-name="Table_20_Contents">Sconosciuto</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Suzzerano</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row>
        <table:table-row>
          <table:table-cell table:style-name="TableRowCell" office:value-type="string">
            <text:p text:style-name="Table_20_Contents"><text:span text:style-name="T1">Ashania</text:span></text:p>
          </table:table-cell>
          <table:table-cell table:style-name="TableRowCell" office:value-type="string">
            <text:p text:style-name="Table_20_Contents">Sconosciuto</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Neutrale</text:p>
          </table:table-cell>
          <table:table-cell table:style-name="TableRowCell" office:value-type="string">
            <text:p text:style-name="Table_20_Contents">Vassallo</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row>
        <table:table-row>
          <table:table-cell table:style-name="TableRowCell" office:value-type="string">
            <text:p text:style-name="Table_20_Contents"><text:span text:style-name="T1">Meshdad</text:span></text:p>
          </table:table-cell>
          <table:table-cell table:style-name="TableRowCell" office:value-type="string">
            <text:p text:style-name="Table_20_Contents">Nemico</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Sospetto</text:p>
          </table:table-cell>
          <table:table-cell table:style-name="TableRowCell" office:value-type="string">
            <text:p text:style-name="Table_20_Contents">Sconosciuto</text:p>
          </table:table-cell>
        </table:table-row>
        <table:table-row>
          <table:table-cell table:style-name="TableRowCell" office:value-type="string">
            <text:p text:style-name="Table_20_Contents"><text:span text:style-name="T1">Allasia</text:span></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Neutrale</text:p>
          </table:table-cell>
          <table:table-cell table:style-name="TableRowCell" office:value-type="string">
            <text:p text:style-name="Table_20_Contents">Sospetto</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Alleato</text:p>
          </table:table-cell>
        </table:table-row>
        <table:table-row>
          <table:table-cell table:style-name="TableRowCell" office:value-type="string">
            <text:p text:style-name="Table_20_Contents"><text:span text:style-name="T1">Hamania</text:span></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cell table:style-name="TableRowCell" office:value-type="string">
            <text:p text:style-name="Table_20_Contents">Sospetto</text:p>
          </table:table-cell>
          <table:table-cell table:style-name="TableRowCell" office:value-type="string">
            <text:p text:style-name="Table_20_Contents">Sospetto</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Neutrale</text:p>
          </table:table-cell>
          <table:table-cell table:style-name="TableRowCell" office:value-type="string">
            <text:p text:style-name="Table_20_Contents">Neutrale</text:p>
          </table:table-cell>
        </table:table-row>
        <table:table-row>
          <table:table-cell table:style-name="TableRowCell" office:value-type="string">
            <text:p text:style-name="Table_20_Contents"><text:span text:style-name="T1">Doria</text:span></text:p>
          </table:table-cell>
          <table:table-cell table:style-name="TableRowCell" office:value-type="string">
            <text:p text:style-name="Table_20_Contents">Nemico</text:p>
          </table:table-cell>
          <table:table-cell table:style-name="TableRowCell" office:value-type="string">
            <text:p text:style-name="Table_20_Contents">Neutrale</text:p>
          </table:table-cell>
          <table:table-cell table:style-name="TableRowCell" office:value-type="string">
            <text:p text:style-name="Table_20_Contents">Sospetto</text:p>
          </table:table-cell>
          <table:table-cell table:style-name="TableRowCell" office:value-type="string">
            <text:p text:style-name="Table_20_Contents">Alleato</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cell table:style-name="TableRowCell" office:value-type="string">
            <text:p text:style-name="Table_20_Contents">Sospetto</text:p>
          </table:table-cell>
          <table:table-cell table:style-name="TableRowCell" office:value-type="string">
            <text:p text:style-name="Table_20_Contents">Amichevole</text:p>
          </table:table-cell>
          <table:table-cell table:style-name="TableRowCell" office:value-type="string">
            <text:p text:style-name="Table_20_Contents">Neutrale</text:p>
          </table:table-cell>
          <table:table-cell table:style-name="TableRowCell" office:value-type="string">
            <text:p text:style-name="Table_20_Contents">x</text:p>
          </table:table-cell>
          <table:table-cell table:style-name="TableRowCell" office:value-type="string">
            <text:p text:style-name="Table_20_Contents">Alleato</text:p>
          </table:table-cell>
        </table:table-row>
        <table:table-row>
          <table:table-cell table:style-name="TableRowCell" office:value-type="string">
            <text:p text:style-name="Table_20_Contents"><text:span text:style-name="T1">Linia</text:span></text:p>
          </table:table-cell>
          <table:table-cell table:style-name="TableRowCell" office:value-type="string">
            <text:p text:style-name="Table_20_Contents">Sconosciuto</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Neutrale</text:p>
          </table:table-cell>
          <table:table-cell table:style-name="TableRowCell" office:value-type="string">
            <text:p text:style-name="Table_20_Contents">Amichevole</text:p>
          </table:table-cell>
          <table:table-cell table:style-name="TableRowCell" office:value-type="string">
            <text:p text:style-name="Table_20_Contents">Amichevole</text:p>
          </table:table-cell>
          <table:table-cell table:style-name="TableRowCell" office:value-type="string">
            <text:p text:style-name="Table_20_Contents">Sconosciuto</text:p>
          </table:table-cell>
          <table:table-cell table:style-name="TableRowCell" office:value-type="string">
            <text:p text:style-name="Table_20_Contents">Alleato</text:p>
          </table:table-cell>
          <table:table-cell table:style-name="TableRowCell" office:value-type="string">
            <text:p text:style-name="Table_20_Contents">Neutrale</text:p>
          </table:table-cell>
          <table:table-cell table:style-name="TableRowCell" office:value-type="string">
            <text:p text:style-name="Table_20_Contents">Alleato</text:p>
          </table:table-cell>
          <table:table-cell table:style-name="TableRowCell" office:value-type="string">
            <text:p text:style-name="Table_20_Contents">x</text:p>
          </table:table-cell>
        </table:table-row>
      </table:table>
      <text:h text:style-name="Heading_20_2" text:outline-level="2"><text:bookmark-start text:name="religioni-del-marethar"/>🜨 Religioni del Marethar<text:bookmark-end text:name="religioni-del-marethar"/></text:h>
      <text:h text:style-name="Heading_20_3" text:outline-level="3"><text:bookmark-start text:name="spiriti-di-thalaran"/>Spiriti di Thalaran<text:bookmark-end text:name="spiriti-di-thalaran"/></text:h>
      <text:p text:style-name="First_20_paragraph"><text:span text:style-name="T1">Tipo:</text:span> Folk<text:line-break/><text:span text:style-name="T1">Forma:</text:span> Animismo<text:line-break/><text:span text:style-name="T1">Cultura:</text:span> Thalassian<text:line-break/><text:span text:style-name="T1">Area:</text:span> Thalassia<text:line-break/><text:span text:style-name="T1">Fedeli:</text:span> 6,621,114</text:p>
      <text:p text:style-name="Text_20_body"><text:span text:style-name="T1">Descrizione:</text:span> Gli Spiriti di Thalaran rappresentano una delle religioni più antiche di Thalassia. Questa fede è profondamente radicata nelle tradizioni marinare e costiere dei Thalassiani, che venerano gli spiriti della natura e degli antenati marinai. Gli Spiriti di Thalaran sono considerati protettori del mare, dei venti e delle creature marine. I fedeli credono che ogni elemento della natura possieda uno spirito e che gli antenati continuino a influenzare il mondo dei vivi attraverso questi spiriti.</text:p>
      <text:p text:style-name="Text_20_body"><text:span text:style-name="T1">Origini e Pratiche Religiose:</text:span> Le origini della religione risalgono ai primi abitanti delle coste di Thalassia, che cercavano protezione e guida per affrontare le sfide del mare. I rituali includono offerte di pesce e altri frutti del mare, canti rituali e danze che celebrano le forze naturali. Le cerimonie sono spesso condotte sulla spiaggia o su piccole imbarcazioni durante il tramonto, un momento considerato sacro.</text:p>
      <text:p text:style-name="Text_20_body"><text:span text:style-name="T1">Struttura del Clero:</text:span> La religione non ha una struttura clericale rigida. Gli anziani della comunità e i capitani delle navi fungono da guide spirituali, conducendo i rituali e trasmettendo le tradizioni orali alle nuove generazioni.</text:p>
      <text:h text:style-name="Heading_20_3" text:outline-level="3"><text:bookmark-start text:name="culto-di-carthara"/>Culto di Carthara<text:bookmark-end text:name="culto-di-carthara"/></text:h>
      <text:p text:style-name="First_20_paragraph"><text:span text:style-name="T1">Tipo:</text:span> Folk<text:line-break/><text:span text:style-name="T1">Forma:</text:span> Animismo<text:line-break/><text:span text:style-name="T1">Cultura:</text:span> Thalassian<text:line-break/><text:span text:style-name="T1">Area:</text:span> Thalassia<text:line-break/><text:span text:style-name="T1">Fedeli:</text:span> 1,630,629</text:p>
      <text:p text:style-name="Text_20_body"><text:span text:style-name="T1">Descrizione:</text:span> Il Culto di Carthara è una religione praticata principalmente dai mercanti e dai marinai Thalassiani. Carthara è venerato come lo spirito protettore dei viaggi e del commercio, offrendo protezione durante le traversate marittime e garantendo prosperità negli scambi commerciali. I fedeli di Carthara offrono sacrifici e preghiere prima di ogni viaggio per assicurarsi il favore divino.</text:p>
      <text:p text:style-name="Text_20_body"><text:span text:style-name="T1">Origini e Pratiche Religiose:</text:span> Il culto ha origine nelle antiche tradizioni mercantili di Thalassia, dove i commercianti cercavano protezione divina per i loro pericolosi viaggi attraverso il mare. I rituali includono sacrifici di monete, oggetti preziosi e preghiere recitate prima della partenza. Alcuni marinai indossano amuleti benedetti in nome di Carthara.</text:p>
      <text:p text:style-name="Text_20_body"><text:span text:style-name="T1">Struttura del Clero:</text:span> Il Culto di Carthara non ha un clero organizzato. I capitani delle navi e i mercanti più esperti spesso assumono il ruolo di guida spirituale, conducendo i rituali e le preghiere.</text:p>
      <text:h text:style-name="Heading_20_3" text:outline-level="3"><text:bookmark-start text:name="setta-di-shahin"/>Setta di Shahin<text:bookmark-end text:name="setta-di-shahin"/></text:h>
      <text:p text:style-name="First_20_paragraph"><text:span text:style-name="T1">Tipo:</text:span> Organizzato<text:line-break/><text:span text:style-name="T1">Forma:</text:span> Eresia<text:line-break/><text:span text:style-name="T1">Cultura:</text:span> Aridoniani<text:line-break/><text:span text:style-name="T1">Area:</text:span> Aridonia<text:line-break/><text:span text:style-name="T1">Fedeli:</text:span> 5,909,228</text:p>
      <text:p text:style-name="Text_20_body"><text:span text:style-name="T1">Descrizione:</text:span> La Setta di Shahin venera Shahin, il Dio dell’Albero, una divinità che simboleggia la vita, la crescita e la protezione. Questa religione, considerata eretica rispetto alle credenze principali di Aridonia, ha un forte carattere comunitario e mistico. I fedeli credono che Shahin protegga le foreste e garantisca abbondanza e fertilità alla terra.</text:p>
      <text:p text:style-name="Text_20_body"><text:span text:style-name="T1">Origini e Pratiche Religiose:</text:span> La setta è nata come una reazione contro le pratiche religiose dominanti, focalizzandosi su una connessione più profonda con la natura. I rituali includono cerimonie di piantagione degli alberi, offerte di frutti e fiori, e meditazioni collettive sotto gli alberi sacri. Le cerimonie più importanti si tengono durante i solstizi e gli equinozi.</text:p>
      <text:p text:style-name="Text_20_body"><text:span text:style-name="T1">Struttura del Clero:</text:span> La Setta di Shahin ha un clero organizzato con druidi e sacerdotesse che guidano le comunità, amministrano i rituali e proteggono i boschi sacri. Il clero è addestrato in erboristeria e nella cura degli alberi.</text:p>
      <text:h text:style-name="Heading_20_3" text:outline-level="3"><text:bookmark-start text:name="ateismo-marethiano"/>Ateismo Marethiano<text:bookmark-end text:name="ateismo-marethiano"/></text:h>
      <text:p text:style-name="First_20_paragraph"><text:span text:style-name="T1">Tipo:</text:span> N/A<text:line-break/><text:span text:style-name="T1">Forma:</text:span> N/A<text:line-break/><text:span text:style-name="T1">Cultura:</text:span> Variabile<text:line-break/><text:span text:style-name="T1">Area:</text:span> Marethar<text:line-break/><text:span text:style-name="T1">Fedeli:</text:span> 22,991,162</text:p>
      <text:p text:style-name="Text_20_body"><text:span text:style-name="T1">Descrizione:</text:span> L’Ateismo Marethiano rappresenta l’assenza di credenze religiose organizzate. Gli atei del Marethar si affidano alla ragione, alla scienza e alla filosofia per comprendere il mondo e il loro posto in esso. Questa prospettiva rifiuta l’esistenza di divinità o spiriti, focalizzandosi invece sul potenziale umano e sulla comprensione scientifica.</text:p>
      <text:p text:style-name="Text_20_body"><text:span text:style-name="T1">Origini e Pratiche:</text:span> L’ateismo ha preso piede nel Marethar come reazione alle guerre religiose e agli abusi di potere da parte delle istituzioni religiose. I seguaci dell’ateismo valorizzano l’educazione, il pensiero critico e l’innovazione scientifica. Non ci sono rituali religiosi associati, ma incontri filosofici e dibattiti pubblici sono comuni.</text:p>
      <text:p text:style-name="Text_20_body"><text:span text:style-name="T1">Struttura del Clero:</text:span> Non esiste un clero nell’ateismo. I leader sono spesso filosofi, scienziati e pensatori che promuovono il razionalismo e il progresso.</text:p>
      <text:h text:style-name="Heading_20_3" text:outline-level="3"><text:bookmark-start text:name="fede-di-shemshahva"/>Fede di Shemshahva<text:bookmark-end text:name="fede-di-shemshahva"/></text:h>
      <text:p text:style-name="First_20_paragraph"><text:span text:style-name="T1">Tipo:</text:span> Folk<text:line-break/><text:span text:style-name="T1">Forma:</text:span> Culto degli Antenati<text:line-break/><text:span text:style-name="T1">Cultura:</text:span> Orethia<text:line-break/><text:span text:style-name="T1">Area:</text:span> Orethia<text:line-break/><text:span text:style-name="T1">Fedeli:</text:span> 1,372,268</text:p>
      <text:p text:style-name="Text_20_body"><text:span text:style-name="T1">Descrizione:</text:span> La Fede di Shemshahva è centrata sul culto degli antenati e sulla venerazione di Shemshahva, il Cobra Marrone, simbolo di saggezza e protezione. I fedeli credono che gli spiriti degli antenati continuino a influenzare la vita dei vivi e che Shemshahva offra protezione contro i pericoli.</text:p>
      <text:p text:style-name="Text_20_body"><text:span text:style-name="T1">Origini e Pratiche Religiose:</text:span> La fede ha origine nelle antiche tribù montane degli Orethiani, che vedevano nel cobra un animale sacro. I rituali includono offerte agli antenati, preghiere per la guida e la protezione, e cerimonie in onore di Shemshahva durante la luna piena.</text:p>
      <text:p text:style-name="Text_20_body"><text:span text:style-name="T1">Struttura del Clero:</text:span> La Fede di Shemshahva ha sciamani e sacerdoti che agiscono come intermediari tra i vivi e gli antenati. Il clero è responsabile della conduzione dei rituali e della conservazione delle storie tribali.</text:p>
      <text:h text:style-name="Heading_20_3" text:outline-level="3"><text:bookmark-start text:name="credenze-di-golat"/>Credenze di Golat<text:bookmark-end text:name="credenze-di-golat"/></text:h>
      <text:p text:style-name="First_20_paragraph"><text:span text:style-name="T1">Tipo:</text:span> Folk<text:line-break/><text:span text:style-name="T1">Forma:</text:span> Sciamanismo<text:line-break/><text:span text:style-name="T1">Cultura:</text:span> Aridoniani<text:line-break/><text:span text:style-name="T1">Area:</text:span> Aridonia<text:line-break/><text:span text:style-name="T1">Fedeli:</text:span> 1,445,255</text:p>
      <text:p text:style-name="Text_20_body"><text:span text:style-name="T1">Descrizione:</text:span> Le Credenze di Golat si focalizzano sullo sciamanesimo, con Golat, la Pantera Gialla, come divinità suprema. I fedeli credono che Golat protegga la comunità e conferisca saggezza e forza a coloro che lo venerano attraverso rituali sciamanici.</text:p>
      <text:p text:style-name="Text_20_body"><text:span text:style-name="T1">Origini e Pratiche Religiose:</text:span> Questa religione ha radici profonde nelle pratiche tribali Aridonianie. I rituali includono danze sciamaniche, trance e comunicazione con gli spiriti per ottenere visioni e guida. Le cerimonie si tengono spesso in grotte sacre o radure nascoste.</text:p>
      <text:p text:style-name="Text_20_body"><text:span text:style-name="T1">Struttura del Clero:</text:span> Gli sciamani di Golat sono figure centrali nella comunità, rispettati per la loro conoscenza e abilità nel comunicare con gli spiriti. Essi guidano i rituali, offrono consigli e curano i malati attraverso pratiche spirituali.</text:p>
      <text:h text:style-name="Heading_20_3" text:outline-level="3"><text:bookmark-start text:name="fede-di-pulbium"/>Fede di Pulbium<text:bookmark-end text:name="fede-di-pulbium"/></text:h>
      <text:p text:style-name="First_20_paragraph"><text:span text:style-name="T1">Tipo:</text:span> Organizzato<text:line-break/><text:span text:style-name="T1">Forma:</text:span> Sciamanismo<text:line-break/><text:span text:style-name="T1">Cultura:</text:span> Aurelia<text:line-break/><text:span text:style-name="T1">Area:</text:span> Aurelia<text:line-break/><text:span text:style-name="T1">Fedeli:</text:span> 24,860</text:p>
      <text:p text:style-name="Text_20_body"><text:span text:style-name="T1">Descrizione:</text:span> La Fede di Pulbium venera Pulbium, l’Antico. È una religione organizzata che include rituali sciamanici e la venerazione degli antenati. I fedeli credono che Pulbium offra protezione e saggezza, guidando la comunità attraverso tempi difficili.</text:p>
      <text:p text:style-name="Text_20_body"><text:span text:style-name="T1">Origini e Pratiche Religiose:</text:span> La fede ha origine nelle comunità rurali Aureliane, dove Pulbium è considerato il guardiano della saggezza antica. I rituali includono meditazioni collettive, offerte di grano e vino, e cerimonie di purificazione durante le stagioni di raccolto.</text:p>
      <text:p text:style-name="Text_20_body"><text:span text:style-name="T1">Struttura del Clero:</text:span> La Fede di Pulbium ha un clero organizzato con sacerdoti che amministrano i rituali e guidano le comunità. I sacerdoti sono addestrati nella conoscenza delle erbe medicinali e nella cura spirituale.</text:p>
      <text:h text:style-name="Heading_20_3" text:outline-level="3"><text:bookmark-start text:name="druidi-di-dimilalica"/>Druidi di Dimilalica<text:bookmark-end text:name="druidi-di-dimilalica"/></text:h>
      <text:p text:style-name="First_20_paragraph"><text:span text:style-name="T1">Tipo:</text:span> Culto<text:line-break/><text:span text:style-name="T1">Forma:</text:span> Culto della Natura<text:line-break/><text:span text:style-name="T1">Cultura:</text:span> Aurelia<text:line-break/><text:span text:style-name="T1">Area:</text:span> Aurelia<text:line-break/><text:span text:style-name="T1">Fedeli:</text:span> 2,330</text:p>
      <text:p text:style-name="Text_20_body"><text:span text:style-name="T1">Descrizione:</text:span> I Druidi di Dimilalica venerano Dimilalica, il Giaguaro dell’Estate. Questa religione è incentrata sul culto della natura e sui cicli stagionali, con rituali che celebrano il sole, la terra e le stagioni. I fedeli credono che Dimilalica guidi il ciclo della vita e offra prosperità e protezione durante i periodi di abbondanza.</text:p>
      <text:p text:style-name="Text_20_body"><text:span text:style-name="T1">Origini e Pratiche Religiose:</text:span> La religione dei Druidi di Dimilalica ha origine nelle antiche foreste e praterie degli Aureliani, dove i primi abitanti vivevano in stretta armonia con la natura. I rituali includono danze rituali, offerte di frutti e fiori e celebrazioni durante i solstizi e gli equinozi. Le cerimonie si tengono spesso in radure sacre, circondate da alberi secolari.</text:p>
      <text:p text:style-name="Text_20_body"><text:span text:style-name="T1">Struttura del Clero:</text:span> I druidi sono i leader spirituali di questa religione, rispettati per la loro conoscenza delle erbe, della fauna e dei cicli naturali. Essi guidano i rituali, offrono consigli alla comunità e insegnano i segreti della natura ai giovani iniziati.</text:p>
      <text:h text:style-name="Heading_20_3" text:outline-level="3"><text:bookmark-start text:name="fede-di-tudeshkhast"/>Fede di Tudeshkhast<text:bookmark-end text:name="fede-di-tudeshkhast"/></text:h>
      <text:p text:style-name="First_20_paragraph"><text:span text:style-name="T1">Tipo:</text:span> Organizzato<text:line-break/><text:span text:style-name="T1">Forma:</text:span> Dualismo<text:line-break/><text:span text:style-name="T1">Cultura:</text:span> Orethia<text:line-break/><text:span text:style-name="T1">Area:</text:span> Orethia<text:line-break/><text:span text:style-name="T1">Fedeli:</text:span> 6,012,780</text:p>
      <text:p text:style-name="Text_20_body"><text:span text:style-name="T1">Descrizione:</text:span> La Fede di Tudeshkhast si basa sul dualismo e venera Tudeshkhast, il Saggio Volante del Destino. Questa religione organizza riti complessi che celebrano l’equilibrio tra luce e oscurità, vita e morte. I fedeli credono che Tudeshkhast controlli i destini di tutti e che l’equilibrio sia essenziale per la prosperità e la pace.</text:p>
      <text:p text:style-name="Text_20_body"><text:span text:style-name="T1">Origini e Pratiche Religiose:</text:span> La Fede di Tudeshkhast ha radici antiche nelle montagne di Orethia, dove le comunità cercavano di comprendere e bilanciare le forze della natura. I rituali includono offerte di cibo e bevande, meditazioni e cerimonie di purificazione. Le celebrazioni principali si tengono durante i cambi di stagione, che simboleggiano l’equilibrio naturale.</text:p>
      <text:p text:style-name="Text_20_body"><text:span text:style-name="T1">Struttura del Clero:</text:span> La religione è guidata da un clero organizzato di sacerdoti e saggi, che studiano i testi sacri e guidano i fedeli attraverso i rituali. I sacerdoti sono anche responsabili della conservazione delle conoscenze antiche e della trasmissione delle tradizioni.</text:p>
      <text:h text:style-name="Heading_20_3" text:outline-level="3"><text:bookmark-start text:name="setta-del-bufalo-della-vittoria"/>Setta del Bufalo della Vittoria<text:bookmark-end text:name="setta-del-bufalo-della-vittoria"/></text:h>
      <text:p text:style-name="First_20_paragraph"><text:span text:style-name="T1">Tipo:</text:span> Culto<text:line-break/><text:span text:style-name="T1">Forma:</text:span> Culto<text:line-break/><text:span text:style-name="T1">Cultura:</text:span> Thalassian<text:line-break/><text:span text:style-name="T1">Area:</text:span> Thalassia<text:line-break/><text:span text:style-name="T1">Fedeli:</text:span> 12,438</text:p>
      <text:p text:style-name="Text_20_body"><text:span text:style-name="T1">Descrizione:</text:span> La Setta del Bufalo della Vittoria venera Adrarad, il Creatore. Questo culto è noto per i suoi riti segreti e le sue cerimonie che celebrano la forza e il potere del bufalo come simbolo di vittoria. I fedeli credono che Adrarad conceda forza e successo nelle battaglie e nelle sfide della vita.</text:p>
      <text:p text:style-name="Text_20_body"><text:span text:style-name="T1">Origini e Pratiche Religiose:</text:span> Il culto ha origine tra le tribù guerriere di Thalassia, che consideravano il bufalo un animale sacro e simbolo di potere. I rituali includono danze tribali, offerte di carne e cerimonie di iniziazione per i giovani guerrieri. Le cerimonie si svolgono in luoghi sacri, spesso nelle profondità delle foreste o nelle grotte nascoste.</text:p>
      <text:p text:style-name="Text_20_body"><text:span text:style-name="T1">Struttura del Clero:</text:span> La setta è guidata da sciamani e capi tribù, che detengono la conoscenza dei riti segreti e conducono le cerimonie. Essi sono anche i custodi delle leggende e delle storie sacre del culto.</text:p>
      <text:h text:style-name="Heading_20_3" text:outline-level="3"><text:bookmark-start text:name="dei-di-ralertis"/>Dei di Ralertis<text:bookmark-end text:name="dei-di-ralertis"/></text:h>
      <text:p text:style-name="First_20_paragraph"><text:span text:style-name="T1">Tipo:</text:span> Organizzato<text:line-break/><text:span text:style-name="T1">Forma:</text:span> Politeismo<text:line-break/><text:span text:style-name="T1">Cultura:</text:span> Aurelia<text:line-break/><text:span text:style-name="T1">Area:</text:span> Aurelia<text:line-break/><text:span text:style-name="T1">Fedeli:</text:span> 1,367,240</text:p>
      <text:p text:style-name="Text_20_body"><text:span text:style-name="T1">Descrizione:</text:span> La religione degli Dei di Ralertis venera Ralertis, il Mietitore di Zaffiro, e un pantheon di divinità minori. I fedeli partecipano a complessi rituali e celebrazioni che onorano queste divinità per prosperità e protezione. La religione enfatizza l’armonia tra gli dei e gli esseri umani, con riti che celebrano i cicli della natura e la vita umana.</text:p>
      <text:p text:style-name="Text_20_body"><text:span text:style-name="T1">Origini e Pratiche Religiose:</text:span> Questa religione ha origini nelle antiche civiltà Aureliane, che credevano in un pantheon di divinità responsabili di vari aspetti della vita e della natura. I rituali includono offerte di gioielli, frutti e animali, oltre a cerimonie elaborate che coinvolgono canti, danze e recitazioni di antichi miti. Le principali festività si svolgono durante i cambi di stagione e gli eventi astronomici significativi.</text:p>
      <text:p text:style-name="Text_20_body"><text:span text:style-name="T1">Struttura del Clero:</text:span> La religione è guidata da un clero ben strutturato, con sacerdoti e sacerdotesse che servono nei templi dedicati a Ralertis e alle divinità minori. Essi sono responsabili dell’esecuzione dei rituali, della gestione dei templi e dell’educazione religiosa dei fedeli.</text:p>
      <text:h text:style-name="Heading_20_2" text:outline-level="2"><text:bookmark-start text:name="flora-e-fauna-del-marethar"/>🜁 Flora e Fauna del Marethar<text:bookmark-end text:name="flora-e-fauna-del-marethar"/></text:h>
      <text:p text:style-name="First_20_paragraph">La regione del Marethar è un luogo di straordinaria biodiversità, con una varietà di ecosistemi che supportano una vasta gamma di piante e animali. Dalle foreste dense alle praterie aperte, dalle montagne alle paludi, ogni ambiente ospita specie uniche che hanno adattato le loro vite alle specifiche condizioni del loro habitat. Inoltre, il Marethar è popolato da creature mitiche che, ispirate dalle relative mitologie delle culture della regione, aggiungono un ulteriore strato di fascino e mistero.</text:p>
      <text:h text:style-name="Heading_20_3" text:outline-level="3"><text:bookmark-start text:name="flora"/>Flora<text:bookmark-end text:name="flora"/></text:h>
      <text:h text:style-name="Heading_20_4" text:outline-level="4"><text:bookmark-start text:name="foreste-di-linia"/>Foreste di Linia<text:bookmark-end text:name="foreste-di-linia"/></text:h>
      <text:p text:style-name="First_20_paragraph">Le foreste di Linia, situate nell’Impero di Linia, sono caratterizzate da una vegetazione densa e variegata.</text:p>
      <text:p text:style-name="Text_20_body"><text:span text:style-name="T1">Piante Principali:</text:span></text:p>
      <text:list text:style-name="L246">
        <text:list-item>
          <text:p text:style-name="P349"><text:span text:style-name="T1">Cedro di Linia:</text:span> Un albero imponente con legno resistente e aromatico, utilizzato per la costruzione e l’artigianato.</text:p>
        </text:list-item>
        <text:list-item>
          <text:p text:style-name="P349"><text:span text:style-name="T1">Felce d’Oro:</text:span> Una felce rara e preziosa, nota per le sue proprietà medicinali e magiche.</text:p>
        </text:list-item>
        <text:list-item>
          <text:p text:style-name="P349"><text:span text:style-name="T1">Vite Rampicante di Khazar:</text:span> Una pianta rampicante con bacche dolci e nutrienti, spesso raccolte per produrre vini pregiati.</text:p>
        </text:list-item>
      </text:list>
      <text:p text:style-name="First_20_paragraph"><text:span text:style-name="T1">Creature Mitiche:</text:span></text:p>
      <text:list text:style-name="L247">
        <text:list-item>
          <text:p text:style-name="P350"><text:span text:style-name="T1">Drago della Foresta:</text:span> Una creatura rettiliana alata che si dice protegga le foreste dai disboscatori. Ispirata ai draghi della mitologia europea.</text:p>
        </text:list-item>
      </text:list>
      <text:h text:style-name="Heading_20_4" text:outline-level="4"><text:bookmark-start text:name="pianure-di-vallan"/>Pianure di Vallan<text:bookmark-end text:name="pianure-di-vallan"/></text:h>
      <text:p text:style-name="First_20_paragraph">Le pianure di Vallan, situate nel Regno di Vallan, sono famose per la loro fertilità e abbondanza di piante coltivate.</text:p>
      <text:p text:style-name="Text_20_body"><text:span text:style-name="T1">Piante Principali:</text:span></text:p>
      <text:list text:style-name="L248">
        <text:list-item>
          <text:p text:style-name="P351"><text:span text:style-name="T1">Grano di Vallan:</text:span> Una varietà di grano resistente e altamente produttiva, base dell’alimentazione locale.</text:p>
        </text:list-item>
        <text:list-item>
          <text:p text:style-name="P351"><text:span text:style-name="T1">Girasole di Vallan:</text:span> Coltivato sia per i suoi semi nutrienti che per l’olio di girasole.</text:p>
        </text:list-item>
        <text:list-item>
          <text:p text:style-name="P351"><text:span text:style-name="T1">Lino Blu:</text:span> Una pianta utilizzata per produrre tessuti di alta qualità, molto apprezzati nel commercio.</text:p>
        </text:list-item>
      </text:list>
      <text:p text:style-name="First_20_paragraph"><text:span text:style-name="T1">Creature Mitiche:</text:span></text:p>
      <text:list text:style-name="L249">
        <text:list-item>
          <text:p text:style-name="P352"><text:span text:style-name="T1">Spiriti del Raccolto:</text:span> Entità benevole che si crede proteggano i raccolti e garantiscano abbondanza. Ispirati agli spiriti agricoli delle culture europee.</text:p>
        </text:list-item>
      </text:list>
      <text:h text:style-name="Heading_20_4" text:outline-level="4"><text:bookmark-start text:name="montagne-di-orethia"/>Montagne di Orethia<text:bookmark-end text:name="montagne-di-orethia"/></text:h>
      <text:p text:style-name="First_20_paragraph">Le montagne di Orethia sono ricche di risorse minerarie e ospitano una flora resistente al clima montano.</text:p>
      <text:p text:style-name="Text_20_body"><text:span text:style-name="T1">Piante Principali:</text:span></text:p>
      <text:list text:style-name="L250">
        <text:list-item>
          <text:p text:style-name="P353"><text:span text:style-name="T1">Pino Nero:</text:span> Un albero resistente, utilizzato per costruire fortificazioni e armi.</text:p>
        </text:list-item>
        <text:list-item>
          <text:p text:style-name="P353"><text:span text:style-name="T1">Rododendro Selvatico:</text:span> Una pianta dai fiori vivaci, utilizzata nella medicina tradizionale.</text:p>
        </text:list-item>
        <text:list-item>
          <text:p text:style-name="P353"><text:span text:style-name="T1">Muschio di Ferro:</text:span> Una pianta rara che cresce vicino alle miniere di ferro, utilizzata per rafforzare le leghe metalliche.</text:p>
        </text:list-item>
      </text:list>
      <text:p text:style-name="First_20_paragraph"><text:span text:style-name="T1">Creature Mitiche:</text:span></text:p>
      <text:list text:style-name="L251">
        <text:list-item>
          <text:p text:style-name="P354"><text:span text:style-name="T1">Grifoni di Montagna:</text:span> Creature con corpo di leone e testa d’aquila, simboli di forza e protezione. Ispirati ai grifoni della mitologia greca.</text:p>
        </text:list-item>
      </text:list>
      <text:h text:style-name="Heading_20_4" text:outline-level="4"><text:bookmark-start text:name="paludi-di-meshdad"/>Paludi di Meshdad<text:bookmark-end text:name="paludi-di-meshdad"/></text:h>
      <text:p text:style-name="First_20_paragraph">Le paludi di Meshdad, situate nella Repubblica di Meshdad, sono un habitat umido e ricco di biodiversità.</text:p>
      <text:p text:style-name="Text_20_body"><text:span text:style-name="T1">Piante Principali:</text:span></text:p>
      <text:list text:style-name="L252">
        <text:list-item>
          <text:p text:style-name="P355"><text:span text:style-name="T1">Giunco di Meshdad:</text:span> Utilizzato per intrecciare cesti e costruire tetti di capanne.</text:p>
        </text:list-item>
        <text:list-item>
          <text:p text:style-name="P355"><text:span text:style-name="T1">Ninfea Scarlatta:</text:span> Una pianta acquatica dai fiori rossi, usata per scopi medicinali e decorativi.</text:p>
        </text:list-item>
        <text:list-item>
          <text:p text:style-name="P355"><text:span text:style-name="T1">Mangrovie Nere:</text:span> Alberi che crescono lungo le rive paludose, cruciali per prevenire l’erosione del suolo.</text:p>
        </text:list-item>
      </text:list>
      <text:p text:style-name="First_20_paragraph"><text:span text:style-name="T1">Creature Mitiche:</text:span></text:p>
      <text:list text:style-name="L253">
        <text:list-item>
          <text:p text:style-name="P356"><text:span text:style-name="T1">Serpenti d’Acqua Giganti:</text:span> Creature mitiche che si dice proteggano le acque delle paludi. Ispirate ai serpenti marini della mitologia africana.</text:p>
        </text:list-item>
      </text:list>
      <text:h text:style-name="Heading_20_4" text:outline-level="4"><text:bookmark-start text:name="colline-di-ashania"/>Colline di Ashania<text:bookmark-end text:name="colline-di-ashania"/></text:h>
      <text:p text:style-name="First_20_paragraph">Le colline di Ashania, situate nella Diarchia di Ashania, sono note per la loro viticoltura e olivicoltura.</text:p>
      <text:p text:style-name="Text_20_body"><text:span text:style-name="T1">Piante Principali:</text:span></text:p>
      <text:list text:style-name="L254">
        <text:list-item>
          <text:p text:style-name="P357"><text:span text:style-name="T1">Vite di Ashania:</text:span> Produce uve di alta qualità per i vini pregiati della regione.</text:p>
        </text:list-item>
        <text:list-item>
          <text:p text:style-name="P357"><text:span text:style-name="T1">Ulivo di Ashania:</text:span> Alberi secolari che producono olive per olio e cibo.</text:p>
        </text:list-item>
        <text:list-item>
          <text:p text:style-name="P357"><text:span text:style-name="T1">Lavanda Reale:</text:span> Coltivata per il suo profumo e le sue proprietà calmanti.</text:p>
        </text:list-item>
      </text:list>
      <text:p text:style-name="First_20_paragraph"><text:span text:style-name="T1">Creature Mitiche:</text:span></text:p>
      <text:list text:style-name="L255">
        <text:list-item>
          <text:p text:style-name="P358"><text:span text:style-name="T1">Ninfe dei Vigneti:</text:span> Spiriti protettivi delle viti e delle olive, che si dice garantiscano raccolti abbondanti. Ispirate alle ninfe greche.</text:p>
        </text:list-item>
      </text:list>
      <text:h text:style-name="Heading_20_3" text:outline-level="3"><text:bookmark-start text:name="fauna"/>Fauna<text:bookmark-end text:name="fauna"/></text:h>
      <text:h text:style-name="Heading_20_4" text:outline-level="4"><text:bookmark-start text:name="foreste-di-linia-1"/>Foreste di Linia<text:bookmark-end text:name="foreste-di-linia-1"/></text:h>
      <text:p text:style-name="First_20_paragraph">Le foreste di Linia ospitano una fauna diversificata, con numerose specie di mammiferi, uccelli e rettili.</text:p>
      <text:p text:style-name="Text_20_body"><text:span text:style-name="T1">Animali Principali:</text:span></text:p>
      <text:list text:style-name="L256">
        <text:list-item>
          <text:p text:style-name="P359"><text:span text:style-name="T1">Cervo di Linia:</text:span> Un cervo di grandi dimensioni, cacciato per la sua carne e le sue pelli.</text:p>
        </text:list-item>
        <text:list-item>
          <text:p text:style-name="P359"><text:span text:style-name="T1">Lupo Grigio:</text:span> Un predatore che vive in branchi, rispettato e temuto dagli abitanti locali.</text:p>
        </text:list-item>
        <text:list-item>
          <text:p text:style-name="P359"><text:span text:style-name="T1">Aquila Reale:</text:span> Un rapace maestoso, simbolo di potere e libertà.</text:p>
        </text:list-item>
      </text:list>
      <text:p text:style-name="First_20_paragraph"><text:span text:style-name="T1">Creature Mitiche:</text:span></text:p>
      <text:list text:style-name="L257">
        <text:list-item>
          <text:p text:style-name="P360"><text:span text:style-name="T1">Fenice della Foresta:</text:span> Un uccello leggendario che si dice risorga dalle proprie ceneri. Ispirata alla fenice della mitologia egizia e greca.</text:p>
        </text:list-item>
      </text:list>
      <text:h text:style-name="Heading_20_4" text:outline-level="4"><text:bookmark-start text:name="pianure-di-vallan-1"/>Pianure di Vallan<text:bookmark-end text:name="pianure-di-vallan-1"/></text:h>
      <text:p text:style-name="First_20_paragraph">Le pianure di Vallan supportano una vasta popolazione di erbivori e predatori.</text:p>
      <text:p text:style-name="Text_20_body"><text:span text:style-name="T1">Animali Principali:</text:span></text:p>
      <text:list text:style-name="L258">
        <text:list-item>
          <text:p text:style-name="P361"><text:span text:style-name="T1">Bisonti di Vallan:</text:span> Grandi erbivori che pascolano nelle praterie, cacciati per la carne e le pelli.</text:p>
        </text:list-item>
        <text:list-item>
          <text:p text:style-name="P361"><text:span text:style-name="T1">Volpe Rossa:</text:span> Un animale astuto e adattabile, comune nelle pianure.</text:p>
        </text:list-item>
        <text:list-item>
          <text:p text:style-name="P361"><text:span text:style-name="T1">Falco Pellegrino:</text:span> Un rapace veloce e agile, utilizzato anche per la falconeria.</text:p>
        </text:list-item>
      </text:list>
      <text:p text:style-name="First_20_paragraph"><text:span text:style-name="T1">Creature Mitiche:</text:span></text:p>
      <text:list text:style-name="L259">
        <text:list-item>
          <text:p text:style-name="P362"><text:span text:style-name="T1">Cavalli Alati:</text:span> Creature mitiche che si dice possano volare, simboli di velocità e libertà. Ispirati ai cavalli alati della mitologia greca.</text:p>
        </text:list-item>
      </text:list>
      <text:h text:style-name="Heading_20_4" text:outline-level="4"><text:bookmark-start text:name="montagne-di-orethia-1"/>Montagne di Orethia<text:bookmark-end text:name="montagne-di-orethia-1"/></text:h>
      <text:p text:style-name="First_20_paragraph">Le montagne di Orethia sono abitate da animali adattati a condizioni rigide e difficili.</text:p>
      <text:p text:style-name="Text_20_body"><text:span text:style-name="T1">Animali Principali:</text:span></text:p>
      <text:list text:style-name="L260">
        <text:list-item>
          <text:p text:style-name="P363"><text:span text:style-name="T1">Stambecco di Ferro:</text:span> Un animale montano con corna robuste, che vive in altitudini elevate.</text:p>
        </text:list-item>
        <text:list-item>
          <text:p text:style-name="P363"><text:span text:style-name="T1">Lince dei Monti:</text:span> Un felino solitario e sfuggente, cacciatore abile di prede montane.</text:p>
        </text:list-item>
        <text:list-item>
          <text:p text:style-name="P363"><text:span text:style-name="T1">Aquila delle Vette:</text:span> Un rapace che nidifica sulle cime più alte, simbolo di potere e visione acuta.</text:p>
        </text:list-item>
      </text:list>
      <text:p text:style-name="First_20_paragraph"><text:span text:style-name="T1">Creature Mitiche:</text:span></text:p>
      <text:list text:style-name="L261">
        <text:list-item>
          <text:p text:style-name="P364"><text:span text:style-name="T1">Draghi delle Montagne:</text:span> Creature mitiche che si dice vivano nelle caverne delle montagne, custodi di tesori nascosti. Ispirati ai draghi della mitologia europea.</text:p>
        </text:list-item>
      </text:list>
      <text:h text:style-name="Heading_20_4" text:outline-level="4"><text:bookmark-start text:name="paludi-di-meshdad-1"/>Paludi di Meshdad<text:bookmark-end text:name="paludi-di-meshdad-1"/></text:h>
      <text:p text:style-name="First_20_paragraph">Le paludi di Meshdad ospitano una fauna adattata agli ambienti umidi e acquatici.</text:p>
      <text:p text:style-name="Text_20_body"><text:span text:style-name="T1">Animali Principali:</text:span></text:p>
      <text:list text:style-name="L262">
        <text:list-item>
          <text:p text:style-name="P365"><text:span text:style-name="T1">Coccodrillo Palustre:</text:span> Un predatore potente, che vive nei corsi d’acqua e nelle paludi.</text:p>
        </text:list-item>
        <text:list-item>
          <text:p text:style-name="P365"><text:span text:style-name="T1">Rana Dorata:</text:span> Una specie di rana colorata, conosciuta per il suo canto distintivo.</text:p>
        </text:list-item>
        <text:list-item>
          <text:p text:style-name="P365"><text:span text:style-name="T1">Airone Blu:</text:span> Un uccello elegante, che si nutre di pesci e piccoli anfibi.</text:p>
        </text:list-item>
      </text:list>
      <text:p text:style-name="First_20_paragraph"><text:span text:style-name="T1">Creature Mitiche:</text:span></text:p>
      <text:list text:style-name="L263">
        <text:list-item>
          <text:p text:style-name="P366"><text:span text:style-name="T1">Idra delle Paludi:</text:span> Una creatura mitica con molte teste, che si dice sorvegli le acque delle paludi. Ispirata all’idra della mitologia greca.</text:p>
        </text:list-item>
      </text:list>
      <text:h text:style-name="Heading_20_4" text:outline-level="4"><text:bookmark-start text:name="colline-di-ashania-1"/>Colline di Ashania<text:bookmark-end text:name="colline-di-ashania-1"/></text:h>
      <text:p text:style-name="First_20_paragraph">Le colline di Ashania supportano una fauna diversificata, con numerose specie di mammiferi, uccelli e insetti.</text:p>
      <text:p text:style-name="Text_20_body"><text:span text:style-name="T1">Animali Principali:</text:span></text:p>
      <text:list text:style-name="L264">
        <text:list-item>
          <text:p text:style-name="P367"><text:span text:style-name="T1">Capra delle Colline:</text:span> Un animale agile e resistente, allevato per il latte e la carne.</text:p>
        </text:list-item>
        <text:list-item>
          <text:p text:style-name="P367"><text:span text:style-name="T1">Cinghiale Selvatico:</text:span> Un animale robusto e feroce, cacciato per la carne e le pelli.</text:p>
        </text:list-item>
        <text:list-item>
          <text:p text:style-name="P367"><text:span text:style-name="T1">Rondine di Collina:</text:span> Un uccello migratore, simbolo di fortuna e prosperità.</text:p>
        </text:list-item>
      </text:list>
      <text:p text:style-name="First_20_paragraph"><text:span text:style-name="T1">Creature Mitiche:</text:span></text:p>
      <text:list text:style-name="L265">
        <text:list-item>
          <text:p text:style-name="P368"><text:span text:style-name="T1">Centaure della Collina:</text:span> Creature metà uomo e metà cavallo, che si dice vivano nascoste nelle colline. Ispirati ai centauri della mitologia greca.</text:p>
        </text:list-item>
      </text:list>
      <text:h text:style-name="Heading_20_3" text:outline-level="3"><text:bookmark-start text:name="risorse-naturali"/>Risorse Naturali<text:bookmark-end text:name="risorse-naturali"/></text:h>
      <text:h text:style-name="Heading_20_4" text:outline-level="4"><text:bookmark-start text:name="minerali-delle-montagne-rashiane"/>Minerali delle Montagne Rashiane<text:bookmark-end text:name="minerali-delle-montagne-rashiane"/></text:h>
      <text:p text:style-name="First_20_paragraph">Le montagne a nord-est del Marethar sono ricche di minerali preziosi.</text:p>
      <text:p text:style-name="Text_20_body"><text:span text:style-name="T1">Risorse Principali:</text:span></text:p>
      <text:list text:style-name="L266">
        <text:list-item>
          <text:p text:style-name="P369"><text:span text:style-name="T1">Oro:</text:span> Utilizzato per monete, gioielli e decorazioni.</text:p>
        </text:list-item>
        <text:list-item>
          <text:p text:style-name="P369"><text:span text:style-name="T1">Argento:</text:span> Utilizzato per utensili, monete e gioielli.</text:p>
        </text:list-item>
        <text:list-item>
          <text:p text:style-name="P369"><text:span text:style-name="T1">Ferro:</text:span> Essenziale per la costruzione di armi e strumenti.</text:p>
        </text:list-item>
      </text:list>
      <text:h text:style-name="Heading_20_4" text:outline-level="4"><text:bookmark-start text:name="legname-delle-foreste-di-linia"/>Legname delle Foreste di Linia<text:bookmark-end text:name="legname-delle-foreste-di-linia"/></text:h>
      <text:p text:style-name="First_20_paragraph">Le foreste di Linia forniscono legname di alta qualità.</text:p>
      <text:p text:style-name="Text_20_body"><text:span text:style-name="T1">Risorse Principali:</text:span></text:p>
      <text:list text:style-name="L267">
        <text:list-item>
          <text:p text:style-name="P370"><text:span text:style-name="T1">Cedro:</text:span> Utilizzato per la costruzione e l’artigianato.</text:p>
        </text:list-item>
        <text:list-item>
          <text:p text:style-name="P370"><text:span text:style-name="T1">Quercia:</text:span> Utilizzata per costruire navi e edifici.</text:p>
        </text:list-item>
        <text:list-item>
          <text:p text:style-name="P370"><text:span text:style-name="T1">Pino:</text:span> Utilizzato per la fabbricazione di mobili e utensili.</text:p>
        </text:list-item>
      </text:list>
      <text:h text:style-name="Heading_20_4" text:outline-level="4"><text:bookmark-start text:name="pesca-nel-marethar"/>Pesca nel Marethar<text:bookmark-end text:name="pesca-nel-marethar"/></text:h>
      <text:p text:style-name="First_20_paragraph">Le acque del Marethar sono ricche di risorse marine che supportano l’economia locale.</text:p>
      <text:p text:style-name="Text_20_body"><text:span text:style-name="T1">Risorse Principali:</text:span></text:p>
      <text:list text:style-name="L268">
        <text:list-item>
          <text:p text:style-name="P371"><text:span text:style-name="T1">Pesce:</text:span> Specie come il tonno, il merluzzo e le sardine sono abbondanti e costituiscono una parte essenziale della dieta locale.</text:p>
        </text:list-item>
        <text:list-item>
          <text:p text:style-name="P371"><text:span text:style-name="T1">Molluschi:</text:span> Ostriche, cozze e calamari sono raccolti lungo le coste e sono prelibatezze molto apprezzate.</text:p>
        </text:list-item>
        <text:list-item>
          <text:p text:style-name="P371"><text:span text:style-name="T1">Alghe:</text:span> Raccolte per usi medicinali e culinari, le alghe sono anche utilizzate come fertilizzanti naturali.</text:p>
        </text:list-item>
      </text:list>
      <text:h text:style-name="Heading_20_3" text:outline-level="3"><text:bookmark-start text:name="creature-mitiche-1"/>Creature Mitiche<text:bookmark-end text:name="creature-mitiche-1"/></text:h>
      <text:h text:style-name="Heading_20_4" text:outline-level="4"><text:bookmark-start text:name="thalassia-1"/>Thalassia<text:bookmark-end text:name="thalassia-1"/></text:h>
      <text:p text:style-name="First_20_paragraph"><text:span text:style-name="T1">Sirene del Marethar:</text:span> Creature mitiche che abitano le profondità del mare, note per il loro canto incantatore che attira i marinai verso pericolose scogliere. Le sirene sono ispirate alla mitologia greca e alle leggende marinare.</text:p>
      <text:p text:style-name="Text_20_body"><text:span text:style-name="T1">Leviatano:</text:span> Un gigantesco mostro marino che si dice emerga dalle profondità per affondare le navi. Questa creatura è ispirata alle storie di mostri marini presenti nelle leggende di molte culture mediterranee.</text:p>
      <text:h text:style-name="Heading_20_4" text:outline-level="4"><text:bookmark-start text:name="aridonia-1"/>Aridonia<text:bookmark-end text:name="aridonia-1"/></text:h>
      <text:p text:style-name="First_20_paragraph"><text:span text:style-name="T1">Ifrit del Deserto:</text:span> Spiriti di fuoco che abitano le dune del deserto, conosciuti per la loro capacità di manipolare le fiamme e scatenare tempeste di sabbia. Gli ifrit sono ispirati alla mitologia araba e berbera.</text:p>
      <text:p text:style-name="Text_20_body"><text:span text:style-name="T1">Roc:</text:span> Un gigantesco uccello predatore che si dice possa sollevare elefanti con i suoi artigli. Il Roc è ispirato alle leggende mediorientali e asiatiche.</text:p>
      <text:h text:style-name="Heading_20_4" text:outline-level="4"><text:bookmark-start text:name="orethia-1"/>Orethia<text:bookmark-end text:name="orethia-1"/></text:h>
      <text:p text:style-name="First_20_paragraph"><text:span text:style-name="T1">Golem di Pietra:</text:span> Creature animate create dai minatori per proteggere le miniere e le città montane. I Golem sono ispirati al folklore ebraico e alla mitologia europea.</text:p>
      <text:p text:style-name="Text_20_body"><text:span text:style-name="T1">Drago di Fuoco:</text:span> Una creatura leggendaria che abita le caverne delle montagne, conosciuta per la sua abilità di sputare fuoco. Ispirato ai draghi delle mitologie europee e ottomane.</text:p>
      <text:h text:style-name="Heading_20_4" text:outline-level="4"><text:bookmark-start text:name="naharim-2"/>Naharim<text:bookmark-end text:name="naharim-2"/></text:h>
      <text:p text:style-name="First_20_paragraph"><text:span text:style-name="T1">Anubi Guardiano:</text:span> Spiriti guardiani con testa di sciacallo che proteggono le tombe e i templi, ispirati agli dei funerari egizi. Anubi è una figura centrale nella mitologia egizia, associata alla protezione e alla guida nell’aldilà.</text:p>
      <text:p text:style-name="Text_20_body"><text:span text:style-name="T1">Serpente Arcobaleno:</text:span> Un serpente mitico che controlla le inondazioni e le piogge, simbolo di fertilità e prosperità. Ispirato ai miti degli Inca e degli Aztechi riguardo le divinità serpentine.</text:p>
      <text:h text:style-name="Heading_20_4" text:outline-level="4"><text:bookmark-start text:name="aurelia-1"/>Aurelia<text:bookmark-end text:name="aurelia-1"/></text:h>
      <text:p text:style-name="First_20_paragraph"><text:span text:style-name="T1">Grifone d’Oro:</text:span> Creatura con il corpo di leone e la testa di aquila, simbolo di potere e nobiltà. Ispirato ai grifoni della mitologia greca e romana.</text:p>
      <text:p text:style-name="Text_20_body"><text:span text:style-name="T1">Fata delle Rovine:</text:span> Spiriti che abitano le antiche rovine, conosciuti per la loro bellezza e il potere di proteggere i tesori nascosti. Le fate sono ispirate al folklore europeo e alle leggende rinascimentali.</text:p>
      <text:h text:style-name="Heading_20_4" text:outline-level="4"><text:bookmark-start text:name="lysandria-1"/>Lysandria<text:bookmark-end text:name="lysandria-1"/></text:h>
      <text:p text:style-name="First_20_paragraph"><text:span text:style-name="T1">Minotauro del Labirinto:</text:span> Creatura metà uomo e metà toro che abita i labirinti sotto le città-stato, proteggendo i segreti e le ricchezze nascoste. Ispirato alla mitologia greca, in particolare alla leggenda del Minotauro di Creta.</text:p>
      <text:p text:style-name="Text_20_body"><text:span text:style-name="T1">Hippocampo:</text:span> Creature metà cavallo e metà pesce che trainano i carri degli dei del mare. Ispirati ai racconti greci e romani di creature marine.</text:p>
      <text:h text:style-name="Heading_20_3" text:outline-level="3"><text:bookmark-start text:name="flora-e-fauna-specifica-delle-regioni"/>Flora e Fauna Specifica delle Regioni<text:bookmark-end text:name="flora-e-fauna-specifica-delle-regioni"/></text:h>
      <text:h text:style-name="Heading_20_4" text:outline-level="4"><text:bookmark-start text:name="thalassia-2"/>Thalassia<text:bookmark-end text:name="thalassia-2"/></text:h>
      <text:p text:style-name="First_20_paragraph"><text:span text:style-name="T1">Flora:</text:span></text:p>
      <text:list text:style-name="L269">
        <text:list-item>
          <text:p text:style-name="P372"><text:span text:style-name="T1">Salicornia:</text:span> Una pianta succulenta che cresce nelle zone costiere e paludose, utilizzata come alimento e medicinale.</text:p>
        </text:list-item>
        <text:list-item>
          <text:p text:style-name="P372"><text:span text:style-name="T1">Palma da Dattero:</text:span> Coltivata lungo le coste per i suoi frutti nutrienti e dolci.</text:p>
        </text:list-item>
      </text:list>
      <text:p text:style-name="First_20_paragraph"><text:span text:style-name="T1">Fauna:</text:span></text:p>
      <text:list text:style-name="L270">
        <text:list-item>
          <text:p text:style-name="P373"><text:span text:style-name="T1">Gabbiano Reale:</text:span> Un uccello marino comune lungo le coste, noto per la sua abitudine di seguire le navi in cerca di cibo.</text:p>
        </text:list-item>
        <text:list-item>
          <text:p text:style-name="P373"><text:span text:style-name="T1">Tartaruga del Marethar:</text:span> Una specie di tartaruga marina che nidifica sulle spiagge sabbiose di Thalassia.</text:p>
        </text:list-item>
      </text:list>
      <text:h text:style-name="Heading_20_4" text:outline-level="4"><text:bookmark-start text:name="aridonia-2"/>Aridonia<text:bookmark-end text:name="aridonia-2"/></text:h>
      <text:p text:style-name="First_20_paragraph"><text:span text:style-name="T1">Flora:</text:span></text:p>
      <text:list text:style-name="L271">
        <text:list-item>
          <text:p text:style-name="P374"><text:span text:style-name="T1">Acacia del Deserto:</text:span> Un albero resistente che fornisce legno e gomma arabica.</text:p>
        </text:list-item>
        <text:list-item>
          <text:p text:style-name="P374"><text:span text:style-name="T1">Cactus del Sole:</text:span> Piante succulente che immagazzinano acqua e fioriscono raramente, ma con fiori vivaci e colorati.</text:p>
        </text:list-item>
      </text:list>
      <text:p text:style-name="First_20_paragraph"><text:span text:style-name="T1">Fauna:</text:span></text:p>
      <text:list text:style-name="L272">
        <text:list-item>
          <text:p text:style-name="P375"><text:span text:style-name="T1">Fennec:</text:span> Una piccola volpe del deserto con grandi orecchie, adattata alle condizioni aride.</text:p>
        </text:list-item>
        <text:list-item>
          <text:p text:style-name="P375"><text:span text:style-name="T1">Scorpione Dorato:</text:span> Un insetto velenoso comune nelle dune sabbiose.</text:p>
        </text:list-item>
      </text:list>
      <text:h text:style-name="Heading_20_4" text:outline-level="4"><text:bookmark-start text:name="orethia-2"/>Orethia<text:bookmark-end text:name="orethia-2"/></text:h>
      <text:p text:style-name="First_20_paragraph"><text:span text:style-name="T1">Flora:</text:span></text:p>
      <text:list text:style-name="L273">
        <text:list-item>
          <text:p text:style-name="P376"><text:span text:style-name="T1">Erba di Ferro:</text:span> Una pianta robusta che cresce nelle fessure delle rocce, utilizzata per la tessitura di corde resistenti.</text:p>
        </text:list-item>
        <text:list-item>
          <text:p text:style-name="P376"><text:span text:style-name="T1">Ginestra di Montagna:</text:span> Un arbusto con fiori gialli, usato per profumare l’ambiente e come medicinale.</text:p>
        </text:list-item>
      </text:list>
      <text:p text:style-name="First_20_paragraph"><text:span text:style-name="T1">Fauna:</text:span></text:p>
      <text:list text:style-name="L274">
        <text:list-item>
          <text:p text:style-name="P377"><text:span text:style-name="T1">Yak Selvatico:</text:span> Un grande bovino che vive nelle alture montane, cacciato per la carne e la lana.</text:p>
        </text:list-item>
        <text:list-item>
          <text:p text:style-name="P377"><text:span text:style-name="T1">Falco delle Vette:</text:span> Un rapace che domina i cieli montani, usato anche per la caccia.</text:p>
        </text:list-item>
      </text:list>
      <text:h text:style-name="Heading_20_4" text:outline-level="4"><text:bookmark-start text:name="naharim-3"/>Naharim<text:bookmark-end text:name="naharim-3"/></text:h>
      <text:p text:style-name="First_20_paragraph"><text:span text:style-name="T1">Flora:</text:span></text:p>
      <text:list text:style-name="L275">
        <text:list-item>
          <text:p text:style-name="P378"><text:span text:style-name="T1">Papavero Blu:</text:span> Un fiore raro che cresce lungo le rive del grande fiume, utilizzato per scopi medicinali e rituali.</text:p>
        </text:list-item>
        <text:list-item>
          <text:p text:style-name="P378"><text:span text:style-name="T1">Loto Sacro:</text:span> Una pianta acquatica venerata e utilizzata nei rituali religiosi.</text:p>
        </text:list-item>
      </text:list>
      <text:p text:style-name="First_20_paragraph"><text:span text:style-name="T1">Fauna:</text:span></text:p>
      <text:list text:style-name="L276">
        <text:list-item>
          <text:p text:style-name="P379"><text:span text:style-name="T1">Caimano del Nilo:</text:span> Un rettile potente che abita le acque del grande fiume, temuto e rispettato.</text:p>
        </text:list-item>
        <text:list-item>
          <text:p text:style-name="P379"><text:span text:style-name="T1">Ibis Sacro:</text:span> Un uccello simbolico, spesso rappresentato nei geroglifici e nei templi.</text:p>
        </text:list-item>
      </text:list>
      <text:h text:style-name="Heading_20_4" text:outline-level="4"><text:bookmark-start text:name="aurelia-2"/>Aurelia<text:bookmark-end text:name="aurelia-2"/></text:h>
      <text:p text:style-name="First_20_paragraph"><text:span text:style-name="T1">Flora:</text:span></text:p>
      <text:list text:style-name="L277">
        <text:list-item>
          <text:p text:style-name="P380"><text:span text:style-name="T1">Alloro Reale:</text:span> Una pianta aromatica utilizzata per incoronare i vincitori e per scopi culinari.</text:p>
        </text:list-item>
        <text:list-item>
          <text:p text:style-name="P380"><text:span text:style-name="T1">Rosa di Sangue:</text:span> Una rosa rossa scura, coltivata nei giardini imperiali e utilizzata per scopi medicinali.</text:p>
        </text:list-item>
      </text:list>
      <text:p text:style-name="First_20_paragraph"><text:span text:style-name="T1">Fauna:</text:span></text:p>
      <text:list text:style-name="L278">
        <text:list-item>
          <text:p text:style-name="P381"><text:span text:style-name="T1">Lupo Imperiale:</text:span> Un predatore che vive nelle foreste e colline, simbolo di forza e unità.</text:p>
        </text:list-item>
        <text:list-item>
          <text:p text:style-name="P381"><text:span text:style-name="T1">Colomba Bianca:</text:span> Un uccello simbolo di pace e purezza, spesso tenuto come animale domestico.</text:p>
        </text:list-item>
      </text:list>
      <text:h text:style-name="Heading_20_4" text:outline-level="4"><text:bookmark-start text:name="lysandria-2"/>Lysandria<text:bookmark-end text:name="lysandria-2"/></text:h>
      <text:p text:style-name="First_20_paragraph"><text:span text:style-name="T1">Flora:</text:span></text:p>
      <text:list text:style-name="L279">
        <text:list-item>
          <text:p text:style-name="P382"><text:span text:style-name="T1">Mirto:</text:span> Una pianta aromatica utilizzata per fare profumi e in cerimonie religiose.</text:p>
        </text:list-item>
        <text:list-item>
          <text:p text:style-name="P382"><text:span text:style-name="T1">Olivo Antico:</text:span> Alberi di olivo che producono olio di alta qualità, parte integrante della dieta locale.</text:p>
        </text:list-item>
      </text:list>
      <text:p text:style-name="First_20_paragraph"><text:span text:style-name="T1">Fauna:</text:span></text:p>
      <text:list text:style-name="L280">
        <text:list-item>
          <text:p text:style-name="P383"><text:span text:style-name="T1">Delfino Lysandrico:</text:span> Un mammifero marino intelligente che spesso accompagna le navi, considerato un segno di buon auspicio.</text:p>
        </text:list-item>
        <text:list-item>
          <text:p text:style-name="P383"><text:span text:style-name="T1">Cervo Lysandrico:</text:span> Un animale elegante che abita le foreste, cacciato per la carne e le pelli.</text:p>
        </text:list-item>
      </text:list>
      <text:h text:style-name="Heading_20_2" text:outline-level="2"><text:bookmark-start text:name="società-e-cultura"/>🝟 Società e Cultura<text:bookmark-end text:name="società-e-cultura"/></text:h>
      <text:h text:style-name="Heading_20_3" text:outline-level="3"><text:bookmark-start text:name="descrizione"/>Descrizione<text:bookmark-end text:name="descrizione"/></text:h>
      <text:p text:style-name="First_20_paragraph">Il Marethar è un crogiolo di culture diverse, ciascuna con le proprie tradizioni, strutture sociali e stili di vita. Le società del Marethar sono complesse e variegate, riflettendo le influenze storiche e geografiche uniche di ciascuna regione. Questo capitolo esplora in dettaglio le strutture sociali, le tradizioni culturali, le festività, le abitudini quotidiane, l’abbigliamento, la moda, la cucina e l’alimentazione delle diverse nazioni e culture del Marethar.</text:p>
      <text:h text:style-name="Heading_20_3" text:outline-level="3"><text:bookmark-start text:name="struttura-sociale-e-classi"/>Struttura Sociale e Classi<text:bookmark-end text:name="struttura-sociale-e-classi"/></text:h>
      <text:h text:style-name="Heading_20_4" text:outline-level="4"><text:bookmark-start text:name="thalassia-3"/>Thalassia<text:bookmark-end text:name="thalassia-3"/></text:h>
      <text:p text:style-name="First_20_paragraph"><text:span text:style-name="T1">Descrizione:</text:span> La società di Thalassia è altamente stratificata, con una netta distinzione tra le classi sociali.</text:p>
      <text:list text:style-name="L281">
        <text:list-item>
          <text:p text:style-name="P384"><text:span text:style-name="T1">Nobili:</text:span> Dominano la politica e possiedono vasti possedimenti terrieri e flotte mercantili.</text:p>
        </text:list-item>
        <text:list-item>
          <text:p text:style-name="P384"><text:span text:style-name="T1">Mercanti:</text:span> Una classe potente grazie al controllo delle rotte commerciali e al commercio internazionale.</text:p>
        </text:list-item>
        <text:list-item>
          <text:p text:style-name="P384"><text:span text:style-name="T1">Artigiani e Marinai:</text:span> Rispettati per le loro abilità e contributi alla prosperità economica.</text:p>
        </text:list-item>
        <text:list-item>
          <text:p text:style-name="P384"><text:span text:style-name="T1">Lavoratori e Schiavi:</text:span> La base della piramide sociale, lavorano nelle industrie e nei porti.</text:p>
        </text:list-item>
      </text:list>
      <text:h text:style-name="Heading_20_4" text:outline-level="4"><text:bookmark-start text:name="aridonia-3"/>Aridonia<text:bookmark-end text:name="aridonia-3"/></text:h>
      <text:p text:style-name="First_20_paragraph"><text:span text:style-name="T1">Descrizione:</text:span> Aridonia è caratterizzata da una struttura sociale tribale e clanica.</text:p>
      <text:list text:style-name="L282">
        <text:list-item>
          <text:p text:style-name="P385"><text:span text:style-name="T1">Capi Tribù:</text:span> Governano i clan e prendono decisioni politiche importanti.</text:p>
        </text:list-item>
        <text:list-item>
          <text:p text:style-name="P385"><text:span text:style-name="T1">Guerrieri:</text:span> Una classe rispettata e temuta, incaricata della difesa del territorio.</text:p>
        </text:list-item>
        <text:list-item>
          <text:p text:style-name="P385"><text:span text:style-name="T1">Agricoltori e Pastori:</text:span> La maggior parte della popolazione, responsabile della produzione alimentare.</text:p>
        </text:list-item>
        <text:list-item>
          <text:p text:style-name="P385"><text:span text:style-name="T1">Artigiani:</text:span> Specializzati nella lavorazione dei metalli e nella produzione di armi.</text:p>
        </text:list-item>
      </text:list>
      <text:h text:style-name="Heading_20_4" text:outline-level="4"><text:bookmark-start text:name="orethia-3"/>Orethia<text:bookmark-end text:name="orethia-3"/></text:h>
      <text:p text:style-name="First_20_paragraph"><text:span text:style-name="T1">Descrizione:</text:span> La società di Orethia è militarizzata e gerarchica.</text:p>
      <text:list text:style-name="L283">
        <text:list-item>
          <text:p text:style-name="P386"><text:span text:style-name="T1">Nobiltà Guerriera:</text:span> Governa il paese e comanda l’esercito.</text:p>
        </text:list-item>
        <text:list-item>
          <text:p text:style-name="P386"><text:span text:style-name="T1">Minatori e Fabbri:</text:span> Cruciali per l’economia grazie alla lavorazione dei metalli.</text:p>
        </text:list-item>
        <text:list-item>
          <text:p text:style-name="P386"><text:span text:style-name="T1">Contadini:</text:span> Lavorano le terre e forniscono cibo alla popolazione.</text:p>
        </text:list-item>
        <text:list-item>
          <text:p text:style-name="P386"><text:span text:style-name="T1">Mercenari:</text:span> Guerrieri assoldati per proteggere le miniere e le fortezze.</text:p>
        </text:list-item>
      </text:list>
      <text:h text:style-name="Heading_20_4" text:outline-level="4"><text:bookmark-start text:name="naharim-4"/>Naharim<text:bookmark-end text:name="naharim-4"/></text:h>
      <text:p text:style-name="First_20_paragraph"><text:span text:style-name="T1">Descrizione:</text:span> Naharim ha una struttura sociale teocratica e agricola.</text:p>
      <text:list text:style-name="L284">
        <text:list-item>
          <text:p text:style-name="P387"><text:span text:style-name="T1">Sacerdoti:</text:span> Detengono il potere politico e religioso.</text:p>
        </text:list-item>
        <text:list-item>
          <text:p text:style-name="P387"><text:span text:style-name="T1">Guerrieri Sacri:</text:span> Difendono i templi e il territorio.</text:p>
        </text:list-item>
        <text:list-item>
          <text:p text:style-name="P387"><text:span text:style-name="T1">Agricoltori:</text:span> Coltivano le terre fertili lungo il fiume.</text:p>
        </text:list-item>
        <text:list-item>
          <text:p text:style-name="P387"><text:span text:style-name="T1">Artigiani:</text:span> Producono oggetti di valore e strumenti agricoli.</text:p>
        </text:list-item>
      </text:list>
      <text:h text:style-name="Heading_20_4" text:outline-level="4"><text:bookmark-start text:name="aurelia-3"/>Aurelia<text:bookmark-end text:name="aurelia-3"/></text:h>
      <text:p text:style-name="First_20_paragraph"><text:span text:style-name="T1">Descrizione:</text:span> L’Impero Aureliano è organizzato secondo un sistema feudale.</text:p>
      <text:list text:style-name="L285">
        <text:list-item>
          <text:p text:style-name="P388"><text:span text:style-name="T1">Imperatore:</text:span> La massima autorità politica e militare.</text:p>
        </text:list-item>
        <text:list-item>
          <text:p text:style-name="P388"><text:span text:style-name="T1">Senato e Nobiltà:</text:span> Consigliano l’imperatore e governano le province.</text:p>
        </text:list-item>
        <text:list-item>
          <text:p text:style-name="P388"><text:span text:style-name="T1">Cittadini:</text:span> Godono di diritti e partecipano alla vita politica.</text:p>
        </text:list-item>
        <text:list-item>
          <text:p text:style-name="P388"><text:span text:style-name="T1">Plebei e Schiavi:</text:span> Lavorano nelle terre e nelle città.</text:p>
        </text:list-item>
      </text:list>
      <text:h text:style-name="Heading_20_4" text:outline-level="4"><text:bookmark-start text:name="lysandria-3"/>Lysandria<text:bookmark-end text:name="lysandria-3"/></text:h>
      <text:p text:style-name="First_20_paragraph"><text:span text:style-name="T1">Descrizione:</text:span> Lysandria è una federazione di città-stato con governi democratici o oligarchici.</text:p>
      <text:list text:style-name="L286">
        <text:list-item>
          <text:p text:style-name="P389"><text:span text:style-name="T1">Arconti e Senatori:</text:span> Governano le città-stato.</text:p>
        </text:list-item>
        <text:list-item>
          <text:p text:style-name="P389"><text:span text:style-name="T1">Mercanti:</text:span> Dominano l’economia e la politica commerciale.</text:p>
        </text:list-item>
        <text:list-item>
          <text:p text:style-name="P389"><text:span text:style-name="T1">Artigiani e Marinai:</text:span> Forniscono beni e servizi essenziali.</text:p>
        </text:list-item>
        <text:list-item>
          <text:p text:style-name="P389"><text:span text:style-name="T1">Contadini:</text:span> Coltivano le terre intorno alle città-stato.</text:p>
        </text:list-item>
      </text:list>
      <text:h text:style-name="Heading_20_3" text:outline-level="3"><text:bookmark-start text:name="tradizioni-e-costumi"/>Tradizioni e Costumi<text:bookmark-end text:name="tradizioni-e-costumi"/></text:h>
      <text:h text:style-name="Heading_20_4" text:outline-level="4"><text:bookmark-start text:name="thalassia-4"/>Thalassia<text:bookmark-end text:name="thalassia-4"/></text:h>
      <text:p text:style-name="First_20_paragraph"><text:span text:style-name="T1">Tradizioni:</text:span> Forti legami marittimi e commerciali, con una cultura orientata verso il mare.</text:p>
      <text:list text:style-name="L287">
        <text:list-item>
          <text:p text:style-name="P390"><text:span text:style-name="T1">Rituali Marinari:</text:span> Preghiere e sacrifici per protezione durante i viaggi.</text:p>
        </text:list-item>
        <text:list-item>
          <text:p text:style-name="P390"><text:span text:style-name="T1">Feste Commerciali:</text:span> Celebrazioni per commemorare importanti trattati e successi commerciali.</text:p>
        </text:list-item>
      </text:list>
      <text:p text:style-name="First_20_paragraph"><text:span text:style-name="T1">Costumi:</text:span> Abitudini legate alla vita marittima, come la pesca e la navigazione.</text:p>
      <text:h text:style-name="Heading_20_4" text:outline-level="4"><text:bookmark-start text:name="aridonia-4"/>Aridonia<text:bookmark-end text:name="aridonia-4"/></text:h>
      <text:p text:style-name="First_20_paragraph"><text:span text:style-name="T1">Tradizioni:</text:span> Cultura tribale con forti legami familiari e clanici.</text:p>
      <text:list text:style-name="L288">
        <text:list-item>
          <text:p text:style-name="P391"><text:span text:style-name="T1">Rituali di Passaggio:</text:span> Cerimonie per celebrare le tappe della vita, come la nascita, il raggiungimento dell’età adulta e il matrimonio.</text:p>
        </text:list-item>
        <text:list-item>
          <text:p text:style-name="P391"><text:span text:style-name="T1">Feste del Raccolto:</text:span> Celebrazioni per ringraziare gli dei per i raccolti abbondanti.</text:p>
        </text:list-item>
      </text:list>
      <text:p text:style-name="First_20_paragraph"><text:span text:style-name="T1">Costumi:</text:span> Vita nomade con una forte enfasi sull’onore e sulla tradizione.</text:p>
      <text:h text:style-name="Heading_20_4" text:outline-level="4"><text:bookmark-start text:name="orethia-4"/>Orethia<text:bookmark-end text:name="orethia-4"/></text:h>
      <text:p text:style-name="First_20_paragraph"><text:span text:style-name="T1">Tradizioni:</text:span> Cultura militarizzata con un’enfasi sulla disciplina e sulla forza.</text:p>
      <text:list text:style-name="L289">
        <text:list-item>
          <text:p text:style-name="P392"><text:span text:style-name="T1">Cerimonie Militari:</text:span> Parate e celebrazioni per onorare gli eroi di guerra.</text:p>
        </text:list-item>
        <text:list-item>
          <text:p text:style-name="P392"><text:span text:style-name="T1">Feste Minerarie:</text:span> Celebrazioni per ringraziare le divinità delle miniere.</text:p>
        </text:list-item>
      </text:list>
      <text:p text:style-name="First_20_paragraph"><text:span text:style-name="T1">Costumi:</text:span> Vita rigorosa e disciplinata, con una forte enfasi sul coraggio e sulla lealtà.</text:p>
      <text:h text:style-name="Heading_20_4" text:outline-level="4"><text:bookmark-start text:name="naharim-5"/>Naharim<text:bookmark-end text:name="naharim-5"/></text:h>
      <text:p text:style-name="First_20_paragraph"><text:span text:style-name="T1">Tradizioni:</text:span> Cultura agricola e religiosa, con una forte connessione con il fiume sacro.</text:p>
      <text:list text:style-name="L290">
        <text:list-item>
          <text:p text:style-name="P393"><text:span text:style-name="T1">Riti di Fertilità:</text:span> Cerimonie per assicurare la fertilità delle terre.</text:p>
        </text:list-item>
        <text:list-item>
          <text:p text:style-name="P393"><text:span text:style-name="T1">Feste del Fiume:</text:span> Celebrazioni per ringraziare il fiume per la sua abbondanza.</text:p>
        </text:list-item>
      </text:list>
      <text:p text:style-name="First_20_paragraph"><text:span text:style-name="T1">Costumi:</text:span> Vita centrata attorno al fiume, con una forte enfasi sulla spiritualità e sulla natura.</text:p>
      <text:h text:style-name="Heading_20_4" text:outline-level="4"><text:bookmark-start text:name="aurelia-4"/>Aurelia<text:bookmark-end text:name="aurelia-4"/></text:h>
      <text:p text:style-name="First_20_paragraph"><text:span text:style-name="T1">Tradizioni:</text:span> Cultura imperiale con una forte enfasi sull’arte e la scienza.</text:p>
      <text:list text:style-name="L291">
        <text:list-item>
          <text:p text:style-name="P394"><text:span text:style-name="T1">Feste Imperiali:</text:span> Celebrazioni per onorare l’imperatore e le vittorie militari.</text:p>
        </text:list-item>
        <text:list-item>
          <text:p text:style-name="P394"><text:span text:style-name="T1">Riti di Fondazione:</text:span> Cerimonie per celebrare la fondazione di nuove città e opere pubbliche.</text:p>
        </text:list-item>
      </text:list>
      <text:p text:style-name="First_20_paragraph"><text:span text:style-name="T1">Costumi:</text:span> Vita urbana con una forte enfasi sulla cultura e sulla conoscenza.</text:p>
      <text:h text:style-name="Heading_20_4" text:outline-level="4"><text:bookmark-start text:name="lysandria-4"/>Lysandria<text:bookmark-end text:name="lysandria-4"/></text:h>
      <text:p text:style-name="First_20_paragraph"><text:span text:style-name="T1">Tradizioni:</text:span> Cultura democratica con una forte enfasi sulla partecipazione civica.</text:p>
      <text:list text:style-name="L292">
        <text:list-item>
          <text:p text:style-name="P395"><text:span text:style-name="T1">Elezioni e Assemblee:</text:span> Celebrazioni per le elezioni e le assemblee civiche.</text:p>
        </text:list-item>
        <text:list-item>
          <text:p text:style-name="P395"><text:span text:style-name="T1">Feste Marittime:</text:span> Celebrazioni per onorare i successi commerciali e marittimi.</text:p>
        </text:list-item>
      </text:list>
      <text:p text:style-name="First_20_paragraph"><text:span text:style-name="T1">Costumi:</text:span> Vita cittadina con una forte enfasi sulla partecipazione comunitaria e sulla democrazia.</text:p>
      <text:h text:style-name="Heading_20_3" text:outline-level="3"><text:bookmark-start text:name="abbigliamento-e-moda"/>Abbigliamento e Moda<text:bookmark-end text:name="abbigliamento-e-moda"/></text:h>
      <text:h text:style-name="Heading_20_4" text:outline-level="4"><text:bookmark-start text:name="thalassia-5"/>Thalassia<text:bookmark-end text:name="thalassia-5"/></text:h>
      <text:p text:style-name="First_20_paragraph"><text:span text:style-name="T1">Descrizione:</text:span> Abbigliamento pratico e decorativo, influenzato dalla vita marittima e commerciale.</text:p>
      <text:list text:style-name="L293">
        <text:list-item>
          <text:p text:style-name="P396"><text:span text:style-name="T1">Vestiti di Lino e Seta:</text:span> Tessuti leggeri adatti al clima costiero.</text:p>
        </text:list-item>
        <text:list-item>
          <text:p text:style-name="P396"><text:span text:style-name="T1">Gioielli di Conchiglie e Perle:</text:span> Accessori ricavati dal mare.</text:p>
        </text:list-item>
      </text:list>
      <text:p text:style-name="First_20_paragraph"><text:span text:style-name="T1">Moda:</text:span> Stile elegante ma funzionale, con un forte uso di colori vivaci e motivi marini.</text:p>
      <text:h text:style-name="Heading_20_4" text:outline-level="4"><text:bookmark-start text:name="aridonia-5"/>Aridonia<text:bookmark-end text:name="aridonia-5"/></text:h>
      <text:p text:style-name="First_20_paragraph"><text:span text:style-name="T1">Descrizione:</text:span> Abbigliamento adattato al clima desertico e alla vita nomade.</text:p>
      <text:list text:style-name="L294">
        <text:list-item>
          <text:p text:style-name="P397"><text:span text:style-name="T1">Tuniche di Cotone:</text:span> Abiti leggeri che proteggono dal sole.</text:p>
        </text:list-item>
        <text:list-item>
          <text:p text:style-name="P397"><text:span text:style-name="T1">Sandali e Turbanti:</text:span> Scarpe comode e copricapi per proteggersi dal sole e dalla sabbia.</text:p>
        </text:list-item>
      </text:list>
      <text:p text:style-name="First_20_paragraph"><text:span text:style-name="T1">Moda:</text:span> Stile pratico e semplice, con un uso di tessuti naturali e colori neutri.</text:p>
      <text:h text:style-name="Heading_20_4" text:outline-level="4"><text:bookmark-start text:name="orethia-5"/>Orethia<text:bookmark-end text:name="orethia-5"/></text:h>
      <text:p text:style-name="First_20_paragraph"><text:span text:style-name="T1">Descrizione:</text:span> Abbigliamento robusto e resistente, adatto alla vita montana e militare.</text:p>
      <text:list text:style-name="L295">
        <text:list-item>
          <text:p text:style-name="P398"><text:span text:style-name="T1">Vestiti di Lana e Pelle:</text:span> Materiali caldi e durevoli.</text:p>
        </text:list-item>
        <text:list-item>
          <text:p text:style-name="P398"><text:span text:style-name="T1">Armature e Mantelli:</text:span> Abiti rinforzati per protezione.</text:p>
        </text:list-item>
      </text:list>
      <text:p text:style-name="First_20_paragraph"><text:span text:style-name="T1">Moda:</text:span> Stile robusto e funzionale, con un’enfasi sulla praticità e la protezione.</text:p>
      <text:h text:style-name="Heading_20_4" text:outline-level="4"><text:bookmark-start text:name="naharim-6"/>Naharim<text:bookmark-end text:name="naharim-6"/></text:h>
      <text:p text:style-name="First_20_paragraph"><text:span text:style-name="T1">Descrizione:</text:span> Abbigliamento leggero e decorato, influenzato dalla cultura fluviale.</text:p>
      <text:list text:style-name="L296">
        <text:list-item>
          <text:p text:style-name="P399"><text:span text:style-name="T1">Tessuti di Cotone e Lino:</text:span> Abiti freschi e comodi.</text:p>
        </text:list-item>
        <text:list-item>
          <text:p text:style-name="P399"><text:span text:style-name="T1">Gioielli di Oro e Lapislazzuli:</text:span> Accessori preziosi e decorativi.</text:p>
        </text:list-item>
      </text:list>
      <text:p text:style-name="First_20_paragraph"><text:span text:style-name="T1">Moda:</text:span> Stile elegante e decorativo, con un uso di colori vivaci e motivi naturali.</text:p>
      <text:h text:style-name="Heading_20_4" text:outline-level="4"><text:bookmark-start text:name="aurelia-5"/>Aurelia<text:bookmark-end text:name="aurelia-5"/></text:h>
      <text:p text:style-name="First_20_paragraph"><text:span text:style-name="T1">Descrizione:</text:span> Abbigliamento sofisticato e ricercato, influenzato dall’arte e dalla cultura imperiale.</text:p>
      <text:list text:style-name="L297">
        <text:list-item>
          <text:p text:style-name="P400"><text:span text:style-name="T1">Toghe e Tuniche:</text:span> Abiti eleganti e formali.</text:p>
        </text:list-item>
        <text:list-item>
          <text:p text:style-name="P400"><text:span text:style-name="T1">Gioielli di Oro e Argento:</text:span> Accessori elaborati e preziosi.</text:p>
        </text:list-item>
      </text:list>
      <text:p text:style-name="First_20_paragraph"><text:span text:style-name="T1">Moda:</text:span> Stile elegante e formale, con un’enfasi sulla ricchezza e l’arte.</text:p>
      <text:h text:style-name="Heading_20_4" text:outline-level="4"><text:bookmark-start text:name="lysandria-5"/>Lysandria<text:bookmark-end text:name="lysandria-5"/></text:h>
      <text:p text:style-name="First_20_paragraph"><text:span text:style-name="T1">Descrizione:</text:span> Abbigliamento funzionale e democratico, adatto alla vita cittadina e marittima.</text:p>
      <text:list text:style-name="L298">
        <text:list-item>
          <text:p text:style-name="P401"><text:span text:style-name="T1">Tessuti di Lino e Cotone:</text:span> Abiti leggeri e comodi.</text:p>
        </text:list-item>
        <text:list-item>
          <text:p text:style-name="P401"><text:span text:style-name="T1">Accessori di Bronzo e Argento:</text:span> Gioielli semplici ma eleganti.</text:p>
        </text:list-item>
      </text:list>
      <text:p text:style-name="First_20_paragraph"><text:span text:style-name="T1">Moda:</text:span> Stile pratico e funzionale, con un uso di colori vivaci e motivi geometrici.</text:p>
      <text:h text:style-name="Heading_20_3" text:outline-level="3"><text:bookmark-start text:name="festività-e-celebrazioni"/>Festività e Celebrazioni<text:bookmark-end text:name="festività-e-celebrazioni"/></text:h>
      <text:h text:style-name="Heading_20_4" text:outline-level="4"><text:bookmark-start text:name="thalassia-6"/>Thalassia<text:bookmark-end text:name="thalassia-6"/></text:h>
      <text:p text:style-name="First_20_paragraph"><text:span text:style-name="T1">Descrizione:</text:span> Le festività di Thalassia sono strettamente legate al mare e al commercio.</text:p>
      <text:list text:style-name="L299">
        <text:list-item>
          <text:p text:style-name="P402"><text:span text:style-name="T1">Festa delle Onde:</text:span> Celebrazione del mare con gare di vela e pesca. La popolazione partecipa a regate e competizioni di pesca, seguite da festeggiamenti con musica, danze e banchetti a base di pesce e frutti di mare.</text:p>
        </text:list-item>
        <text:list-item>
          <text:p text:style-name="P402"><text:span text:style-name="T1">Giornata dei Mercanti:</text:span> Festa in onore dei mercanti con mercati aperti e fiere. Vengono organizzate parate e spettacoli teatrali che celebrano le storie di avventurosi mercanti e grandi scambi commerciali.</text:p>
        </text:list-item>
      </text:list>
      <text:h text:style-name="Heading_20_4" text:outline-level="4"><text:bookmark-start text:name="aridonia-6"/>Aridonia<text:bookmark-end text:name="aridonia-6"/></text:h>
      <text:p text:style-name="First_20_paragraph"><text:span text:style-name="T1">Descrizione:</text:span> Le festività di Aridonia sono influenzate dalla cultura tribale e dalle stagioni.</text:p>
      <text:list text:style-name="L300">
        <text:list-item>
          <text:p text:style-name="P403"><text:span text:style-name="T1">Festa del Solstizio:</text:span> Celebrazione del solstizio d’estate con danze tribali e sacrifici agli spiriti del deserto. Le tribù si riuniscono attorno ai fuochi e offrono preghiere e canti per chiedere protezione e prosperità.</text:p>
        </text:list-item>
        <text:list-item>
          <text:p text:style-name="P403"><text:span text:style-name="T1">Festa della Pioggia:</text:span> Celebrazione della prima pioggia della stagione con riti di ringraziamento e feste comunitarie. Si organizzano danze sotto la pioggia e si consumano pasti abbondanti in segno di gratitudine agli dei.</text:p>
        </text:list-item>
      </text:list>
      <text:h text:style-name="Heading_20_4" text:outline-level="4"><text:bookmark-start text:name="orethia-6"/>Orethia<text:bookmark-end text:name="orethia-6"/></text:h>
      <text:p text:style-name="First_20_paragraph"><text:span text:style-name="T1">Descrizione:</text:span> Le festività di Orethia sono fortemente legate alla vita militare e alle risorse minerarie.</text:p>
      <text:list text:style-name="L301">
        <text:list-item>
          <text:p text:style-name="P404"><text:span text:style-name="T1">Giornata dell’Eroe:</text:span> Celebrazione degli eroi di guerra con parate militari e cerimonie di premiazione. I guerrieri sono onorati con medaglie e discorsi patriottici.</text:p>
        </text:list-item>
        <text:list-item>
          <text:p text:style-name="P404"><text:span text:style-name="T1">Festa della Miniera:</text:span> Celebrazione del lavoro nelle miniere con giochi, competizioni di forza e banchetti. I minatori partecipano a gare di abilità e resistenza, e vengono premiati per il loro duro lavoro.</text:p>
        </text:list-item>
      </text:list>
      <text:h text:style-name="Heading_20_4" text:outline-level="4"><text:bookmark-start text:name="naharim-7"/>Naharim<text:bookmark-end text:name="naharim-7"/></text:h>
      <text:p text:style-name="First_20_paragraph"><text:span text:style-name="T1">Descrizione:</text:span> Le festività di Naharim sono influenzate dalla cultura fluviale e religiosa.</text:p>
      <text:list text:style-name="L302">
        <text:list-item>
          <text:p text:style-name="P405"><text:span text:style-name="T1">Festa del Fiume:</text:span> Celebrazione della vita lungo il fiume con processioni in barca e offerte agli dei dell’acqua. Le comunità si riuniscono sulle rive del fiume per partecipare a riti purificatori e festeggiamenti.</text:p>
        </text:list-item>
        <text:list-item>
          <text:p text:style-name="P405"><text:span text:style-name="T1">Festa della Fertilità:</text:span> Celebrazione della fertilità della terra con riti agricoli e danze. Gli agricoltori offrono i primi frutti del raccolto agli dei e partecipano a balli che simboleggiano la crescita e la prosperità.</text:p>
        </text:list-item>
      </text:list>
      <text:h text:style-name="Heading_20_4" text:outline-level="4"><text:bookmark-start text:name="aurelia-6"/>Aurelia<text:bookmark-end text:name="aurelia-6"/></text:h>
      <text:p text:style-name="First_20_paragraph"><text:span text:style-name="T1">Descrizione:</text:span> Le festività di Aurelia riflettono la ricchezza della cultura imperiale e le conquiste storiche.</text:p>
      <text:list text:style-name="L303">
        <text:list-item>
          <text:p text:style-name="P406"><text:span text:style-name="T1">Festa dell’Imperatore:</text:span> Celebrazione in onore dell’imperatore con parate, spettacoli e banchetti sontuosi. La popolazione partecipa a giochi e tornei in onore del sovrano.</text:p>
        </text:list-item>
        <text:list-item>
          <text:p text:style-name="P406"><text:span text:style-name="T1">Giornata delle Arti:</text:span> Celebrazione delle arti e della cultura con esposizioni, concerti e rappresentazioni teatrali. Artisti e artigiani mostrano le loro opere, e vengono assegnati premi ai migliori.</text:p>
        </text:list-item>
      </text:list>
      <text:h text:style-name="Heading_20_4" text:outline-level="4"><text:bookmark-start text:name="lysandria-6"/>Lysandria<text:bookmark-end text:name="lysandria-6"/></text:h>
      <text:p text:style-name="First_20_paragraph"><text:span text:style-name="T1">Descrizione:</text:span> Le festività di Lysandria sono strettamente legate alla democrazia e alla vita cittadina.</text:p>
      <text:list text:style-name="L304">
        <text:list-item>
          <text:p text:style-name="P407"><text:span text:style-name="T1">Festa della Democrazia:</text:span> Celebrazione delle istituzioni democratiche con assemblee pubbliche, discorsi e gare sportive. I cittadini discutono di politica e partecipano a competizioni atletiche.</text:p>
        </text:list-item>
        <text:list-item>
          <text:p text:style-name="P407"><text:span text:style-name="T1">Festa del Mare:</text:span> Celebrazione delle tradizioni marittime con regate, giochi nautici e feste in riva al mare. Le città-stato organizzano competizioni tra le loro flotte e festeggiano con canti e danze.</text:p>
        </text:list-item>
      </text:list>
      <text:h text:style-name="Heading_20_3" text:outline-level="3"><text:bookmark-start text:name="cucina-e-alimentazione"/>Cucina e Alimentazione<text:bookmark-end text:name="cucina-e-alimentazione"/></text:h>
      <text:h text:style-name="Heading_20_4" text:outline-level="4"><text:bookmark-start text:name="thalassia-7"/>Thalassia<text:bookmark-end text:name="thalassia-7"/></text:h>
      <text:p text:style-name="First_20_paragraph"><text:span text:style-name="T1">Descrizione:</text:span> La cucina di Thalassia è ricca di sapori marini e influenze mediterranee.</text:p>
      <text:list text:style-name="L305">
        <text:list-item>
          <text:p text:style-name="P408"><text:span text:style-name="T1">Piatti Principali:</text:span> Pesce alla griglia, zuppe di frutti di mare, e insalate di alghe.</text:p>
        </text:list-item>
        <text:list-item>
          <text:p text:style-name="P408"><text:span text:style-name="T1">Bevande:</text:span> Vini leggeri e rinfrescanti, e infusi di erbe marine.</text:p>
        </text:list-item>
        <text:list-item>
          <text:p text:style-name="P408"><text:span text:style-name="T1">Dessert:</text:span> Dolci a base di miele e frutta secca, come i baklava.</text:p>
        </text:list-item>
      </text:list>
      <text:p text:style-name="First_20_paragraph"><text:span text:style-name="T1">Stile di Alimentazione:</text:span> Pasti leggeri e freschi, con una forte enfasi sui prodotti del mare e sull’uso di erbe aromatiche.</text:p>
      <text:h text:style-name="Heading_20_4" text:outline-level="4"><text:bookmark-start text:name="aridonia-7"/>Aridonia<text:bookmark-end text:name="aridonia-7"/></text:h>
      <text:p text:style-name="First_20_paragraph"><text:span text:style-name="T1">Descrizione:</text:span> La cucina di Aridonia è influenzata dalle risorse desertiche e dalle tradizioni tribali.</text:p>
      <text:list text:style-name="L306">
        <text:list-item>
          <text:p text:style-name="P409"><text:span text:style-name="T1">Piatti Principali:</text:span> Stufati di carne e verdure, couscous, e pane non lievitato.</text:p>
        </text:list-item>
        <text:list-item>
          <text:p text:style-name="P409"><text:span text:style-name="T1">Bevande:</text:span> Latte di cammella, tè alla menta, e infusi di spezie.</text:p>
        </text:list-item>
        <text:list-item>
          <text:p text:style-name="P409"><text:span text:style-name="T1">Dessert:</text:span> Dolci a base di datteri e noci, come i makroud.</text:p>
        </text:list-item>
      </text:list>
      <text:p text:style-name="First_20_paragraph"><text:span text:style-name="T1">Stile di Alimentazione:</text:span> Pasti sostanziosi e nutrienti, con una forte enfasi su carne, cereali e spezie.</text:p>
      <text:h text:style-name="Heading_20_4" text:outline-level="4"><text:bookmark-start text:name="orethia-7"/>Orethia<text:bookmark-end text:name="orethia-7"/></text:h>
      <text:p text:style-name="First_20_paragraph"><text:span text:style-name="T1">Descrizione:</text:span> La cucina di Orethia è robusta e calorica, adatta alla vita montana.</text:p>
      <text:list text:style-name="L307">
        <text:list-item>
          <text:p text:style-name="P410"><text:span text:style-name="T1">Piatti Principali:</text:span> Arrosti di carne, zuppe di legumi, e formaggi stagionati.</text:p>
        </text:list-item>
        <text:list-item>
          <text:p text:style-name="P410"><text:span text:style-name="T1">Bevande:</text:span> Birra scura e vini robusti.</text:p>
        </text:list-item>
        <text:list-item>
          <text:p text:style-name="P410"><text:span text:style-name="T1">Dessert:</text:span> Torte di frutta secca e miele, come i baklava di montagna.</text:p>
        </text:list-item>
      </text:list>
      <text:p text:style-name="First_20_paragraph"><text:span text:style-name="T1">Stile di Alimentazione:</text:span> Pasti ricchi e abbondanti, con un’attenzione particolare alle proteine e ai grassi per affrontare il clima rigido.</text:p>
      <text:h text:style-name="Heading_20_4" text:outline-level="4"><text:bookmark-start text:name="naharim-8"/>Naharim<text:bookmark-end text:name="naharim-8"/></text:h>
      <text:p text:style-name="First_20_paragraph"><text:span text:style-name="T1">Descrizione:</text:span> La cucina di Naharim è influenzata dalla cultura fluviale e dalle risorse agricole.</text:p>
      <text:list text:style-name="L308">
        <text:list-item>
          <text:p text:style-name="P411"><text:span text:style-name="T1">Piatti Principali:</text:span> Riso e legumi, pesce d’acqua dolce, e piatti a base di verdure.</text:p>
        </text:list-item>
        <text:list-item>
          <text:p text:style-name="P411"><text:span text:style-name="T1">Bevande:</text:span> Succo di frutta fresca, vino di palma, e infusi di erbe.</text:p>
        </text:list-item>
        <text:list-item>
          <text:p text:style-name="P411"><text:span text:style-name="T1">Dessert:</text:span> Dolci a base di latte e frutta, come il flan di cocco.</text:p>
        </text:list-item>
      </text:list>
      <text:p text:style-name="First_20_paragraph"><text:span text:style-name="T1">Stile di Alimentazione:</text:span> Pasti bilanciati e nutrienti, con un’abbondanza di frutta, verdura e pesce.</text:p>
      <text:h text:style-name="Heading_20_4" text:outline-level="4"><text:bookmark-start text:name="aurelia-7"/>Aurelia<text:bookmark-end text:name="aurelia-7"/></text:h>
      <text:p text:style-name="First_20_paragraph"><text:span text:style-name="T1">Descrizione:</text:span> La cucina di Aurelia è raffinata e varia, riflettendo l’influenza imperiale.</text:p>
      <text:list text:style-name="L309">
        <text:list-item>
          <text:p text:style-name="P412"><text:span text:style-name="T1">Piatti Principali:</text:span> Paste e risotti, carne arrosto, e zuppe di verdure.</text:p>
        </text:list-item>
        <text:list-item>
          <text:p text:style-name="P412"><text:span text:style-name="T1">Bevande:</text:span> Vini pregiati e liquori aromatici.</text:p>
        </text:list-item>
        <text:list-item>
          <text:p text:style-name="P412"><text:span text:style-name="T1">Dessert:</text:span> Dolci a base di crema e frutta, come il tiramisù e la panna cotta.</text:p>
        </text:list-item>
      </text:list>
      <text:p text:style-name="First_20_paragraph"><text:span text:style-name="T1">Stile di Alimentazione:</text:span> Pasti sofisticati e saporiti, con un’attenzione particolare alla presentazione e alla qualità degli ingredienti.</text:p>
      <text:h text:style-name="Heading_20_4" text:outline-level="4"><text:bookmark-start text:name="lysandria-7"/>Lysandria<text:bookmark-end text:name="lysandria-7"/></text:h>
      <text:p text:style-name="First_20_paragraph"><text:span text:style-name="T1">Descrizione:</text:span> La cucina di Lysandria è semplice e salutare, influenzata dalle risorse locali e dalle tradizioni democratiche.</text:p>
      <text:list text:style-name="L310">
        <text:list-item>
          <text:p text:style-name="P413"><text:span text:style-name="T1">Piatti Principali:</text:span> Pesce alla griglia, insalate di verdure fresche, e pane integrale.</text:p>
        </text:list-item>
        <text:list-item>
          <text:p text:style-name="P413"><text:span text:style-name="T1">Bevande:</text:span> Vini bianchi leggeri e tisane aromatiche.</text:p>
        </text:list-item>
        <text:list-item>
          <text:p text:style-name="P413"><text:span text:style-name="T1">Dessert:</text:span> Dolci a base di miele e noci, come i pasticcini di miele.</text:p>
        </text:list-item>
      </text:list>
      <text:p text:style-name="First_20_paragraph"><text:span text:style-name="T1">Stile di Alimentazione:</text:span> Pasti leggeri e bilanciati, con un’enfasi sui prodotti freschi e locali.</text:p>
      <text:h text:style-name="Heading_20_2" text:outline-level="2"><text:bookmark-start text:name="economia-e-commercio"/>🜋 Economia e Commercio<text:bookmark-end text:name="economia-e-commercio"/></text:h>
      <text:h text:style-name="Heading_20_3" text:outline-level="3"><text:bookmark-start text:name="descrizione-1"/><text:span text:style-name="T1">Descrizione</text:span><text:bookmark-end text:name="descrizione-1"/></text:h>
      <text:p text:style-name="First_20_paragraph">L’economia del Marethar è una complessa rete di scambi e produzione, alimentata dalle ricche risorse naturali della regione e dalle tecnologie avanzate. Le diverse nazioni del Marethar sfruttano le loro risorse uniche e sviluppano industrie specializzate, creando una dinamica di interdipendenza e competizione. Questo capitolo esplora le principali risorse naturali, le industrie, le rotte commerciali, i sistemi monetari e i mercati che animano l’economia del Marethar.</text:p>
      <text:h text:style-name="Heading_20_3" text:outline-level="3"><text:bookmark-start text:name="risorse-naturali-e-industrie-principali"/><text:span text:style-name="T1">Risorse Naturali e Industrie Principali</text:span><text:bookmark-end text:name="risorse-naturali-e-industrie-principali"/></text:h>
      <text:h text:style-name="Heading_20_4" text:outline-level="4"><text:bookmark-start text:name="thalassia-8"/>Thalassia<text:bookmark-end text:name="thalassia-8"/></text:h>
      <text:p text:style-name="First_20_paragraph"><text:span text:style-name="T1">Risorse Naturali:</text:span></text:p>
      <text:list text:style-name="L311">
        <text:list-item>
          <text:p text:style-name="P414"><text:span text:style-name="T1">Pesce e Frutti di Mare:</text:span> Le acque del Marethar sono ricche di pesci, molluschi e alghe.</text:p>
        </text:list-item>
        <text:list-item>
          <text:p text:style-name="P414"><text:span text:style-name="T1">Perle e Conchiglie:</text:span> Raccolte lungo le coste e utilizzate per gioielli e decorazioni.</text:p>
        </text:list-item>
      </text:list>
      <text:p text:style-name="First_20_paragraph"><text:span text:style-name="T1">Industrie Principali:</text:span></text:p>
      <text:list text:style-name="L312">
        <text:list-item>
          <text:p text:style-name="P415"><text:span text:style-name="T1">Pesca e Acquacoltura:</text:span> La pesca è la spina dorsale dell’economia, con tecniche avanzate di acquacoltura.</text:p>
        </text:list-item>
        <text:list-item>
          <text:p text:style-name="P415"><text:span text:style-name="T1">Cantieristica Navale:</text:span> Thalassia è famosa per la costruzione di navi robuste e ben equipaggiate.</text:p>
        </text:list-item>
      </text:list>
      <text:h text:style-name="Heading_20_4" text:outline-level="4"><text:bookmark-start text:name="aridonia-8"/>Aridonia<text:bookmark-end text:name="aridonia-8"/></text:h>
      <text:p text:style-name="First_20_paragraph"><text:span text:style-name="T1">Risorse Naturali:</text:span></text:p>
      <text:list text:style-name="L313">
        <text:list-item>
          <text:p text:style-name="P416"><text:span text:style-name="T1">Metalli Preziosi:</text:span> Oro, argento e rame estratti dalle miniere.</text:p>
        </text:list-item>
        <text:list-item>
          <text:p text:style-name="P416"><text:span text:style-name="T1">Spezie e Erbe:</text:span> Coltivate nelle oasi e lungo i fiumi.</text:p>
        </text:list-item>
      </text:list>
      <text:p text:style-name="First_20_paragraph"><text:span text:style-name="T1">Industrie Principali:</text:span></text:p>
      <text:list text:style-name="L314">
        <text:list-item>
          <text:p text:style-name="P417"><text:span text:style-name="T1">Metallurgia:</text:span> Aridonia è rinomata per la lavorazione dei metalli e la produzione di armi e gioielli.</text:p>
        </text:list-item>
        <text:list-item>
          <text:p text:style-name="P417"><text:span text:style-name="T1">Commercio delle Spezie:</text:span> Le spezie sono esportate in tutto il Marethar, alimentando un commercio fiorente.</text:p>
        </text:list-item>
      </text:list>
      <text:h text:style-name="Heading_20_4" text:outline-level="4"><text:bookmark-start text:name="orethia-8"/>Orethia<text:bookmark-end text:name="orethia-8"/></text:h>
      <text:p text:style-name="First_20_paragraph"><text:span text:style-name="T1">Risorse Naturali:</text:span></text:p>
      <text:list text:style-name="L315">
        <text:list-item>
          <text:p text:style-name="P418"><text:span text:style-name="T1">Minerali:</text:span> Ferro, carbone e pietre preziose estratti dalle montagne.</text:p>
        </text:list-item>
        <text:list-item>
          <text:p text:style-name="P418"><text:span text:style-name="T1">Legname:</text:span> Alberi resistenti utilizzati per la costruzione e l’artigianato.</text:p>
        </text:list-item>
      </text:list>
      <text:p text:style-name="First_20_paragraph"><text:span text:style-name="T1">Industrie Principali:</text:span></text:p>
      <text:list text:style-name="L316">
        <text:list-item>
          <text:p text:style-name="P419"><text:span text:style-name="T1">Estrazione Mineraria:</text:span> L’estrazione e la lavorazione dei minerali sono fondamentali per l’economia.</text:p>
        </text:list-item>
        <text:list-item>
          <text:p text:style-name="P419"><text:span text:style-name="T1">Produzione di Armi:</text:span> Orethia è nota per la produzione di armi di alta qualità, esportate in tutto il Marethar.</text:p>
        </text:list-item>
      </text:list>
      <text:h text:style-name="Heading_20_4" text:outline-level="4"><text:bookmark-start text:name="naharim-9"/>Naharim<text:bookmark-end text:name="naharim-9"/></text:h>
      <text:p text:style-name="First_20_paragraph"><text:span text:style-name="T1">Risorse Naturali:</text:span></text:p>
      <text:list text:style-name="L317">
        <text:list-item>
          <text:p text:style-name="P420"><text:span text:style-name="T1">Riso e Grano:</text:span> Coltivati lungo le rive fertili del grande fiume.</text:p>
        </text:list-item>
        <text:list-item>
          <text:p text:style-name="P420"><text:span text:style-name="T1">Piante Medicinali:</text:span> Utilizzate per scopi terapeutici e religiosi.</text:p>
        </text:list-item>
      </text:list>
      <text:p text:style-name="First_20_paragraph"><text:span text:style-name="T1">Industrie Principali:</text:span></text:p>
      <text:list text:style-name="L318">
        <text:list-item>
          <text:p text:style-name="P421"><text:span text:style-name="T1">Agricoltura:</text:span> La produzione di riso e grano è la base dell’economia, con tecniche avanzate di irrigazione.</text:p>
        </text:list-item>
        <text:list-item>
          <text:p text:style-name="P421"><text:span text:style-name="T1">Produzione di Erbe Medicinali:</text:span> Le erbe sono coltivate e lavorate per creare rimedi e pozioni.</text:p>
        </text:list-item>
      </text:list>
      <text:h text:style-name="Heading_20_4" text:outline-level="4"><text:bookmark-start text:name="aurelia-8"/>Aurelia<text:bookmark-end text:name="aurelia-8"/></text:h>
      <text:p text:style-name="First_20_paragraph"><text:span text:style-name="T1">Risorse Naturali:</text:span></text:p>
      <text:list text:style-name="L319">
        <text:list-item>
          <text:p text:style-name="P422"><text:span text:style-name="T1">Vino e Olio d’Oliva:</text:span> Coltivati nelle pianure e nelle colline.</text:p>
        </text:list-item>
        <text:list-item>
          <text:p text:style-name="P422"><text:span text:style-name="T1">Marmi e Pietre Pregiate:</text:span> Estratti dalle cave e utilizzati per la costruzione.</text:p>
        </text:list-item>
      </text:list>
      <text:p text:style-name="First_20_paragraph"><text:span text:style-name="T1">Industrie Principali:</text:span></text:p>
      <text:list text:style-name="L320">
        <text:list-item>
          <text:p text:style-name="P423"><text:span text:style-name="T1">Viticoltura e Olivicoltura:</text:span> La produzione di vino e olio d’oliva è rinomata per la sua qualità.</text:p>
        </text:list-item>
        <text:list-item>
          <text:p text:style-name="P423"><text:span text:style-name="T1">Costruzione:</text:span> L’uso di marmi e pietre pregiate nelle costruzioni è un segno distintivo dell’impero.</text:p>
        </text:list-item>
      </text:list>
      <text:h text:style-name="Heading_20_4" text:outline-level="4"><text:bookmark-start text:name="lysandria-8"/>Lysandria<text:bookmark-end text:name="lysandria-8"/></text:h>
      <text:p text:style-name="First_20_paragraph"><text:span text:style-name="T1">Risorse Naturali:</text:span></text:p>
      <text:list text:style-name="L321">
        <text:list-item>
          <text:p text:style-name="P424"><text:span text:style-name="T1">Pesce e Frutti di Mare:</text:span> Abbonanza di risorse marine.</text:p>
        </text:list-item>
        <text:list-item>
          <text:p text:style-name="P424"><text:span text:style-name="T1">Ulivi e Agrumi:</text:span> Coltivati nelle regioni costiere.</text:p>
        </text:list-item>
      </text:list>
      <text:p text:style-name="First_20_paragraph"><text:span text:style-name="T1">Industrie Principali:</text:span></text:p>
      <text:list text:style-name="L322">
        <text:list-item>
          <text:p text:style-name="P425"><text:span text:style-name="T1">Navigazione e Commercio:</text:span> Lysandria è leader nel commercio marittimo grazie alle sue flotte avanzate.</text:p>
        </text:list-item>
        <text:list-item>
          <text:p text:style-name="P425"><text:span text:style-name="T1">Agricoltura:</text:span> La produzione di olio d’oliva e agrumi è fondamentale per l’economia.</text:p>
        </text:list-item>
      </text:list>
      <text:h text:style-name="Heading_20_3" text:outline-level="3"><text:bookmark-start text:name="rotte-commerciali-terrestri-e-marittime"/><text:span text:style-name="T1">Rotte Commerciali Terrestri e Marittime</text:span><text:bookmark-end text:name="rotte-commerciali-terrestri-e-marittime"/></text:h>
      <text:h text:style-name="Heading_20_4" text:outline-level="4"><text:bookmark-start text:name="rotte-terrestri"/>Rotte Terrestri<text:bookmark-end text:name="rotte-terrestri"/></text:h>
      <text:p text:style-name="First_20_paragraph"><text:span text:style-name="T1">Descrizione:</text:span> Le rotte terrestri collegano le città e le regioni interne del Marethar, facilitando lo scambio di merci e risorse.</text:p>
      <text:list text:style-name="L323">
        <text:list-item>
          <text:p text:style-name="P426"><text:span text:style-name="T1">Via delle Spezie:</text:span> Collega Aridonia con Lysandria e Thalassia, permettendo il commercio di spezie, metalli e gioielli.</text:p>
        </text:list-item>
        <text:list-item>
          <text:p text:style-name="P426"><text:span text:style-name="T1">Via delle Miniere:</text:span> Connette Orethia con Aurelia e Naharim, facilitando il trasporto di minerali e armi.</text:p>
        </text:list-item>
        <text:list-item>
          <text:p text:style-name="P426"><text:span text:style-name="T1">Via del Grano:</text:span> Unisce Naharim e Aurelia, assicurando la distribuzione di cereali e prodotti agricoli.</text:p>
        </text:list-item>
      </text:list>
      <text:h text:style-name="Heading_20_4" text:outline-level="4"><text:bookmark-start text:name="rotte-marittime"/>Rotte Marittime<text:bookmark-end text:name="rotte-marittime"/></text:h>
      <text:p text:style-name="First_20_paragraph"><text:span text:style-name="T1">Descrizione:</text:span> Le rotte marittime attraversano il Marethar, collegando le nazioni costiere e favorendo il commercio internazionale.</text:p>
      <text:list text:style-name="L324">
        <text:list-item>
          <text:p text:style-name="P427"><text:span text:style-name="T1">Rotta dei Pescatori:</text:span> Attraversa Thalassia e Lysandria, facilitando il commercio di pesce e frutti di mare.</text:p>
        </text:list-item>
        <text:list-item>
          <text:p text:style-name="P427"><text:span text:style-name="T1">Rotta delle Perle:</text:span> Collega Thalassia con le altre nazioni, permettendo l’esportazione di perle e conchiglie.</text:p>
        </text:list-item>
        <text:list-item>
          <text:p text:style-name="P427"><text:span text:style-name="T1">Rotta del Vino:</text:span> Conduce da Aurelia a Lysandria e Thalassia, permettendo il commercio di vino e olio d’oliva.</text:p>
        </text:list-item>
      </text:list>
      <text:h text:style-name="Heading_20_3" text:outline-level="3"><text:bookmark-start text:name="monete-e-sistemi-di-scambio"/><text:span text:style-name="T1">Monete e Sistemi di Scambio</text:span><text:bookmark-end text:name="monete-e-sistemi-di-scambio"/></text:h>
      <text:h text:style-name="Heading_20_4" text:outline-level="4"><text:bookmark-start text:name="monete"/>Monete<text:bookmark-end text:name="monete"/></text:h>
      <text:p text:style-name="First_20_paragraph"><text:span text:style-name="T1">Descrizione:</text:span> Ogni nazione ha sviluppato il proprio sistema monetario, facilitando il commercio e la tassazione.</text:p>
      <text:list text:style-name="L325">
        <text:list-item>
          <text:p text:style-name="P428"><text:span text:style-name="T1">Denari di Aurelia:</text:span> Monete d’oro e d’argento utilizzate per il commercio e le tasse.</text:p>
        </text:list-item>
        <text:list-item>
          <text:p text:style-name="P428"><text:span text:style-name="T1">Dracme di Lysandria:</text:span> Monete d’argento coniate dalle città-stato, utilizzate nel commercio marittimo.</text:p>
        </text:list-item>
        <text:list-item>
          <text:p text:style-name="P428"><text:span text:style-name="T1">Gilde di Thalassia:</text:span> Monete di bronzo e rame utilizzate per le transazioni quotidiane.</text:p>
        </text:list-item>
        <text:list-item>
          <text:p text:style-name="P428"><text:span text:style-name="T1">Cobalti di Aridonia:</text:span> Monete d’oro e rame, simboli di ricchezza e prestigio.</text:p>
        </text:list-item>
      </text:list>
      <text:h text:style-name="Heading_20_4" text:outline-level="4"><text:bookmark-start text:name="sistemi-di-scambio"/>Sistemi di Scambio<text:bookmark-end text:name="sistemi-di-scambio"/></text:h>
      <text:p text:style-name="First_20_paragraph"><text:span text:style-name="T1">Descrizione:</text:span> Oltre alle monete, il baratto e gli scambi diretti sono comuni, soprattutto nelle regioni rurali.</text:p>
      <text:list text:style-name="L326">
        <text:list-item>
          <text:p text:style-name="P429"><text:span text:style-name="T1">Baratto di Merci:</text:span> Scambio diretto di beni come spezie, metalli e tessuti.</text:p>
        </text:list-item>
        <text:list-item>
          <text:p text:style-name="P429"><text:span text:style-name="T1">Scambi di Servizi:</text:span> Transazioni basate su servizi, come la protezione militare o la costruzione di infrastrutture.</text:p>
        </text:list-item>
        <text:list-item>
          <text:p text:style-name="P429"><text:span text:style-name="T1">Contratti Commerciali:</text:span> Accordi scritti per scambi a lungo termine, garantiti da mercanti o nobili.</text:p>
        </text:list-item>
      </text:list>
      <text:h text:style-name="Heading_20_3" text:outline-level="3"><text:bookmark-start text:name="mercati-e-fiere"/><text:span text:style-name="T1">Mercati e Fiere</text:span><text:bookmark-end text:name="mercati-e-fiere"/></text:h>
      <text:h text:style-name="Heading_20_4" text:outline-level="4"><text:bookmark-start text:name="mercati"/>Mercati<text:bookmark-end text:name="mercati"/></text:h>
      <text:p text:style-name="First_20_paragraph"><text:span text:style-name="T1">Descrizione:</text:span> I mercati sono il fulcro dell’economia locale, dove i commercianti vendono i loro prodotti e le comunità si riuniscono.</text:p>
      <text:list text:style-name="L327">
        <text:list-item>
          <text:p text:style-name="P430"><text:span text:style-name="T1">Mercato di Nabad (Dajilia):</text:span> Famoso per le spezie esotiche e i tessuti pregiati.</text:p>
        </text:list-item>
        <text:list-item>
          <text:p text:style-name="P430"><text:span text:style-name="T1">Mercato di Lurocedina (Rhithia):</text:span> Conosciuto per i suoi metalli lavorati e gli strumenti agricoli.</text:p>
        </text:list-item>
        <text:list-item>
          <text:p text:style-name="P430"><text:span text:style-name="T1">Mercato di Agrannonia (Allasia):</text:span> Un importante centro di scambio per pesce fresco e frutti di mare.</text:p>
        </text:list-item>
      </text:list>
      <text:h text:style-name="Heading_20_4" text:outline-level="4"><text:bookmark-start text:name="fiere"/>Fiere<text:bookmark-end text:name="fiere"/></text:h>
      <text:p text:style-name="First_20_paragraph"><text:span text:style-name="T1">Descrizione:</text:span> Le fiere annuali attraggono mercanti da tutto il Marethar, offrendo una vasta gamma di prodotti e opportunità di scambio.</text:p>
      <text:list text:style-name="L328">
        <text:list-item>
          <text:p text:style-name="P431"><text:span text:style-name="T1">Fiera delle Spezie (Aridonia):</text:span> Una grande esposizione di spezie, erbe e prodotti esotici.</text:p>
        </text:list-item>
        <text:list-item>
          <text:p text:style-name="P431"><text:span text:style-name="T1">Fiera del Ferro (Orethia):</text:span> Specializzata in metalli e armi, attira fabbri e guerrieri da tutto il Marethar.</text:p>
        </text:list-item>
        <text:list-item>
          <text:p text:style-name="P431"><text:span text:style-name="T1">Fiera del Grano (Naharim):</text:span> Un evento centrale per l’acquisto e la vendita di cereali e prodotti agricoli.</text:p>
        </text:list-item>
      </text:list>
      <text:h text:style-name="Heading_20_2" text:outline-level="2"><text:bookmark-start text:name="tecnologia"/>🝖 Tecnologia<text:bookmark-end text:name="tecnologia"/></text:h>
      <text:h text:style-name="Heading_20_3" text:outline-level="3"><text:bookmark-start text:name="metallurgia-e-lavorazione-dei-metalli"/>Metallurgia e lavorazione dei metalli<text:bookmark-end text:name="metallurgia-e-lavorazione-dei-metalli"/></text:h>
      <text:p text:style-name="First_20_paragraph"><text:span text:style-name="T1">Estrazione e fusione</text:span></text:p>
      <text:list text:style-name="L329">
        <text:list-item>
          <text:p text:style-name="P432">Metalli: bronzo, ferro, rame, argento, piombo in uso rituale.</text:p>
        </text:list-item>
        <text:list-item>
          <text:p text:style-name="P432">Aree estrattive: Vallan (ferro, stagno), Dajilia (rame e salgemma), Karnak (rame nero), Rashia (giacimenti profondi).</text:p>
        </text:list-item>
        <text:list-item>
          <text:p text:style-name="P432">Tecniche: fornaci a mantice, fusione in stampi modulari, leghe miste.</text:p>
        </text:list-item>
      </text:list>
      <text:p text:style-name="First_20_paragraph"><text:span text:style-name="T1">Produzione bellica</text:span></text:p>
      <text:list text:style-name="L330">
        <text:list-item>
          <text:p text:style-name="P433">Vallan: corazze segmentate, lame rituali.</text:p>
        </text:list-item>
        <text:list-item>
          <text:p text:style-name="P433">Rashia: armi da cavalleria, scudi cerimoniali.</text:p>
        </text:list-item>
        <text:list-item>
          <text:p text:style-name="P433">Premia: forniture modulari per legioni, punte standardizzate.</text:p>
        </text:list-item>
      </text:list>
      <text:p text:style-name="First_20_paragraph"><text:span text:style-name="T1">Utensili e ornamenti</text:span></text:p>
      <text:list text:style-name="L331">
        <text:list-item>
          <text:p text:style-name="P434">Aureliani: strumenti agricoli, cucine in rame, oggetti liturgici.</text:p>
        </text:list-item>
        <text:list-item>
          <text:p text:style-name="P434">Thalassiani: oggetti navali in ottone, chiusure metalliche rituali.</text:p>
        </text:list-item>
        <text:list-item>
          <text:p text:style-name="P434">Naharim: metallo fluviale battuto, spesso inciso.</text:p>
        </text:list-item>
      </text:list>
      <text:p text:style-name="First_20_paragraph"><text:span text:style-name="T1">Monetazione</text:span></text:p>
      <text:list text:style-name="L332">
        <text:list-item>
          <text:p text:style-name="P435">Valute metalliche battute localmente; simboli divini o civici.</text:p>
        </text:list-item>
        <text:list-item>
          <text:p text:style-name="P435">Allasia e Rhithia: uso di inserti organici o materiali misti.</text:p>
        </text:list-item>
      </text:list>
      <text:h text:style-name="Heading_20_3" text:outline-level="3"><text:bookmark-start text:name="ingegneria-e-costruzione"/>Ingegneria e costruzione<text:bookmark-end text:name="ingegneria-e-costruzione"/></text:h>
      <text:p text:style-name="First_20_paragraph"><text:span text:style-name="T1">Architettura urbana e monumentale</text:span></text:p>
      <text:list text:style-name="L333">
        <text:list-item>
          <text:p text:style-name="P436">Linia, Allasia: archi, cupole, torri rinforzate.</text:p>
        </text:list-item>
        <text:list-item>
          <text:p text:style-name="P436">Rashia: fortezze modulari, gradoni di difesa.</text:p>
        </text:list-item>
        <text:list-item>
          <text:p text:style-name="P436">Ashania: materiali misti pietra-legno, tecniche druidiche.</text:p>
        </text:list-item>
      </text:list>
      <text:p text:style-name="First_20_paragraph"><text:span text:style-name="T1">Infrastrutture civili</text:span></text:p>
      <text:list text:style-name="L334">
        <text:list-item>
          <text:p text:style-name="P437">Aurelia e Premia: reti stradali lastricate, ponti segmentati.</text:p>
        </text:list-item>
        <text:list-item>
          <text:p text:style-name="P437">Fahya: acquedotti multilivello, canali sopraelevati.</text:p>
        </text:list-item>
        <text:list-item>
          <text:p text:style-name="P437">Dor e Naharim: ponti palafitta, strutture semi-sommerse.</text:p>
        </text:list-item>
      </text:list>
      <text:p text:style-name="First_20_paragraph"><text:span text:style-name="T1">Irrigazione</text:span></text:p>
      <text:list text:style-name="L335">
        <text:list-item>
          <text:p text:style-name="P438">Naharim: rotazione fluviale, dighe semimobili.</text:p>
        </text:list-item>
        <text:list-item>
          <text:p text:style-name="P438">Aridonia: pozzi profondi, cisterne a ventilazione naturale.</text:p>
        </text:list-item>
        <text:list-item>
          <text:p text:style-name="P438">Dajilia: drenaggi rituali, misuratori lunari del flusso.</text:p>
        </text:list-item>
      </text:list>
      <text:h text:style-name="Heading_20_3" text:outline-level="3"><text:bookmark-start text:name="agricoltura-e-allevamento"/>Agricoltura e allevamento<text:bookmark-end text:name="agricoltura-e-allevamento"/></text:h>
      <text:p text:style-name="First_20_paragraph"><text:span text:style-name="T1">Coltivazioni</text:span></text:p>
      <text:list text:style-name="L336">
        <text:list-item>
          <text:p text:style-name="P439">Premia, Dor: grano, legumi, ortaggi con rotazione avanzata.</text:p>
        </text:list-item>
        <text:list-item>
          <text:p text:style-name="P439">Dajilia: cereali resistenti alla siccità, erbe medicinali, piante rituali da pascolo.</text:p>
        </text:list-item>
        <text:list-item>
          <text:p text:style-name="P439">Orethia: coltivazione controllata in terrazze.</text:p>
        </text:list-item>
      </text:list>
      <text:p text:style-name="First_20_paragraph"><text:span text:style-name="T1">Allevamento</text:span></text:p>
      <text:list text:style-name="L337">
        <text:list-item>
          <text:p text:style-name="P440">Aridonia: cammelli, cavalli da sabbia.</text:p>
        </text:list-item>
        <text:list-item>
          <text:p text:style-name="P440">Naharim: bufali, capre fluviali.</text:p>
        </text:list-item>
        <text:list-item>
          <text:p text:style-name="P440">Rashia: bovini neri, ovini adattati.</text:p>
        </text:list-item>
      </text:list>
      <text:p text:style-name="First_20_paragraph"><text:span text:style-name="T1">Piante medicinali</text:span></text:p>
      <text:list text:style-name="L338">
        <text:list-item>
          <text:p text:style-name="P441">Aureliani: orti farmacologici, serre monastiche.</text:p>
        </text:list-item>
        <text:list-item>
          <text:p text:style-name="P441">Orethiani: colture spirituali, semi alchemici.</text:p>
        </text:list-item>
      </text:list>
      <text:h text:style-name="Heading_20_3" text:outline-level="3"><text:bookmark-start text:name="armi-da-fuoco-e-artiglieria"/>Armi da fuoco e artiglieria<text:bookmark-end text:name="armi-da-fuoco-e-artiglieria"/></text:h>
      <text:p text:style-name="First_20_paragraph"><text:span text:style-name="T1">Sviluppo e diffusione</text:span></text:p>
      <text:list text:style-name="L339">
        <text:list-item>
          <text:p text:style-name="P442">Origine: Aridonia (archibugi), esportazione verso Rashia e Vallan.</text:p>
        </text:list-item>
        <text:list-item>
          <text:p text:style-name="P442">Rashia: perfezionamento artiglieria da assedio.</text:p>
        </text:list-item>
        <text:list-item>
          <text:p text:style-name="P442">Linia: standardizzazione calibro e innesco.</text:p>
        </text:list-item>
      </text:list>
      <text:p text:style-name="First_20_paragraph"><text:span text:style-name="T1">Tecnologie belliche</text:span></text:p>
      <text:list text:style-name="L340">
        <text:list-item>
          <text:p text:style-name="P443">Cannoni a retrocarica (limitati), torrette in pietra con feritoie mobili.</text:p>
        </text:list-item>
        <text:list-item>
          <text:p text:style-name="P443">Munizionamento in pietra, ferro, sabbia solidificata.</text:p>
        </text:list-item>
      </text:list>
      <text:p text:style-name="First_20_paragraph"><text:span text:style-name="T1">Difese</text:span></text:p>
      <text:list text:style-name="L341">
        <text:list-item>
          <text:p text:style-name="P444">Mura interne doppie (Premia), bastioni idrici (Dor), torri mobili (Vallan).</text:p>
        </text:list-item>
      </text:list>
      <text:h text:style-name="Heading_20_3" text:outline-level="3"><text:bookmark-start text:name="navigazione-e-cantieristica"/>Navigazione e cantieristica<text:bookmark-end text:name="navigazione-e-cantieristica"/></text:h>
      <text:p text:style-name="First_20_paragraph"><text:span text:style-name="T1">Cantieristica navale</text:span></text:p>
      <text:list text:style-name="L342">
        <text:list-item>
          <text:p text:style-name="P445">Thalassia, Rhithia: scafi rinforzati, alberature composite.</text:p>
        </text:list-item>
        <text:list-item>
          <text:p text:style-name="P445">Meshdad: navi modulari per rotte variabili.</text:p>
        </text:list-item>
        <text:list-item>
          <text:p text:style-name="P445">Allasia: navi cerimoniali e mercantili, flotte a tre stadi.</text:p>
        </text:list-item>
      </text:list>
      <text:p text:style-name="First_20_paragraph"><text:span text:style-name="T1">Strumenti nautici</text:span></text:p>
      <text:list text:style-name="L343">
        <text:list-item>
          <text:p text:style-name="P446">Bussole magnetiche, sestanti a rifrazione lunare, mappe parziali.</text:p>
        </text:list-item>
        <text:list-item>
          <text:p text:style-name="P446">Carte astrali rituali in uso tra i druidi costieri.</text:p>
        </text:list-item>
      </text:list>
      <text:p text:style-name="First_20_paragraph"><text:span text:style-name="T1">Commercio marittimo</text:span></text:p>
      <text:list text:style-name="L344">
        <text:list-item>
          <text:p text:style-name="P447">Flussi: spezie (da Meshdad), metalli (da Rashia), tessuti e vetro (da Allasia).</text:p>
        </text:list-item>
        <text:list-item>
          <text:p text:style-name="P447">Protezione navale da consorzi, gilde e culti navali.</text:p>
        </text:list-item>
      </text:list>
      <text:h text:style-name="Heading_20_3" text:outline-level="3"><text:bookmark-start text:name="medicina-e-alchimia"/>⚗ Medicina e alchimia<text:bookmark-end text:name="medicina-e-alchimia"/></text:h>
      <text:p text:style-name="First_20_paragraph"><text:span text:style-name="T1">Pratiche mediche</text:span></text:p>
      <text:list text:style-name="L345">
        <text:list-item>
          <text:p text:style-name="P448">Aureliani: medici-erboristi, pronto intervento civile.</text:p>
        </text:list-item>
        <text:list-item>
          <text:p text:style-name="P448">Orethiani: rituali di purificazione, trapianti simbolici.</text:p>
        </text:list-item>
        <text:list-item>
          <text:p text:style-name="P448">Linia: scuole di medicina codificata, dissezione regolata.</text:p>
        </text:list-item>
      </text:list>
      <text:p text:style-name="First_20_paragraph"><text:span text:style-name="T1">Alchimia</text:span></text:p>
      <text:list text:style-name="L346">
        <text:list-item>
          <text:p text:style-name="P449">Trasmutazioni simboliche, elisir parziali, tecniche codificate per pozioni.</text:p>
        </text:list-item>
        <text:list-item>
          <text:p text:style-name="P449">Ingredienti: minerali rituali, essenze rare, elementi doppel.</text:p>
        </text:list-item>
      </text:list>
      <text:p text:style-name="First_20_paragraph"><text:span text:style-name="T1">Centri di studio</text:span></text:p>
      <text:list text:style-name="L347">
        <text:list-item>
          <text:p text:style-name="P450">Fahya: torri alchemiche sotto censura.</text:p>
        </text:list-item>
        <text:list-item>
          <text:p text:style-name="P450">Premia: farmacopee municipali.</text:p>
        </text:list-item>
        <text:list-item>
          <text:p text:style-name="P450">Ashania: biblioteche orali di formule codificate.</text:p>
        </text:list-item>
      </text:list>
      <text:h text:style-name="Heading_20_3" text:outline-level="3"><text:bookmark-start text:name="comunicazione-e-trasporti"/>🛤 Comunicazione e trasporti<text:bookmark-end text:name="comunicazione-e-trasporti"/></text:h>
      <text:p text:style-name="First_20_paragraph"><text:span text:style-name="T1">Comunicazioni</text:span></text:p>
      <text:list text:style-name="L348">
        <text:list-item>
          <text:p text:style-name="P451">Segnali di fumo e fuoco, tamburi codificati, messaggeri a cavallo.</text:p>
        </text:list-item>
        <text:list-item>
          <text:p text:style-name="P451">Fahya: sistema di specchi notturni.</text:p>
        </text:list-item>
      </text:list>
      <text:p text:style-name="First_20_paragraph"><text:span text:style-name="T1">Trasporti</text:span></text:p>
      <text:list text:style-name="L349">
        <text:list-item>
          <text:p text:style-name="P452">Carrozze articolate (Linia), chiatte fluviali (Dor), carovane rituali (Dajilia).</text:p>
        </text:list-item>
        <text:list-item>
          <text:p text:style-name="P452">Ponti sospesi, gallerie montane, tunnel passivi tra città gemelle.</text:p>
        </text:list-item>
      </text:list>
      <text:p text:style-name="First_20_paragraph"><text:span text:style-name="T1">Innovazioni</text:span></text:p>
      <text:list text:style-name="L350">
        <text:list-item>
          <text:p text:style-name="P453">Premia: iscrizioni mobili su pietra per dati civili.</text:p>
        </text:list-item>
        <text:list-item>
          <text:p text:style-name="P453">Aridonia: zoccoli cerimoniali per attraversamenti sacri.</text:p>
        </text:list-item>
        <text:list-item>
          <text:p text:style-name="P453">Vallan: slitte da roccia e catene per ascesa.</text:p>
        </text:list-item>
      </text:list>
      <text:h text:style-name="Heading_20_2" text:outline-level="2"><text:bookmark-start text:name="personaggi-importanti"/>🜛 Personaggi Importanti<text:bookmark-end text:name="personaggi-importanti"/></text:h>
      <text:p text:style-name="First_20_paragraph">Questo capitolo fornisce una panoramica dei personaggi più influenti del Marethar, coprendo leader politici, eroi militari, maghi potenti e mercanti di spicco. Questi individui hanno lasciato un segno indelebile nella storia della regione e continuano a influenzare il suo futuro.</text:p>
      <text:h text:style-name="Heading_20_3" text:outline-level="3"><text:bookmark-start text:name="leader-politici"/><text:span text:style-name="T1">Leader Politici</text:span><text:bookmark-end text:name="leader-politici"/></text:h>
      <text:h text:style-name="Heading_20_4" text:outline-level="4"><text:bookmark-start text:name="principe-aram-ii-di-dajilia"/>Principe Aram II di Dajilia<text:bookmark-end text:name="principe-aram-ii-di-dajilia"/></text:h>
      <text:list text:style-name="L351">
        <text:list-item>
          <text:p text:style-name="P454"><text:span text:style-name="T1">Ruolo:</text:span> Sovrano del Principato di Dajilia</text:p>
        </text:list-item>
        <text:list-item>
          <text:p text:style-name="P454"><text:span text:style-name="T1">Descrizione:</text:span> Principe Aram II è noto per la sua saggezza e abilità tattica. Durante la Guerra delle Oasi, ha difeso con successo il Principato contro le forze Rashiane. È un leader rispettato e amato dal suo popolo per il suo impegno nella protezione delle risorse idriche e nella promozione della pace e della prosperità.</text:p>
        </text:list-item>
      </text:list>
      <text:h text:style-name="Heading_20_4" text:outline-level="4"><text:bookmark-start text:name="imperatore-khalid-iv-di-rashia"/>Imperatore Khalid IV di Rashia<text:bookmark-end text:name="imperatore-khalid-iv-di-rashia"/></text:h>
      <text:list text:style-name="L352">
        <text:list-item>
          <text:p text:style-name="P455"><text:span text:style-name="T1">Ruolo:</text:span> Imperatore dell’Impero Rashiano</text:p>
        </text:list-item>
        <text:list-item>
          <text:p text:style-name="P455"><text:span text:style-name="T1">Descrizione:</text:span> Khalid IV è un imperatore ambizioso e determinato. Ha espanso i confini dell’Impero attraverso campagne militari aggressive e l’uso di tattiche di assedio. Sotto il suo regno, Rashia è diventata una delle potenze militari dominanti del Marethar.</text:p>
        </text:list-item>
      </text:list>
      <text:h text:style-name="Heading_20_4" text:outline-level="4"><text:bookmark-start text:name="console-julia-verus-di-premia"/>Console Julia Verus di Premia<text:bookmark-end text:name="console-julia-verus-di-premia"/></text:h>
      <text:list text:style-name="L353">
        <text:list-item>
          <text:p text:style-name="P456"><text:span text:style-name="T1">Ruolo:</text:span> Console della Repubblica di Premia</text:p>
        </text:list-item>
        <text:list-item>
          <text:p text:style-name="P456"><text:span text:style-name="T1">Descrizione:</text:span> Julia Verus è una leader carismatica e abile oratrice. Ha guidato la Repubblica attraverso periodi di turbolenza politica e ha implementato riforme democratiche che hanno rafforzato la stabilità e la prosperità del paese.</text:p>
        </text:list-item>
      </text:list>
      <text:h text:style-name="Heading_20_4" text:outline-level="4"><text:bookmark-start text:name="doge-loranis-di-allasia"/>Doge Loranis di Allasia<text:bookmark-end text:name="doge-loranis-di-allasia"/></text:h>
      <text:list text:style-name="L354">
        <text:list-item>
          <text:p text:style-name="P457"><text:span text:style-name="T1">Ruolo:</text:span> Doge della Città-Stato di Allasia</text:p>
        </text:list-item>
        <text:list-item>
          <text:p text:style-name="P457"><text:span text:style-name="T1">Descrizione:</text:span> Loranis è un astuto politico e abile mercante. Sotto la sua guida, Allasia è diventata un centro commerciale prospero e influente. È noto per le sue abilità diplomatiche e per aver mantenuto la città-stato in una posizione di forza nonostante le pressioni esterne.</text:p>
        </text:list-item>
      </text:list>
      <text:h text:style-name="Heading_20_3" text:outline-level="3"><text:bookmark-start text:name="eroi-e-avventurieri"/><text:span text:style-name="T1">Eroi e Avventurieri</text:span><text:bookmark-end text:name="eroi-e-avventurieri"/></text:h>
      <text:h text:style-name="Heading_20_4" text:outline-level="4"><text:bookmark-start text:name="lysander-di-rhithia"/>Lysander di Rhithia<text:bookmark-end text:name="lysander-di-rhithia"/></text:h>
      <text:list text:style-name="L355">
        <text:list-item>
          <text:p text:style-name="P458"><text:span text:style-name="T1">Ruolo:</text:span> Arconte della Lega Rhithiana</text:p>
        </text:list-item>
        <text:list-item>
          <text:p text:style-name="P458"><text:span text:style-name="T1">Descrizione:</text:span> Lysander è un eroe navale e stratega militare. Ha guidato la Lega Rhithiana alla vittoria nella Guerra del Commercio di Rhithia, garantendo il controllo delle rotte commerciali cruciali. È rispettato per la sua astuzia e il suo coraggio.</text:p>
        </text:list-item>
      </text:list>
      <text:h text:style-name="Heading_20_4" text:outline-level="4"><text:bookmark-start text:name="ser-athelstan-di-ashania"/>Ser Athelstan di Ashania<text:bookmark-end text:name="ser-athelstan-di-ashania"/></text:h>
      <text:list text:style-name="L356">
        <text:list-item>
          <text:p text:style-name="P459"><text:span text:style-name="T1">Ruolo:</text:span> Cavaliere e co-sovrano della Diarchia di Ashania</text:p>
        </text:list-item>
        <text:list-item>
          <text:p text:style-name="P459"><text:span text:style-name="T1">Descrizione:</text:span> Athelstan è un cavaliere leggendario, noto per la sua bravura in battaglia e la sua lealtà. Insieme alla Regina Elara, governa Ashania con saggezza e giustizia. È un simbolo di forza e onore per il suo popolo.</text:p>
        </text:list-item>
      </text:list>
      <text:h text:style-name="Heading_20_4" text:outline-level="4"><text:bookmark-start text:name="zarah-lintrepida"/>Zarah l’Intrepida<text:bookmark-end text:name="zarah-lintrepida"/></text:h>
      <text:list text:style-name="L357">
        <text:list-item>
          <text:p text:style-name="P460"><text:span text:style-name="T1">Ruolo:</text:span> Avventuriera e esploratrice</text:p>
        </text:list-item>
        <text:list-item>
          <text:p text:style-name="P460"><text:span text:style-name="T1">Descrizione:</text:span> Zarah è conosciuta per le sue spedizioni audaci nelle terre inesplorate del Marethar. Ha scoperto antiche rovine e artefatti preziosi, guadagnandosi una reputazione di intrepidezza e determinazione.</text:p>
        </text:list-item>
      </text:list>
      <text:h text:style-name="Heading_20_3" text:outline-level="3"><text:bookmark-start text:name="maghi-e-alchimisti"/><text:span text:style-name="T1">Maghi e Alchimisti</text:span><text:bookmark-end text:name="maghi-e-alchimisti"/></text:h>
      <text:h text:style-name="Heading_20_4" text:outline-level="4"><text:bookmark-start text:name="granduca-arslan-iii-di-hamania"/>Granduca Arslan III di Hamania<text:bookmark-end text:name="granduca-arslan-iii-di-hamania"/></text:h>
      <text:list text:style-name="L358">
        <text:list-item>
          <text:p text:style-name="P461"><text:span text:style-name="T1">Ruolo:</text:span> Sovrano e mago potente del Granducato di Hamania</text:p>
        </text:list-item>
        <text:list-item>
          <text:p text:style-name="P461"><text:span text:style-name="T1">Descrizione:</text:span> Arslan III non è solo un leader politico, ma anche un mago di grande potere. Ha usato le sue abilità magiche per proteggere il suo regno e per avanzare nelle scienze alchemiche. È venerato e temuto per la sua saggezza e il suo potere.</text:p>
        </text:list-item>
      </text:list>
      <text:h text:style-name="Heading_20_4" text:outline-level="4"><text:bookmark-start text:name="eshara-la-saggia"/>Eshara la Saggia<text:bookmark-end text:name="eshara-la-saggia"/></text:h>
      <text:list text:style-name="L359">
        <text:list-item>
          <text:p text:style-name="P462"><text:span text:style-name="T1">Ruolo:</text:span> Maga e consigliera di Nabad</text:p>
        </text:list-item>
        <text:list-item>
          <text:p text:style-name="P462"><text:span text:style-name="T1">Descrizione:</text:span> Eshara è una maga rispettata e influente. Come consigliera del Principe Aram II, ha contribuito a molte delle sue vittorie strategiche. È nota per la sua conoscenza delle arti arcane e per il suo impegno nella difesa del suo popolo.</text:p>
        </text:list-item>
      </text:list>
      <text:h text:style-name="Heading_20_4" text:outline-level="4"><text:bookmark-start text:name="farid-lalchimista"/>Farid l’Alchimista<text:bookmark-end text:name="farid-lalchimista"/></text:h>
      <text:list text:style-name="L360">
        <text:list-item>
          <text:p text:style-name="P463"><text:span text:style-name="T1">Ruolo:</text:span> Alchimista della Repubblica di Meshdad</text:p>
        </text:list-item>
        <text:list-item>
          <text:p text:style-name="P463"><text:span text:style-name="T1">Descrizione:</text:span> Farid è un alchimista rinomato per le sue scoperte e invenzioni. Ha sviluppato numerose pozioni e elisir che hanno migliorato la vita dei cittadini di Meshdad. È un personaggio chiave nell’avanzamento delle scienze e delle arti magiche nella regione.</text:p>
        </text:list-item>
      </text:list>
      <text:h text:style-name="Heading_20_3" text:outline-level="3"><text:bookmark-start text:name="mercanti-e-influenti-economici"/><text:span text:style-name="T1">Mercanti e Influenti Economici</text:span><text:bookmark-end text:name="mercanti-e-influenti-economici"/></text:h>
      <text:h text:style-name="Heading_20_4" text:outline-level="4"><text:bookmark-start text:name="malik-di-meshdad"/>Malik di Meshdad<text:bookmark-end text:name="malik-di-meshdad"/></text:h>
      <text:list text:style-name="L361">
        <text:list-item>
          <text:p text:style-name="P464"><text:span text:style-name="T1">Ruolo:</text:span> Mercante di spezie e tessuti</text:p>
        </text:list-item>
        <text:list-item>
          <text:p text:style-name="P464"><text:span text:style-name="T1">Descrizione:</text:span> Malik è uno dei mercanti più ricchi e influenti di Meshdad. Ha costruito un impero commerciale che si estende attraverso il Marethar, specializzandosi nel commercio di spezie esotiche e tessuti pregiati. È noto per la sua abilità negli affari e per la sua rete di contatti internazionali.</text:p>
        </text:list-item>
      </text:list>
      <text:h text:style-name="Heading_20_4" text:outline-level="4"><text:bookmark-start text:name="helena-di-thalassia"/>Helena di Thalassia<text:bookmark-end text:name="helena-di-thalassia"/></text:h>
      <text:list text:style-name="L362">
        <text:list-item>
          <text:p text:style-name="P465"><text:span text:style-name="T1">Ruolo:</text:span> Commerciatrice e leader di gilda</text:p>
        </text:list-item>
        <text:list-item>
          <text:p text:style-name="P465"><text:span text:style-name="T1">Descrizione:</text:span> Helena è la leader della gilda dei mercanti di Thalassia. Sotto la sua guida, la gilda è diventata una delle più potenti della regione, controllando gran parte del commercio marittimo. È rispettata per la sua astuzia e la sua capacità di negoziare trattati commerciali vantaggiosi.</text:p>
        </text:list-item>
      </text:list>
      <text:h text:style-name="Heading_20_4" text:outline-level="4"><text:bookmark-start text:name="cyrus-di-allasia"/>Cyrus di Allasia<text:bookmark-end text:name="cyrus-di-allasia"/></text:h>
      <text:list text:style-name="L363">
        <text:list-item>
          <text:p text:style-name="P466"><text:span text:style-name="T1">Ruolo:</text:span> Banchiere e investitore</text:p>
        </text:list-item>
        <text:list-item>
          <text:p text:style-name="P466"><text:span text:style-name="T1">Descrizione:</text:span> Cyrus è un banchiere influente che ha finanziato molte delle imprese commerciali di Allasia. È noto per la sua abilità nel gestire investimenti e per il suo ruolo cruciale nello sviluppo economico della città-stato. Ha costruito una fortuna attraverso investimenti strategici e innovativi.</text:p>
        </text:list-item>
      </text:list>
      <text:h text:style-name="Heading_20_2" text:outline-level="2"><text:bookmark-start text:name="miti-e-leggende"/>🜃 Miti e Leggende<text:bookmark-end text:name="miti-e-leggende"/></text:h>
      <text:p text:style-name="First_20_paragraph">Questo capitolo esplora i miti, le leggende e le storie popolari che costituiscono il cuore delle credenze e della visione del mondo delle varie culture del Marethar. Questi racconti sono tramandati di generazione in generazione e hanno plasmato profondamente le tradizioni e le identità delle popolazioni locali.</text:p>
      <text:h text:style-name="Heading_20_3" text:outline-level="3"><text:bookmark-start text:name="miti-di-creazione"/><text:span text:style-name="T1">Miti di Creazione</text:span><text:bookmark-end text:name="miti-di-creazione"/></text:h>
      <text:h text:style-name="Heading_20_4" text:outline-level="4"><text:bookmark-start text:name="la-creazione-del-marethar"/>La Creazione del Marethar<text:bookmark-end text:name="la-creazione-del-marethar"/></text:h>
      <text:list text:style-name="L364">
        <text:list-item>
          <text:p text:style-name="P467"><text:span text:style-name="T1">Origine:</text:span> Racconto comune nelle culture costiere del Marethar.</text:p>
        </text:list-item>
        <text:list-item>
          <text:p text:style-name="P467"><text:span text:style-name="T1">Descrizione:</text:span> Secondo la leggenda, il Marethar fu creato quando Thalaran, lo Spirito del Mare, combatté contro il Leviatano, il mostro marino primordiale. Durante la battaglia, le onde si alzarono fino a coprire le terre circostanti, creando il vasto mare interno. Thalaran vinse la battaglia e le acque del Marethar divennero calme e fertili.</text:p>
        </text:list-item>
      </text:list>
      <text:h text:style-name="Heading_20_4" text:outline-level="4"><text:bookmark-start text:name="la-nascita-delle-prime-tribù"/>La Nascita delle Prime Tribù<text:bookmark-end text:name="la-nascita-delle-prime-tribù"/></text:h>
      <text:list text:style-name="L365">
        <text:list-item>
          <text:p text:style-name="P468"><text:span text:style-name="T1">Origine:</text:span> Mito condiviso dalle tribù Aridonianie.</text:p>
        </text:list-item>
        <text:list-item>
          <text:p text:style-name="P468"><text:span text:style-name="T1">Descrizione:</text:span> Shahin, il Dio dell’Albero, piantò i semi della vita nel deserto di Aridonia. Da questi semi nacquero le prime tribù nomadi, che impararono a vivere in armonia con il deserto e le sue risorse. Shahin insegnò loro le arti della sopravvivenza e della guerra, proteggendoli dalle creature pericolose del deserto.</text:p>
        </text:list-item>
      </text:list>
      <text:h text:style-name="Heading_20_4" text:outline-level="4"><text:bookmark-start text:name="la-genesi-delle-montagne-di-orethia"/>La Genesi delle Montagne di Orethia<text:bookmark-end text:name="la-genesi-delle-montagne-di-orethia"/></text:h>
      <text:list text:style-name="L366">
        <text:list-item>
          <text:p text:style-name="P469"><text:span text:style-name="T1">Origine:</text:span> Mito delle popolazioni Orethiane.</text:p>
        </text:list-item>
        <text:list-item>
          <text:p text:style-name="P469"><text:span text:style-name="T1">Descrizione:</text:span> Le montagne di Orethia furono create dal potente Tudeshkhast, il Saggio Volante del Destino. Egli plasmò le montagne con le sue mani per fornire rifugio e risorse al suo popolo. Le miniere ricche di minerali preziosi sono considerate un dono divino, e le montagne stesse sono venerate come sacre.</text:p>
        </text:list-item>
      </text:list>
      <text:h text:style-name="Heading_20_3" text:outline-level="3"><text:bookmark-start text:name="leggende-di-eroi-e-mostri"/><text:span text:style-name="T1">Leggende di Eroi e Mostri</text:span><text:bookmark-end text:name="leggende-di-eroi-e-mostri"/></text:h>
      <text:h text:style-name="Heading_20_4" text:outline-level="4"><text:bookmark-start text:name="lysander-e-il-serpente-del-mare"/>Lysander e il Serpente del Mare<text:bookmark-end text:name="lysander-e-il-serpente-del-mare"/></text:h>
      <text:list text:style-name="L367">
        <text:list-item>
          <text:p text:style-name="P470"><text:span text:style-name="T1">Origine:</text:span> Leggenda della Lega Rhithiana.</text:p>
        </text:list-item>
        <text:list-item>
          <text:p text:style-name="P470"><text:span text:style-name="T1">Descrizione:</text:span> Lysander, l’eroe navale, affrontò il temuto Serpente del Mare che terrorizzava i mari del Marethar. Con l’aiuto di Thalassos, il Dio del Mare, Lysander riuscì a sconfiggere il mostro, garantendo la sicurezza delle rotte commerciali. La sua vittoria è celebrata ogni anno durante il Festival del Mare.</text:p>
        </text:list-item>
      </text:list>
      <text:h text:style-name="Heading_20_4" text:outline-level="4"><text:bookmark-start text:name="la-prodezza-di-ser-athelstan"/>La Prodezza di Ser Athelstan<text:bookmark-end text:name="la-prodezza-di-ser-athelstan"/></text:h>
      <text:list text:style-name="L368">
        <text:list-item>
          <text:p text:style-name="P471"><text:span text:style-name="T1">Origine:</text:span> Racconto epico di Ashania.</text:p>
        </text:list-item>
        <text:list-item>
          <text:p text:style-name="P471"><text:span text:style-name="T1">Descrizione:</text:span> Ser Athelstan, co-sovrano di Ashania, affrontò un’armata di invasori da solo per proteggere il suo regno. Con la sua spada incantata, donata da Dimilalica, il Giaguaro dell’Estate, respinse gli invasori, diventando un simbolo di coraggio e lealtà. La sua leggenda ispira ancora oggi i giovani guerrieri di Ashania.</text:p>
        </text:list-item>
      </text:list>
      <text:h text:style-name="Heading_20_4" text:outline-level="4"><text:bookmark-start text:name="la-battaglia-di-zarah-contro-il-drago-di-fuoco"/>La Battaglia di Zarah contro il Drago di Fuoco<text:bookmark-end text:name="la-battaglia-di-zarah-contro-il-drago-di-fuoco"/></text:h>
      <text:list text:style-name="L369">
        <text:list-item>
          <text:p text:style-name="P472"><text:span text:style-name="T1">Origine:</text:span> Leggenda delle tribù montane di Orethia.</text:p>
        </text:list-item>
        <text:list-item>
          <text:p text:style-name="P472"><text:span text:style-name="T1">Descrizione:</text:span> Zarah l’Intrepida si avventurò nelle caverne delle montagne di Orethia per affrontare il temuto Drago di Fuoco. Con astuzia e determinazione, Zarah riuscì a sconfiggere il drago, guadagnandosi il rispetto e l’ammirazione del suo popolo. La sua impresa è narrata durante la Festa della Forgiatura.</text:p>
        </text:list-item>
      </text:list>
      <text:h text:style-name="Heading_20_3" text:outline-level="3"><text:bookmark-start text:name="storie-popolari-e-folklore"/><text:span text:style-name="T1">Storie Popolari e Folklore</text:span><text:bookmark-end text:name="storie-popolari-e-folklore"/></text:h>
      <text:h text:style-name="Heading_20_4" text:outline-level="4"><text:bookmark-start text:name="la-storia-di-malik-e-la-lampada-magica"/>La Storia di Malik e la Lampada Magica<text:bookmark-end text:name="la-storia-di-malik-e-la-lampada-magica"/></text:h>
      <text:list text:style-name="L370">
        <text:list-item>
          <text:p text:style-name="P473"><text:span text:style-name="T1">Origine:</text:span> Racconto popolare di Meshdad.</text:p>
        </text:list-item>
        <text:list-item>
          <text:p text:style-name="P473"><text:span text:style-name="T1">Descrizione:</text:span> Malik, un giovane mercante, trovò una lampada magica durante uno dei suoi viaggi. Quando la strofinò, apparve un genio che gli offrì tre desideri. Con saggezza, Malik usò i desideri per portare prosperità alla sua città e diventare uno dei mercanti più rispettati di Meshdad. La lampada magica è ancora oggi un simbolo di speranza e fortuna.</text:p>
        </text:list-item>
      </text:list>
      <text:h text:style-name="Heading_20_4" text:outline-level="4"><text:bookmark-start text:name="il-racconto-delle-sirene-di-thalassia"/>Il Racconto delle Sirene di Thalassia<text:bookmark-end text:name="il-racconto-delle-sirene-di-thalassia"/></text:h>
      <text:list text:style-name="L371">
        <text:list-item>
          <text:p text:style-name="P474"><text:span text:style-name="T1">Origine:</text:span> Leggenda marina di Thalassia.</text:p>
        </text:list-item>
        <text:list-item>
          <text:p text:style-name="P474"><text:span text:style-name="T1">Descrizione:</text:span> Le sirene di Thalassia, creature affascinanti e pericolose, attiravano i marinai con il loro canto incantatore. Una volta, un giovane pescatore di nome Einar riuscì a resistere al loro richiamo e scoprì il loro segreto: un antico incantesimo che le legava al mare. Con l’aiuto di Thalaran, Einar liberò le sirene dall’incantesimo, guadagnandosi la loro gratitudine eterna.</text:p>
        </text:list-item>
      </text:list>
      <text:h text:style-name="Heading_20_4" text:outline-level="4"><text:bookmark-start text:name="la-leggenda-del-cavallo-alato-di-vallan"/>La Leggenda del Cavallo Alato di Vallan<text:bookmark-end text:name="la-leggenda-del-cavallo-alato-di-vallan"/></text:h>
      <text:list text:style-name="L372">
        <text:list-item>
          <text:p text:style-name="P475"><text:span text:style-name="T1">Origine:</text:span> Racconto eroico di Vallan.</text:p>
        </text:list-item>
        <text:list-item>
          <text:p text:style-name="P475"><text:span text:style-name="T1">Descrizione:</text:span> Durante una grande siccità, un cavallo alato apparve nelle pianure di Vallan. Il cavallo, guidato dagli Spiriti del Raccolto, portò piogge abbondanti che salvarono i raccolti. Da allora, il cavallo alato è venerato come un simbolo di speranza e abbondanza, e la sua storia è raccontata durante la Festa del Raccolto.</text:p>
        </text:list-item>
      </text:list>
      <text:h text:style-name="Heading_20_3" text:outline-level="3"><text:bookmark-start text:name="oggetti-leggendari-e-luoghi-sacri"/><text:span text:style-name="T1">Oggetti Leggendari e Luoghi Sacri</text:span><text:bookmark-end text:name="oggetti-leggendari-e-luoghi-sacri"/></text:h>
      <text:h text:style-name="Heading_20_4" text:outline-level="4"><text:bookmark-start text:name="la-spada-incantata-di-athelstan"/>La Spada Incantata di Athelstan<text:bookmark-end text:name="la-spada-incantata-di-athelstan"/></text:h>
      <text:list text:style-name="L373">
        <text:list-item>
          <text:p text:style-name="P476"><text:span text:style-name="T1">Origine:</text:span> Leggenda di Ashania.</text:p>
        </text:list-item>
        <text:list-item>
          <text:p text:style-name="P476"><text:span text:style-name="T1">Descrizione:</text:span> La spada incantata di Ser Athelstan, donata da Dimilalica, è un’arma leggendaria. Si dice che la spada abbia il potere di respingere qualsiasi invasore e di proteggere il regno di Ashania. È custodita nel Tempio di Dimilalica, dove è venerata come un simbolo di protezione divina.</text:p>
        </text:list-item>
      </text:list>
      <text:h text:style-name="Heading_20_4" text:outline-level="4"><text:bookmark-start text:name="la-lampada-di-malik"/>La Lampada di Malik<text:bookmark-end text:name="la-lampada-di-malik"/></text:h>
      <text:list text:style-name="L374">
        <text:list-item>
          <text:p text:style-name="P477"><text:span text:style-name="T1">Origine:</text:span> Racconto di Meshdad.</text:p>
        </text:list-item>
        <text:list-item>
          <text:p text:style-name="P477"><text:span text:style-name="T1">Descrizione:</text:span> La lampada magica trovata da Malik è un oggetto di grande potere. Si dice che possa esaudire tre desideri a chiunque la trovi e la usi con saggezza. La lampada è conservata nel Grande Mercato di Meshdad, dove attira visitatori da tutto il Marethar.</text:p>
        </text:list-item>
      </text:list>
      <text:h text:style-name="Heading_20_4" text:outline-level="4"><text:bookmark-start text:name="il-tempio-di-thalaran"/>Il Tempio di Thalaran<text:bookmark-end text:name="il-tempio-di-thalaran"/></text:h>
      <text:list text:style-name="L375">
        <text:list-item>
          <text:p text:style-name="P478"><text:span text:style-name="T1">Origine:</text:span> Luogo sacro di Thalassia.</text:p>
        </text:list-item>
        <text:list-item>
          <text:p text:style-name="P478"><text:span text:style-name="T1">Descrizione:</text:span> Il Tempio di Thalaran è un luogo sacro situato sulla costa di Thalassia. È dedicato a Thalaran, lo Spirito del Mare, e ogni anno i marinai vi si recano per chiedere protezione e benedizione prima di intraprendere i loro viaggi. Il tempio è noto per le sue magnifiche sculture e per le cerimonie rituali che vi si svolgono.</text:p>
        </text:list-item>
      </text:list>
      <text:h text:style-name="Heading_20_3" text:outline-level="3"><text:bookmark-start text:name="la-corona-di-shahin-1"/>La Corona di Shahin<text:bookmark-end text:name="la-corona-di-shahin-1"/></text:h>
      <text:list text:style-name="L376">
        <text:list-item>
          <text:p text:style-name="P479"><text:span text:style-name="T1">Origine:</text:span> Artefatto sacro di Aridonia.</text:p>
        </text:list-item>
        <text:list-item>
          <text:p text:style-name="P479"><text:span text:style-name="T1">Descrizione:</text:span> La corona di Shahin, il Dio dell’Albero, è un artefatto leggendario che si dice conferisca saggezza e potere a chiunque la indossi. È custodita nel Santuario di Shahin, nel cuore del deserto di Aridonia, ed è considerata un simbolo di leadership e protezione divina.</text:p>
        </text:list-item>
      </text:list>
      <text:h text:style-name="Heading_20_1" text:outline-level="1"><text:bookmark-start text:name="parte-vi---tabelle-davventura"/>🝰 Parte VI - Tabelle d’avventura<text:bookmark-end text:name="parte-vi---tabelle-davventura"/></text:h>
      <text:h text:style-name="Heading_20_2" text:outline-level="2"><text:bookmark-start text:name="semi-davventura-1"/><text:span text:style-name="T1">Semi d’avventura</text:span><text:bookmark-end text:name="semi-davventura-1"/></text:h>
      <text:h text:style-name="Heading_20_3" text:outline-level="3"><text:bookmark-start text:name="semi-davventura-politici-e-diplomatici"/><text:span text:style-name="T1">Semi d’Avventura Politici e Diplomatici</text:span><text:bookmark-end text:name="semi-davventura-politici-e-diplomatici"/></text:h>
      <text:list text:style-name="L377">
        <text:list-item>
          <text:p text:style-name="P480">Un ministro viene misteriosamente avvelenato prima di un trattato di pace.</text:p>
        </text:list-item>
        <text:list-item>
          <text:p text:style-name="P480">Una spia viene catturata con documenti compromettenti, ma chi l’ha inviata?</text:p>
        </text:list-item>
        <text:list-item>
          <text:p text:style-name="P480">Un nobile chiede aiuto per eliminare un rivale politico in cambio di potere.</text:p>
        </text:list-item>
        <text:list-item>
          <text:p text:style-name="P480">Un matrimonio diplomatico fallisce quando uno degli sposi scompare.</text:p>
        </text:list-item>
        <text:list-item>
          <text:p text:style-name="P480">Un’ambasciata viene attaccata, scatenando tensioni tra le nazioni.</text:p>
        </text:list-item>
        <text:list-item>
          <text:p text:style-name="P480">Un alleato di lunga data si rivela un doppiogiochista con i nemici.</text:p>
        </text:list-item>
        <text:list-item>
          <text:p text:style-name="P480">Una principessa rapita viene ritrovata, ma afferma di essere fuggita volontariamente.</text:p>
        </text:list-item>
        <text:list-item>
          <text:p text:style-name="P480">Una ribellione sta per scoppiare tra la nobiltà, segretamente sobillata da una nazione vicina.</text:p>
        </text:list-item>
        <text:list-item>
          <text:p text:style-name="P480">Il leader di una città-stato muore improvvisamente e la successione è contesa.</text:p>
        </text:list-item>
        <text:list-item>
          <text:p text:style-name="P480">Un trattato viene annullato quando una nazione scopre un tradimento diplomatico.</text:p>
        </text:list-item>
        <text:list-item>
          <text:p text:style-name="P480">Un tesoro reale sparisce durante negoziazioni di pace, rischiando di far saltare l’accordo.</text:p>
        </text:list-item>
        <text:list-item>
          <text:p text:style-name="P480">Una cospirazione di corte viene rivelata attraverso un diario segreto.</text:p>
        </text:list-item>
        <text:list-item>
          <text:p text:style-name="P480">Un diplomatico misterioso offre segreti militari in cambio di asilo politico.</text:p>
        </text:list-item>
        <text:list-item>
          <text:p text:style-name="P480">Un gruppo segreto di nobili cospira per sostituire il sovrano con una marionetta controllata.</text:p>
        </text:list-item>
        <text:list-item>
          <text:p text:style-name="P480">La decisione di inviare truppe per difendere una nazione alleata è aspramente contestata.</text:p>
        </text:list-item>
        <text:list-item>
          <text:p text:style-name="P480">Un antico patto viene scoperto, mettendo in discussione l’indipendenza di una nazione.</text:p>
        </text:list-item>
        <text:list-item>
          <text:p text:style-name="P480">Un leader religioso dichiara una guerra santa contro una nazione rivale.</text:p>
        </text:list-item>
        <text:list-item>
          <text:p text:style-name="P480">Uno dei consiglieri del re è sospettato di stregoneria e tradimento.</text:p>
        </text:list-item>
        <text:list-item>
          <text:p text:style-name="P480">Un erede al trono si innamora di un membro della nobiltà rivale, scatenando conflitti.</text:p>
        </text:list-item>
        <text:list-item>
          <text:p text:style-name="P480">La corte scopre una cospirazione per far insorgere i mercanti contro la classe nobiliare.</text:p>
        </text:list-item>
      </text:list>
      <text:h text:style-name="Heading_20_3" text:outline-level="3"><text:bookmark-start text:name="semi-davventura-magici-e-religiosi"/><text:span text:style-name="T1">Semi d’Avventura Magici e Religiosi</text:span><text:bookmark-end text:name="semi-davventura-magici-e-religiosi"/></text:h>
      <text:list text:style-name="L378">
        <text:list-item>
          <text:p text:style-name="P481">Un antico tempio emerge dal deserto dopo una tempesta magica.</text:p>
        </text:list-item>
        <text:list-item>
          <text:p text:style-name="P481">Una reliquia sacra viene rubata dal santuario principale di una città.</text:p>
        </text:list-item>
        <text:list-item>
          <text:p text:style-name="P481">Un rito sacro viene interrotto da una forza misteriosa che nessuno riesce a identificare.</text:p>
        </text:list-item>
        <text:list-item>
          <text:p text:style-name="P481">Una profezia dimenticata si avvera, scatenando caos tra le fazioni religiose.</text:p>
        </text:list-item>
        <text:list-item>
          <text:p text:style-name="P481">Un potente artefatto magico inizia a emanare una strana energia, attirando attenzione indesiderata.</text:p>
        </text:list-item>
        <text:list-item>
          <text:p text:style-name="P481">Una setta proibita ritorna, cercando di risvegliare un’antica divinità malvagia.</text:p>
        </text:list-item>
        <text:list-item>
          <text:p text:style-name="P481">Un santuario isolato diventa teatro di strani fenomeni soprannaturali.</text:p>
        </text:list-item>
        <text:list-item>
          <text:p text:style-name="P481">Una maledizione colpisce una comunità quando profanano un antico tumulo.</text:p>
        </text:list-item>
        <text:list-item>
          <text:p text:style-name="P481">Un sacerdote si rivolge ai giocatori per investigare su sogni profetici inquietanti.</text:p>
        </text:list-item>
        <text:list-item>
          <text:p text:style-name="P481">Un oggetto magico di immenso potere viene scoperto durante scavi archeologici.</text:p>
        </text:list-item>
        <text:list-item>
          <text:p text:style-name="P481">I seguaci di una nuova divinità eretica iniziano a raccogliere seguaci in massa.</text:p>
        </text:list-item>
        <text:list-item>
          <text:p text:style-name="P481">Una catastrofe naturale viene erroneamente interpretata come un segno divino.</text:p>
        </text:list-item>
        <text:list-item>
          <text:p text:style-name="P481">Un antico grimorio viene ritrovato, contenente riti oscuri per evocare creature ultraterrene.</text:p>
        </text:list-item>
        <text:list-item>
          <text:p text:style-name="P481">Una sacra statua inizia a piangere sangue, gettando il culto locale nel panico.</text:p>
        </text:list-item>
        <text:list-item>
          <text:p text:style-name="P481">Un conflitto tra due divinità minori causa alterazioni della realtà nelle terre circostanti.</text:p>
        </text:list-item>
        <text:list-item>
          <text:p text:style-name="P481">Un oggetto sacro sparisce misteriosamente, mettendo a rischio la stabilità di un regno.</text:p>
        </text:list-item>
        <text:list-item>
          <text:p text:style-name="P481">I druidi di una foresta sacra chiedono aiuto per respingere una minaccia soprannaturale.</text:p>
        </text:list-item>
        <text:list-item>
          <text:p text:style-name="P481">Una setta segreta cerca di rianimare un antico impero con un rituale proibito.</text:p>
        </text:list-item>
        <text:list-item>
          <text:p text:style-name="P481">Una reliquia perduta riappare, ma porta con sé una maledizione devastante.</text:p>
        </text:list-item>
        <text:list-item>
          <text:p text:style-name="P481">Una profezia incompiuta richiede che i giocatori trovino l’unico erede nascosto.</text:p>
        </text:list-item>
      </text:list>
      <text:h text:style-name="Heading_20_3" text:outline-level="3"><text:bookmark-start text:name="semi-davventura-marittimi-e-di-esplorazione"/><text:span text:style-name="T1">Semi d’Avventura Marittimi e di Esplorazione</text:span><text:bookmark-end text:name="semi-davventura-marittimi-e-di-esplorazione"/></text:h>
      <text:list text:style-name="L379">
        <text:list-item>
          <text:p text:style-name="P482">Una nave mercantile scompare misteriosamente vicino a una zona nota per le sirene.</text:p>
        </text:list-item>
        <text:list-item>
          <text:p text:style-name="P482">I pirati hanno preso il controllo di una piccola isola strategica.</text:p>
        </text:list-item>
        <text:list-item>
          <text:p text:style-name="P482">Una spedizione parte alla ricerca di una leggendaria città sommersa.</text:p>
        </text:list-item>
        <text:list-item>
          <text:p text:style-name="P482">Una tempesta improvvisa devia una nave verso un’isola sconosciuta e pericolosa.</text:p>
        </text:list-item>
        <text:list-item>
          <text:p text:style-name="P482">Una misteriosa nebbia copre il mare, facendo sparire tutte le navi che ci entrano.</text:p>
        </text:list-item>
        <text:list-item>
          <text:p text:style-name="P482">Un capitano maledetto cerca l’aiuto dei giocatori per spezzare l’incantesimo che lo lega al mare.</text:p>
        </text:list-item>
        <text:list-item>
          <text:p text:style-name="P482">Una mappa antica conduce a un tesoro sepolto su un’isola infestata da creature mostruose.</text:p>
        </text:list-item>
        <text:list-item>
          <text:p text:style-name="P482">Un mostro marino comincia a attaccare convogli commerciali nelle rotte principali.</text:p>
        </text:list-item>
        <text:list-item>
          <text:p text:style-name="P482">Una nave fantasma appare periodicamente in una rotta commerciale molto battuta.</text:p>
        </text:list-item>
        <text:list-item>
          <text:p text:style-name="P482">Un gruppo di pirati minaccia di affondare tutte le navi finché non vengono pagati dei tributi.</text:p>
        </text:list-item>
        <text:list-item>
          <text:p text:style-name="P482">Un esploratore invita i giocatori a unirsi a lui per mappare acque inesplorate.</text:p>
        </text:list-item>
        <text:list-item>
          <text:p text:style-name="P482">Una razza marina si rivela essere in guerra con gli abitanti costieri.</text:p>
        </text:list-item>
        <text:list-item>
          <text:p text:style-name="P482">Una nave abbandonata e danneggiata viene trovata in mare aperto senza equipaggio.</text:p>
        </text:list-item>
        <text:list-item>
          <text:p text:style-name="P482">Gli abitanti di un’isola riportano incontri con creature che emergono dalle profondità.</text:p>
        </text:list-item>
        <text:list-item>
          <text:p text:style-name="P482">Un antico faro si spegne improvvisamente, causando numerosi naufragi.</text:p>
        </text:list-item>
        <text:list-item>
          <text:p text:style-name="P482">Una corrente magica stravolge le rotte conosciute, rendendo il mare imprevedibile.</text:p>
        </text:list-item>
        <text:list-item>
          <text:p text:style-name="P482">Una nave di esploratori riporta indizi di un continente sconosciuto all’orizzonte.</text:p>
        </text:list-item>
        <text:list-item>
          <text:p text:style-name="P482">Un equipaggio maledetto si materializza per raccogliere nuove anime da portare negli abissi.</text:p>
        </text:list-item>
        <text:list-item>
          <text:p text:style-name="P482">Una serie di misteriose scosse sottomarine provoca l’emersione di antiche rovine.</text:p>
        </text:list-item>
        <text:list-item>
          <text:p text:style-name="P482">Un marinaio porta notizie di un’antica reliquia marina nascosta su un’isola desolata.</text:p>
        </text:list-item>
      </text:list>
      <text:h text:style-name="Heading_20_3" text:outline-level="3"><text:bookmark-start text:name="semi-davventura-mercantili-e-di-commercio"/><text:span text:style-name="T1">Semi d’Avventura Mercantili e di Commercio</text:span><text:bookmark-end text:name="semi-davventura-mercantili-e-di-commercio"/></text:h>
      <text:list text:style-name="L380">
        <text:list-item>
          <text:p text:style-name="P483">Un convoglio di spezie di alto valore viene attaccato e rapinato da banditi.</text:p>
        </text:list-item>
        <text:list-item>
          <text:p text:style-name="P483">I mercanti locali sono minacciati da una nuova tassa imposta da un nobile corrotto.</text:p>
        </text:list-item>
        <text:list-item>
          <text:p text:style-name="P483">Un’intera carovana commerciale sparisce senza lasciare traccia nel deserto.</text:p>
        </text:list-item>
        <text:list-item>
          <text:p text:style-name="P483">Un’importante rotta commerciale è bloccata a causa di una faida tra città-stato rivali.</text:p>
        </text:list-item>
        <text:list-item>
          <text:p text:style-name="P483">Una gilda di mercanti ha bisogno di protezione per il trasporto di un carico segreto.</text:p>
        </text:list-item>
        <text:list-item>
          <text:p text:style-name="P483">Un nuovo materiale scoperto nelle montagne promette ricchezze immense, ma è estremamente pericoloso.</text:p>
        </text:list-item>
        <text:list-item>
          <text:p text:style-name="P483">Un gruppo di mercanti chiede aiuto per liberarsi da un contratto ingiusto firmato con una gilda potente.</text:p>
        </text:list-item>
        <text:list-item>
          <text:p text:style-name="P483">I pirati bloccano una delle principali rotte marittime, facendo crollare l’economia locale.</text:p>
        </text:list-item>
        <text:list-item>
          <text:p text:style-name="P483">Una misteriosa epidemia affligge i lavoratori delle miniere, fermando l’estrazione di risorse cruciali.</text:p>
        </text:list-item>
        <text:list-item>
          <text:p text:style-name="P483">Un contrabbando di armi rischia di scatenare una guerra tra due nazioni vicine.</text:p>
        </text:list-item>
        <text:list-item>
          <text:p text:style-name="P483">Un antico mercato nero si riattiva, offrendo merce proibita proveniente da civiltà dimenticate.</text:p>
        </text:list-item>
        <text:list-item>
          <text:p text:style-name="P483">Una carovana di tessuti preziosi è scomparsa e si teme un sabotaggio da parte di concorrenti.</text:p>
        </text:list-item>
        <text:list-item>
          <text:p text:style-name="P483">Un ricco mercante offre una ricompensa per il ritrovamento di un carico rubato.</text:p>
        </text:list-item>
        <text:list-item>
          <text:p text:style-name="P483">Una spedizione pericolosa verso terre lontane promette enormi profitti, ma nessuno vuole partire.</text:p>
        </text:list-item>
        <text:list-item>
          <text:p text:style-name="P483">Un magazzino importante viene misteriosamente incendiato, destabilizzando l’economia cittadina.</text:p>
        </text:list-item>
        <text:list-item>
          <text:p text:style-name="P483">I giocatori vengono incaricati di scortare un raro carico di spezie attraverso terre ostili.</text:p>
        </text:list-item>
        <text:list-item>
          <text:p text:style-name="P483">Un avamposto commerciale è stato attaccato e occupato da ribelli o banditi.</text:p>
        </text:list-item>
        <text:list-item>
          <text:p text:style-name="P483">Una scoperta archeologica potrebbe cambiare le rotte commerciali, ma vari attori vogliono mantenerla segreta.</text:p>
        </text:list-item>
        <text:list-item>
          <text:p text:style-name="P483">Una disputa tra due famiglie mercantili rischia di sfociare in una guerra civile.</text:p>
        </text:list-item>
        <text:list-item>
          <text:p text:style-name="P483">Un mercato sotterraneo offre merci rare e illegali, ma è strettamente sorvegliato.</text:p>
        </text:list-item>
      </text:list>
      <text:h text:style-name="Heading_20_3" text:outline-level="3"><text:bookmark-start text:name="semi-davventura-nelle-terre-selvagge"/><text:span text:style-name="T1">Semi d’Avventura nelle Terre Selvagge</text:span><text:bookmark-end text:name="semi-davventura-nelle-terre-selvagge"/></text:h>
      <text:list text:style-name="L381">
        <text:list-item>
          <text:p text:style-name="P484">Una tribù nomade è stata decimata da un misterioso predatore sconosciuto.</text:p>
        </text:list-item>
        <text:list-item>
          <text:p text:style-name="P484">Un esploratore ha avvistato strane luci provenire dalle rovine di un’antica città.</text:p>
        </text:list-item>
        <text:list-item>
          <text:p text:style-name="P484">Una creatura leggendaria sta terrorizzando le pianure, distruggendo villaggi e carovane.</text:p>
        </text:list-item>
        <text:list-item>
          <text:p text:style-name="P484">Una rara pianta curativa è fiorita solo in una regione pericolosa e remota.</text:p>
        </text:list-item>
        <text:list-item>
          <text:p text:style-name="P484">Una tribù locale avverte i giocatori di non oltrepassare un certo confine sacro, ma nessuno sa perché.</text:p>
        </text:list-item>
        <text:list-item>
          <text:p text:style-name="P484">Un cacciatore scompare durante una spedizione in una foresta considerata maledetta.</text:p>
        </text:list-item>
        <text:list-item>
          <text:p text:style-name="P484">Strani segni e simboli appaiono improvvisamente su rocce e alberi in una valle remota.</text:p>
        </text:list-item>
        <text:list-item>
          <text:p text:style-name="P484">Gli animali locali si comportano in modo strano e aggressivo senza una spiegazione apparente.</text:p>
        </text:list-item>
        <text:list-item>
          <text:p text:style-name="P484">Una guida esperta viene trovata morta, apparentemente uccisa da una creatura sconosciuta.</text:p>
        </text:list-item>
        <text:list-item>
          <text:p text:style-name="P484">I druids di una regione chiedono aiuto per fermare un’incursione di creature magiche corrotte.</text:p>
        </text:list-item>
        <text:list-item>
          <text:p text:style-name="P484">Un raro animale sacro viene catturato da bracconieri, mettendo in pericolo l’equilibrio naturale.</text:p>
        </text:list-item>
        <text:list-item>
          <text:p text:style-name="P484">Una caverna inesplorata viene trovata, contenente strani manufatti di una civiltà perduta.</text:p>
        </text:list-item>
        <text:list-item>
          <text:p text:style-name="P484">Una tribù isolata chiede aiuto per difendersi da misteriosi invasori notturni.</text:p>
        </text:list-item>
        <text:list-item>
          <text:p text:style-name="P484">Una tempesta magica ha devastato la regione, creando pericolose alterazioni nella flora e fauna.</text:p>
        </text:list-item>
        <text:list-item>
          <text:p text:style-name="P484">Un esploratore rivela una nuova regione piena di antichi resti, ma afferma di essere inseguito da strane ombre.</text:p>
        </text:list-item>
        <text:list-item>
          <text:p text:style-name="P484">Un leggendario cacciatore sfida i giocatori a cacciare una bestia mitica che ha terrorizzato la zona.</text:p>
        </text:list-item>
        <text:list-item>
          <text:p text:style-name="P484">Una strana epidemia si diffonde tra gli abitanti delle terre selvagge, e nessuno sa come fermarla.</text:p>
        </text:list-item>
        <text:list-item>
          <text:p text:style-name="P484">Una serie di omicidi rituali lascia cadaveri disposti in modo simbolico in tutta la regione.</text:p>
        </text:list-item>
        <text:list-item>
          <text:p text:style-name="P484">Le terre selvagge si stanno gradualmente espandendo, inghiottendo villaggi e fattorie.</text:p>
        </text:list-item>
        <text:list-item>
          <text:p text:style-name="P484">Gli spiriti della foresta sono inquieti, e i loro sussurri parlano di una minaccia imminente.</text:p>
        </text:list-item>
      </text:list>
      <text:h text:style-name="Heading_20_2" text:outline-level="2"><text:bookmark-start text:name="eventi-incontri-spunti"/><text:span text:style-name="T1">Eventi, incontri, spunti</text:span><text:bookmark-end text:name="eventi-incontri-spunti"/></text:h>
      <text:h text:style-name="Heading_20_3" text:outline-level="3"><text:bookmark-start text:name="eventi-casuali-in-marethar"/><text:span text:style-name="T1">Eventi Casuali in Marethar</text:span><text:bookmark-end text:name="eventi-casuali-in-marethar"/></text:h>
      <text:list text:style-name="L382">
        <text:list-item>
          <text:p text:style-name="P485">Un mercante offre ai giocatori un carico di spezie rare a un prezzo sospettosamente basso.</text:p>
        </text:list-item>
        <text:list-item>
          <text:p text:style-name="P485">Un gruppo di ribelli inizia una rivolta in una città chiave.</text:p>
        </text:list-item>
        <text:list-item>
          <text:p text:style-name="P485">Un profeta di strada predice una catastrofe imminente, causando panico tra la popolazione.</text:p>
        </text:list-item>
        <text:list-item>
          <text:p text:style-name="P485">Un nobile chiede protezione dai suoi stessi familiari che lo vogliono uccidere.</text:p>
        </text:list-item>
        <text:list-item>
          <text:p text:style-name="P485">Un’antica rovina emerge dal terreno durante un terremoto, attirando studiosi e avventurieri.</text:p>
        </text:list-item>
        <text:list-item>
          <text:p text:style-name="P485">Una nave carica di merci pregiate attracca nel porto senza alcun membro dell’equipaggio a bordo.</text:p>
        </text:list-item>
        <text:list-item>
          <text:p text:style-name="P485">Un’importante carovana commerciale viene attaccata da misteriosi banditi mascherati.</text:p>
        </text:list-item>
        <text:list-item>
          <text:p text:style-name="P485">Una misteriosa malattia si diffonde rapidamente tra i lavoratori di una miniera.</text:p>
        </text:list-item>
        <text:list-item>
          <text:p text:style-name="P485">Un gruppo di mercenari propone ai giocatori di unirsi a loro per una missione segreta.</text:p>
        </text:list-item>
        <text:list-item>
          <text:p text:style-name="P485">Un’epidemia di carestia colpisce le regioni rurali, causando l’aumento dei prezzi dei viveri.</text:p>
        </text:list-item>
        <text:list-item>
          <text:p text:style-name="P485">Un diplomatico straniero cerca di corrompere i giocatori per ottenere informazioni segrete.</text:p>
        </text:list-item>
        <text:list-item>
          <text:p text:style-name="P485">Una tempesta magica colpisce una regione costiera, mutando il paesaggio.</text:p>
        </text:list-item>
        <text:list-item>
          <text:p text:style-name="P485">Un corteo di nobili viene attaccato da creature mitiche durante un viaggio diplomatico.</text:p>
        </text:list-item>
        <text:list-item>
          <text:p text:style-name="P485">Un festival locale sfugge al controllo e sfocia in una rissa tra due fazioni rivali.</text:p>
        </text:list-item>
        <text:list-item>
          <text:p text:style-name="P485">Un misterioso oggetto cade dal cielo, causando preoccupazione e curiosità nella popolazione.</text:p>
        </text:list-item>
        <text:list-item>
          <text:p text:style-name="P485">Un antico culto riemerge, e i suoi seguaci compiono strani riti nelle periferie della città.</text:p>
        </text:list-item>
        <text:list-item>
          <text:p text:style-name="P485">Un gruppo di schiavi fugge da una città e cerca rifugio nelle terre selvagge.</text:p>
        </text:list-item>
        <text:list-item>
          <text:p text:style-name="P485">Una cometa viene avvistata nel cielo, e gli astrologi affermano che è un cattivo presagio.</text:p>
        </text:list-item>
        <text:list-item>
          <text:p text:style-name="P485">Un’enorme creatura marina viene avvistata al largo delle coste, causando il panico nei pescatori.</text:p>
        </text:list-item>
        <text:list-item>
          <text:p text:style-name="P485">I prezzi delle armi e dell’equipaggiamento militare salgono alle stelle a causa di una guerra imminente.</text:p>
        </text:list-item>
      </text:list>
      <text:h text:style-name="Heading_20_3" text:outline-level="3"><text:bookmark-start text:name="incontri-casuali"/><text:span text:style-name="T1">Incontri Casuali</text:span><text:bookmark-end text:name="incontri-casuali"/></text:h>
      <text:h text:style-name="Heading_20_4" text:outline-level="4"><text:bookmark-start text:name="incontri-nelle-foreste-di-linia"/><text:span text:style-name="T1">Incontri nelle Foreste di Linia</text:span><text:bookmark-end text:name="incontri-nelle-foreste-di-linia"/></text:h>
      <text:list text:style-name="L383">
        <text:list-item>
          <text:p text:style-name="P486">Un branco di lupi grigi segue i giocatori a distanza, osservandoli senza attaccare.</text:p>
        </text:list-item>
        <text:list-item>
          <text:p text:style-name="P486">Un cervo dorato, ritenuto sacro dagli abitanti locali, appare brevemente tra gli alberi.</text:p>
        </text:list-item>
        <text:list-item>
          <text:p text:style-name="P486">Una tribù nomade accampa tra gli alberi per riposare, invitando i giocatori a unirsi a loro.</text:p>
        </text:list-item>
        <text:list-item>
          <text:p text:style-name="P486">Una fenice della foresta si rigenera tra le ceneri di un albero bruciato.</text:p>
        </text:list-item>
        <text:list-item>
          <text:p text:style-name="P486">Un gruppo di taglialegna sfugge al drago della foresta, chiedendo protezione.</text:p>
        </text:list-item>
        <text:list-item>
          <text:p text:style-name="P486">Una vecchia eremita racconta leggende dimenticate della foresta, in cambio di cibo.</text:p>
        </text:list-item>
        <text:list-item>
          <text:p text:style-name="P486">Un’antica rovina viene scoperta sotto un grande cedro, circondata da strane iscrizioni.</text:p>
        </text:list-item>
        <text:list-item>
          <text:p text:style-name="P486">Una pianta carnivora gigante attacca chiunque si avvicini troppo alla sua area.</text:p>
        </text:list-item>
        <text:list-item>
          <text:p text:style-name="P486">Una banda di cacciatori illegali sta catturando animali protetti, creando tensioni con gli abitanti.</text:p>
        </text:list-item>
        <text:list-item>
          <text:p text:style-name="P486">Un falco, con una pergamena legata alla zampa, atterra su un ramo vicino.</text:p>
        </text:list-item>
        <text:list-item>
          <text:p text:style-name="P486">Un gruppo di druidi sta eseguendo un rituale sacro sotto un antico albero.</text:p>
        </text:list-item>
        <text:list-item>
          <text:p text:style-name="P486">Un serpente gigante s’infila tra le radici di una grande quercia, pronto ad attaccare.</text:p>
        </text:list-item>
        <text:list-item>
          <text:p text:style-name="P486">Una pozza d’acqua riflette visioni mistiche del futuro, ma solo per pochi secondi.</text:p>
        </text:list-item>
        <text:list-item>
          <text:p text:style-name="P486">Una tempesta improvvisa colpisce la foresta, rendendo il viaggio estremamente difficile.</text:p>
        </text:list-item>
        <text:list-item>
          <text:p text:style-name="P486">Uno spirito della foresta offre aiuto ai giocatori in cambio di un compito segreto.</text:p>
        </text:list-item>
        <text:list-item>
          <text:p text:style-name="P486">Un gruppo di mercenari nasconde un carico rubato in una grotta nascosta.</text:p>
        </text:list-item>
        <text:list-item>
          <text:p text:style-name="P486">Una rara felce d’oro cresce in un angolo ombreggiato, ma è custodita da una creatura magica.</text:p>
        </text:list-item>
        <text:list-item>
          <text:p text:style-name="P486">Un’aquila reale gigante attacca dall’alto, difendendo il suo nido.</text:p>
        </text:list-item>
        <text:list-item>
          <text:p text:style-name="P486">Un antico totem coperto di muschio vibra con energia magica dimenticata.</text:p>
        </text:list-item>
        <text:list-item>
          <text:p text:style-name="P486">Una serie di ombre sfuggenti scompaiono tra gli alberi, sussurrando antiche maledizioni.</text:p>
        </text:list-item>
      </text:list>
      <text:h text:style-name="Heading_20_4" text:outline-level="4"><text:bookmark-start text:name="incontri-nelle-pianure-di-vallan"/><text:span text:style-name="T1">Incontri nelle Pianure di Vallan</text:span><text:bookmark-end text:name="incontri-nelle-pianure-di-vallan"/></text:h>
      <text:list text:style-name="L384">
        <text:list-item>
          <text:p text:style-name="P487">Una mandria di bisonti si muove attraverso la pianura, bloccando la strada.</text:p>
        </text:list-item>
        <text:list-item>
          <text:p text:style-name="P487">Un falco pellegrino segue i giocatori dall’alto, osservando attentamente.</text:p>
        </text:list-item>
        <text:list-item>
          <text:p text:style-name="P487">Un gruppo di contadini sta cercando disperatamente un bambino disperso.</text:p>
        </text:list-item>
        <text:list-item>
          <text:p text:style-name="P487">Un cacciatore solitario offre informazioni su una creatura leggendaria avvistata di recente.</text:p>
        </text:list-item>
        <text:list-item>
          <text:p text:style-name="P487">Un branco di cavalli selvaggi corre attraverso la pianura, seminando il caos.</text:p>
        </text:list-item>
        <text:list-item>
          <text:p text:style-name="P487">Una volpe rossa si avvicina, rubando cibo dai rifornimenti del gruppo.</text:p>
        </text:list-item>
        <text:list-item>
          <text:p text:style-name="P487">Un enorme incendio minaccia i campi coltivati, mentre i locali cercano aiuto.</text:p>
        </text:list-item>
        <text:list-item>
          <text:p text:style-name="P487">Una strana statua di pietra appare in mezzo alla pianura, completamente fuori luogo.</text:p>
        </text:list-item>
        <text:list-item>
          <text:p text:style-name="P487">Un gruppo di spiriti del raccolto appare durante la notte, proteggendo le coltivazioni.</text:p>
        </text:list-item>
        <text:list-item>
          <text:p text:style-name="P487">Un fulmine colpisce un albero solitario, creando un portale temporaneo verso un’altra dimensione.</text:p>
        </text:list-item>
        <text:list-item>
          <text:p text:style-name="P487">Un contadino disperato chiede aiuto per salvare i raccolti da un’invasione di locuste giganti.</text:p>
        </text:list-item>
        <text:list-item>
          <text:p text:style-name="P487">Una battaglia tra tribù nomadi esplode improvvisamente, coinvolgendo chiunque si trovi nei paraggi.</text:p>
        </text:list-item>
        <text:list-item>
          <text:p text:style-name="P487">Un carro si rompe nel bel mezzo della pianura, con mercanti preoccupati per un imminente attacco di banditi.</text:p>
        </text:list-item>
        <text:list-item>
          <text:p text:style-name="P487">Un gruppo di cavalieri armati attraversa la pianura, alla ricerca di un nemico invisibile.</text:p>
        </text:list-item>
        <text:list-item>
          <text:p text:style-name="P487">Un totem antico si erge al centro di un campo, emanando un’aura di protezione magica.</text:p>
        </text:list-item>
        <text:list-item>
          <text:p text:style-name="P487">Un gruppo di banditi sta terrorizzando i villaggi locali, chiedendo tributi in cambio di protezione.</text:p>
        </text:list-item>
        <text:list-item>
          <text:p text:style-name="P487">Un cavallo alato si libra sopra la pianura, attirando lo sguardo meravigliato dei viaggiatori.</text:p>
        </text:list-item>
        <text:list-item>
          <text:p text:style-name="P487">Un misterioso cerchio nel grano appare durante la notte, e nessuno riesce a spiegare la sua origine.</text:p>
        </text:list-item>
        <text:list-item>
          <text:p text:style-name="P487">Un pastore racconta storie di una creatura che attacca di notte, lasciando solo ossa spezzate.</text:p>
        </text:list-item>
        <text:list-item>
          <text:p text:style-name="P487">Un antico carro da guerra, sommerso dalla terra, riemerge dopo una pioggia torrenziale.</text:p>
        </text:list-item>
      </text:list>
      <text:h text:style-name="Heading_20_4" text:outline-level="4"><text:bookmark-start text:name="incontri-nelle-montagne-di-orethia"/><text:span text:style-name="T1">Incontri nelle Montagne di Orethia</text:span><text:bookmark-end text:name="incontri-nelle-montagne-di-orethia"/></text:h>
      <text:list text:style-name="L385">
        <text:list-item>
          <text:p text:style-name="P488">Un grifone solitario sorvola le cime, sorvegliando il territorio.</text:p>
        </text:list-item>
        <text:list-item>
          <text:p text:style-name="P488">Un gruppo di stambecchi di ferro blocca un passaggio, noncuranti della presenza umana.</text:p>
        </text:list-item>
        <text:list-item>
          <text:p text:style-name="P488">Un minatore disperso chiede aiuto per sfuggire a un golem di pietra che lo insegue.</text:p>
        </text:list-item>
        <text:list-item>
          <text:p text:style-name="P488">Un’antica caverna rivelata da una frana sembra emanare un’aura magica.</text:p>
        </text:list-item>
        <text:list-item>
          <text:p text:style-name="P488">Una lince delle montagne insegue una preda, ma incrocia la strada del gruppo.</text:p>
        </text:list-item>
        <text:list-item>
          <text:p text:style-name="P488">Un’aquila delle vette attacca chiunque si avvicini troppo al suo nido.</text:p>
        </text:list-item>
        <text:list-item>
          <text:p text:style-name="P488">Un gruppo di esploratori ritiene di aver trovato una vena d’oro, ma strani fenomeni iniziano a verificarsi.</text:p>
        </text:list-item>
        <text:list-item>
          <text:p text:style-name="P488">Un vulcano inattivo comincia a emettere fumo, preannunciando disastri.</text:p>
        </text:list-item>
        <text:list-item>
          <text:p text:style-name="P488">Una tribù montana blocca il passaggio, esigendo un tributo per attraversare le loro terre sacre.</text:p>
        </text:list-item>
        <text:list-item>
          <text:p text:style-name="P488">Una sorgente di acqua calda, creduta magica, sembra curare le ferite istantaneamente.</text:p>
        </text:list-item>
        <text:list-item>
          <text:p text:style-name="P488">Un vecchio eremita si offre di guidare i viaggiatori attraverso un passaggio segreto tra le montagne.</text:p>
        </text:list-item>
        <text:list-item>
          <text:p text:style-name="P488">Una frana improvvisa mette a rischio il gruppo, che deve trovare rifugio.</text:p>
        </text:list-item>
        <text:list-item>
          <text:p text:style-name="P488">Un drago delle montagne si sveglia da un lungo sonno, reclamando il suo antico dominio.</text:p>
        </text:list-item>
        <text:list-item>
          <text:p text:style-name="P488">Un antico tempio nascosto tra le cime è sorvegliato da statue animate.</text:p>
        </text:list-item>
        <text:list-item>
          <text:p text:style-name="P488">Un gruppo di mercenari ha bloccato un passaggio chiave, chiedendo pedaggi.</text:p>
        </text:list-item>
        <text:list-item>
          <text:p text:style-name="P488">Un’antica armatura di un eroe leggendario viene ritrovata in una grotta, ma si dice che sia maledetta.</text:p>
        </text:list-item>
        <text:list-item>
          <text:p text:style-name="P488">Un improvviso terremoto apre una nuova voragine, rivelando rovine dimenticate.</text:p>
        </text:list-item>
        <text:list-item>
          <text:p text:style-name="P488">Un manipolo di briganti di montagna tende un’imboscata a chiunque tenti di attraversare il passo.</text:p>
        </text:list-item>
        <text:list-item>
          <text:p text:style-name="P488">Un misterioso monaco in meditazione predice un imminente disastro naturale.</text:p>
        </text:list-item>
        <text:list-item>
          <text:p text:style-name="P488">Un’aquila gigante afferra uno degli oggetti dei giocatori e vola via con esso.</text:p>
        </text:list-item>
      </text:list>
      <text:h text:style-name="Heading_20_4" text:outline-level="4"><text:bookmark-start text:name="incontri-nelle-paludi-di-meshdad"/><text:span text:style-name="T1">Incontri nelle Paludi di Meshdad</text:span><text:bookmark-end text:name="incontri-nelle-paludi-di-meshdad"/></text:h>
      <text:list text:style-name="L386">
        <text:list-item>
          <text:p text:style-name="P489">Un airone blu si libra sopra le acque stagnanti, indicando la presenza di una creatura nascosta.</text:p>
        </text:list-item>
        <text:list-item>
          <text:p text:style-name="P489">Un coccodrillo palustre attacca improvvisamente, strisciando silenziosamente fuori dall’acqua.</text:p>
        </text:list-item>
        <text:list-item>
          <text:p text:style-name="P489">Un gruppo di pescatori disperati chiede aiuto per recuperare una rete intrappolata sotto il fango.</text:p>
        </text:list-item>
        <text:list-item>
          <text:p text:style-name="P489">Una strana nebbia verde si alza dalle acque della palude, causando allucinazioni a chi la respira.</text:p>
        </text:list-item>
        <text:list-item>
          <text:p text:style-name="P489">Un serpente d’acqua gigante emerge dalle profondità, attaccando senza preavviso.</text:p>
        </text:list-item>
        <text:list-item>
          <text:p text:style-name="P489">Un eremita delle paludi offre saggi consigli in cambio di erbe rare trovate solo nelle paludi.</text:p>
        </text:list-item>
        <text:list-item>
          <text:p text:style-name="P489">Una palafitta abbandonata sprofonda lentamente, ma si dice che custodisca un tesoro dimenticato.</text:p>
        </text:list-item>
        <text:list-item>
          <text:p text:style-name="P489">Una pioggia torrenziale trasforma i sentieri in fiumi, rendendo il cammino pericoloso.</text:p>
        </text:list-item>
        <text:list-item>
          <text:p text:style-name="P489">Un gruppo di mercenari fugge da qualcosa nelle paludi, ma si rifiutano di spiegare cosa.</text:p>
        </text:list-item>
        <text:list-item>
          <text:p text:style-name="P489">Una tribù anfibia semi-intelligente offre un patto per proteggere la palude, ma a un prezzo.</text:p>
        </text:list-item>
        <text:list-item>
          <text:p text:style-name="P489">Un airone parla brevemente ai giocatori, dando loro un messaggio criptico.</text:p>
        </text:list-item>
        <text:list-item>
          <text:p text:style-name="P489">Strani canti echeggiano tra i canneti, portando chiunque li segua verso una rovina sommersa.</text:p>
        </text:list-item>
        <text:list-item>
          <text:p text:style-name="P489">Una ninfea scarlatta sboccia improvvisamente, rivelando una piccola gemma al centro.</text:p>
        </text:list-item>
        <text:list-item>
          <text:p text:style-name="P489">Un gruppo di contrabbandieri nasconde merci illegali in un’isola di giunchi galleggianti.</text:p>
        </text:list-item>
        <text:list-item>
          <text:p text:style-name="P489">Un’idra delle paludi emerge da un antico santuario sommerso, difendendo il suo territorio.</text:p>
        </text:list-item>
        <text:list-item>
          <text:p text:style-name="P489">Un gruppo di ricercatori sta studiando piante rare, ma ha bisogno di protezione dai predatori locali.</text:p>
        </text:list-item>
        <text:list-item>
          <text:p text:style-name="P489">Una nave naufragata emerge dalle acque basse, rivelando misteriosi resti al suo interno.</text:p>
        </text:list-item>
        <text:list-item>
          <text:p text:style-name="P489">Un gruppo di pescatori locali è sparito da giorni, e strane luci si vedono al crepuscolo.</text:p>
        </text:list-item>
        <text:list-item>
          <text:p text:style-name="P489">Un antico albero sacro nel mezzo della palude sembra attirare le creature più pericolose della regione.</text:p>
        </text:list-item>
        <text:list-item>
          <text:p text:style-name="P489">Una passerella di legno cede sotto il peso del gruppo, costringendoli a nuotare tra le acque infide.</text:p>
        </text:list-item>
      </text:list>
      <text:h text:style-name="Heading_20_4" text:outline-level="4"><text:bookmark-start text:name="incontri-nelle-colline-di-ashania"/><text:span text:style-name="T1">Incontri nelle Colline di Ashania</text:span><text:bookmark-end text:name="incontri-nelle-colline-di-ashania"/></text:h>
      <text:list text:style-name="L387">
        <text:list-item>
          <text:p text:style-name="P490">Un gregge di capre delle colline fugge terrorizzato, inseguito da qualcosa di invisibile.</text:p>
        </text:list-item>
        <text:list-item>
          <text:p text:style-name="P490">Un gruppo di vignaioli racconta di aver visto strane luci tra le viti durante la notte.</text:p>
        </text:list-item>
        <text:list-item>
          <text:p text:style-name="P490">Un cinghiale selvatico carica furiosamente chiunque si avvicini al suo territorio.</text:p>
        </text:list-item>
        <text:list-item>
          <text:p text:style-name="P490">Un centauro emerge dalle colline, offrendo un enigma che, se risolto, garantirà un favore.</text:p>
        </text:list-item>
        <text:list-item>
          <text:p text:style-name="P490">Un nido di rondini si è insediato in una vecchia torre di avvistamento, considerato di buon auspicio.</text:p>
        </text:list-item>
        <text:list-item>
          <text:p text:style-name="P490">Un gruppo di contadini racconta di misteriose sparizioni di bestiame durante la notte.</text:p>
        </text:list-item>
        <text:list-item>
          <text:p text:style-name="P490">Una lavanda reale rara fiorisce solo per poche ore, attirando alchimisti e studiosi.</text:p>
        </text:list-item>
        <text:list-item>
          <text:p text:style-name="P490">Un vitigno sacro cresce in un luogo inaccessibile, e un gruppo di mercanti è disposto a pagare bene per i suoi frutti.</text:p>
        </text:list-item>
        <text:list-item>
          <text:p text:style-name="P490">Una banda di mercenari ha eretto un campo improvvisato tra le colline, pronto ad attaccare i viandanti.</text:p>
        </text:list-item>
        <text:list-item>
          <text:p text:style-name="P490">Un pastore si offre di guidare i giocatori attraverso un passaggio segreto in cambio di protezione dai predatori.</text:p>
        </text:list-item>
        <text:list-item>
          <text:p text:style-name="P490">Una cava di pietra è sorvegliata da strani spiriti della terra che proteggono i minerali sacri.</text:p>
        </text:list-item>
        <text:list-item>
          <text:p text:style-name="P490">Un gruppo di centauri delle colline si riunisce per un antico rituale, ma non gradisce intrusi.</text:p>
        </text:list-item>
        <text:list-item>
          <text:p text:style-name="P490">Una strana foschia si diffonde tra le colline, causando visioni e illusioni a chi la attraversa.</text:p>
        </text:list-item>
        <text:list-item>
          <text:p text:style-name="P490">Un’antica cantina è stata scoperta in una vecchia villa abbandonata, ma è infestata da spiriti inquieti.</text:p>
        </text:list-item>
        <text:list-item>
          <text:p text:style-name="P490">Un carro pieno di vino pregiato si è ribaltato lungo il sentiero, e i mercanti chiedono aiuto.</text:p>
        </text:list-item>
        <text:list-item>
          <text:p text:style-name="P490">Un serpente gigante si è insediato tra i vigneti, mettendo a rischio l’intero raccolto.</text:p>
        </text:list-item>
        <text:list-item>
          <text:p text:style-name="P490">Un canto lontano attira il gruppo verso una collina sacra, sede di un antico tempio dimenticato.</text:p>
        </text:list-item>
        <text:list-item>
          <text:p text:style-name="P490">Un gruppo di viaggiatori si rifugia tra i vigneti, temendo un attacco imminente da briganti locali.</text:p>
        </text:list-item>
        <text:list-item>
          <text:p text:style-name="P490">Una festa di raccolto si trasforma in un’occasione di alleanze, intrighi e potenziali pericoli.</text:p>
        </text:list-item>
        <text:list-item>
          <text:p text:style-name="P490">Un antico ulivo al centro di un vigneto comincia a sanguinare misteriosamente, attirando curiosi e timorosi.</text:p>
        </text:list-item>
      </text:list>
      <text:h text:style-name="Heading_20_4" text:outline-level="4"><text:bookmark-start text:name="incontri-nelle-isole-del-marethar"/><text:span text:style-name="T1">Incontri nelle Isole del Marethar</text:span><text:bookmark-end text:name="incontri-nelle-isole-del-marethar"/></text:h>
      <text:list text:style-name="L388">
        <text:list-item>
          <text:p text:style-name="P491">Un gruppo di pescatori locali trova una rete piena di pesci, ma con strani simboli incisi sulle squame.</text:p>
        </text:list-item>
        <text:list-item>
          <text:p text:style-name="P491">Una tempesta improvvisa spinge il gruppo su un’isola sconosciuta, che non appare su nessuna mappa.</text:p>
        </text:list-item>
        <text:list-item>
          <text:p text:style-name="P491">Un pirata leggendario appare all’orizzonte, chiedendo un antico tributo per poter navigare liberamente.</text:p>
        </text:list-item>
        <text:list-item>
          <text:p text:style-name="P491">Una colonia di uccelli marini si raduna attorno a un faro abbandonato, e qualcosa sembra brillare in cima.</text:p>
        </text:list-item>
        <text:list-item>
          <text:p text:style-name="P491">Un misterioso naufrago offre aiuto, ma il suo passato sembra pieno di segreti pericolosi.</text:p>
        </text:list-item>
        <text:list-item>
          <text:p text:style-name="P491">Un antico tempio sommerso emerge temporaneamente a causa di un’eccezionale bassa marea.</text:p>
        </text:list-item>
        <text:list-item>
          <text:p text:style-name="P491">Un’isola che si credeva disabitata mostra segni recenti di insediamento, con fuochi accesi e barche attraccate.</text:p>
        </text:list-item>
        <text:list-item>
          <text:p text:style-name="P491">Strane luci danzano sopra l’acqua, attirando chiunque si avvicini troppo.</text:p>
        </text:list-item>
        <text:list-item>
          <text:p text:style-name="P491">Un piccolo villaggio di pescatori offre ospitalità, ma gli abitanti sembrano troppo amichevoli per essere sinceri.</text:p>
        </text:list-item>
        <text:list-item>
          <text:p text:style-name="P491">Una battaglia tra due navi pirata esplode vicino alla costa, trascinando il gruppo nei combattimenti.</text:p>
        </text:list-item>
        <text:list-item>
          <text:p text:style-name="P491">Un antico albero su un’isola centrale è venerato come sacro, ma toccarlo potrebbe scatenare maledizioni.</text:p>
        </text:list-item>
        <text:list-item>
          <text:p text:style-name="P491">Un leviatano viene avvistato in lontananza, causando il panico tra i marinai più esperti.</text:p>
        </text:list-item>
        <text:list-item>
          <text:p text:style-name="P491">Una sirena emerge dalle profondità, chiedendo aiuto per spezzare una maledizione antica.</text:p>
        </text:list-item>
        <text:list-item>
          <text:p text:style-name="P491">Un gruppo di esploratori ha trovato una grotta piena di tesori, ma è sorvegliata da strane creature anfibie.</text:p>
        </text:list-item>
        <text:list-item>
          <text:p text:style-name="P491">Un faro abbandonato si riaccende improvvisamente, ma nessuno sembra sapere chi lo abbia acceso.</text:p>
        </text:list-item>
        <text:list-item>
          <text:p text:style-name="P491">Un mercante di spezie naufraga vicino all’isola, offrendo preziosi beni in cambio di soccorso.</text:p>
        </text:list-item>
        <text:list-item>
          <text:p text:style-name="P491">Un’armata navale proveniente da una nazione vicina blocca il passaggio, chiedendo tributi o informazioni su pirati locali.</text:p>
        </text:list-item>
        <text:list-item>
          <text:p text:style-name="P491">Una tempesta magica scoppia improvvisamente, invertendo la bussola e portando il gruppo fuori rotta.</text:p>
        </text:list-item>
        <text:list-item>
          <text:p text:style-name="P491">Un’isola fluttuante emerge dalle acque, coperta di antiche rovine e strani cristalli luminescenti.</text:p>
        </text:list-item>
        <text:list-item>
          <text:p text:style-name="P491">Una roccia gigante prende vita, rivelando essere un golem d’acqua marina in letargo per secoli.</text:p>
        </text:list-item>
      </text:list>
      <text:h text:style-name="Heading_20_4" text:outline-level="4"><text:bookmark-start text:name="incontri-nel-deserto-di-qadmath"/><text:span text:style-name="T1">Incontri nel Deserto di Qadmath</text:span><text:bookmark-end text:name="incontri-nel-deserto-di-qadmath"/></text:h>
      <text:list text:style-name="L389">
        <text:list-item>
          <text:p text:style-name="P492">Un gruppo di carovane si ferma in un’oasi, ma l’acqua sembra avvelenata da una creatura oscura.</text:p>
        </text:list-item>
        <text:list-item>
          <text:p text:style-name="P492">Un ifrit del deserto appare tra le dune, offrendo un patto in cambio di un favore pericoloso.</text:p>
        </text:list-item>
        <text:list-item>
          <text:p text:style-name="P492">Un’improvvisa tempesta di sabbia colpisce, nascondendo un antico portale tra le dune.</text:p>
        </text:list-item>
        <text:list-item>
          <text:p text:style-name="P492">Un mercante solitario vaga nel deserto, affermando di aver trovato una città perduta piena di tesori.</text:p>
        </text:list-item>
        <text:list-item>
          <text:p text:style-name="P492">Una tribù nomade offre ospitalità, ma in cambio chiede aiuto per difendersi da un misterioso predatore notturno.</text:p>
        </text:list-item>
        <text:list-item>
          <text:p text:style-name="P492">Un roc gigantesco sorvola il deserto, portando con sé una preda immensa, ma sembra interessato ai viaggiatori.</text:p>
        </text:list-item>
        <text:list-item>
          <text:p text:style-name="P492">Un’oasi nascosta appare all’improvviso, ma gli abitanti locali avvertono di non fidarsi delle sue acque.</text:p>
        </text:list-item>
        <text:list-item>
          <text:p text:style-name="P492">Un’antica piramide emerge dalla sabbia dopo una tempesta, rivelando un ingresso sigillato da millenni.</text:p>
        </text:list-item>
        <text:list-item>
          <text:p text:style-name="P492">Un serpente gigante scava sotto la sabbia, cacciando il gruppo, mentre ondeggia tra le dune.</text:p>
        </text:list-item>
        <text:list-item>
          <text:p text:style-name="P492">Un gruppo di cacciatori del deserto offre guide attraverso le dune, ma sono chiaramente più interessati alle ricchezze dei viaggiatori.</text:p>
        </text:list-item>
        <text:list-item>
          <text:p text:style-name="P492">Una visione di un antico re del deserto appare tra le dune, promettendo fortuna a chiunque lo segua.</text:p>
        </text:list-item>
        <text:list-item>
          <text:p text:style-name="P492">Un’enorme roccia levitante si sposta lentamente attraverso il deserto, creando una scia di energia magica dietro di sé.</text:p>
        </text:list-item>
        <text:list-item>
          <text:p text:style-name="P492">Un’antica statua di sabbia si anima e inizia a camminare verso una meta sconosciuta, ignorando tutto e tutti.</text:p>
        </text:list-item>
        <text:list-item>
          <text:p text:style-name="P492">Un gruppo di scorpioni dorati attacca senza preavviso, difendendo un antico oggetto sepolto nella sabbia.</text:p>
        </text:list-item>
        <text:list-item>
          <text:p text:style-name="P492">Una vecchia strada dimenticata appare all’improvviso, indicata da pietre miliari consumate e graffiti misteriosi.</text:p>
        </text:list-item>
        <text:list-item>
          <text:p text:style-name="P492">Un carovaniere narra di una tempesta di fuoco che brucia solo i non puri di cuore, e si avvicina rapidamente.</text:p>
        </text:list-item>
        <text:list-item>
          <text:p text:style-name="P492">Un cacciatore di reliquie trova un antico artefatto, ma sembra essere maledetto, portando sfortuna al gruppo.</text:p>
        </text:list-item>
        <text:list-item>
          <text:p text:style-name="P492">Un’oasi sacra appare, protetta da spiriti del deserto che esigono rispetto e offerte.</text:p>
        </text:list-item>
        <text:list-item>
          <text:p text:style-name="P492">Una caverna nascosta sotto le dune ospita un’intera colonia di pipistrelli giganti, difensori di antiche iscrizioni.</text:p>
        </text:list-item>
        <text:list-item>
          <text:p text:style-name="P492">Una visione di una carovana fantasma appare all’orizzonte, spingendo chi la insegue a perdersi nel deserto.</text:p>
        </text:list-item>
      </text:list>
      <text:h text:style-name="Heading_20_4" text:outline-level="4"><text:bookmark-start text:name="incontri-nei-fiumi-del-marethar"/><text:span text:style-name="T1">Incontri nei Fiumi del Marethar</text:span><text:bookmark-end text:name="incontri-nei-fiumi-del-marethar"/></text:h>
      <text:list text:style-name="L390">
        <text:list-item>
          <text:p text:style-name="P493">Una nave mercantile viene attaccata da briganti fluviali, che chiedono riscatti o merci.</text:p>
        </text:list-item>
        <text:list-item>
          <text:p text:style-name="P493">Una colonia di caimani del Nilo si raduna lungo le rive, difendendo un’antica rovina sommersa.</text:p>
        </text:list-item>
        <text:list-item>
          <text:p text:style-name="P493">Un misterioso tempio emerge dalle acque durante una bassa marea anomala, con iscrizioni luminescenti lungo le pareti.</text:p>
        </text:list-item>
        <text:list-item>
          <text:p text:style-name="P493">Un serpente arcobaleno gigante controlla il flusso del fiume, causando inondazioni o siccità.</text:p>
        </text:list-item>
        <text:list-item>
          <text:p text:style-name="P493">Un gruppo di pescatori locali sparisce misteriosamente, lasciando solo le loro barche alla deriva.</text:p>
        </text:list-item>
        <text:list-item>
          <text:p text:style-name="P493">Un antico ponte di pietra crolla improvvisamente sotto il peso di una carovana, costringendo il gruppo a cercare una nuova via.</text:p>
        </text:list-item>
        <text:list-item>
          <text:p text:style-name="P493">Un gruppo di banditi tende un’imboscata lungo le rive del fiume, rubando merci e passeggeri.</text:p>
        </text:list-item>
        <text:list-item>
          <text:p text:style-name="P493">Una strana nebbia verde si alza dal fiume durante la notte, portando strane visioni e sussurri tra le onde.</text:p>
        </text:list-item>
        <text:list-item>
          <text:p text:style-name="P493">Una barca fantasma solca le acque di notte, con solo luci spettrali visibili.</text:p>
        </text:list-item>
        <text:list-item>
          <text:p text:style-name="P493">Un gruppo di devoti si riunisce lungo le rive per compiere un sacrificio al dio del fiume, ma il rituale va storto.</text:p>
        </text:list-item>
        <text:list-item>
          <text:p text:style-name="P493">Un’enorme onda improvvisa scende dal fiume, trasportando con sé relitti e oggetti misteriosi.</text:p>
        </text:list-item>
        <text:list-item>
          <text:p text:style-name="P493">Un antico drago d’acqua appare dalle profondità del fiume, proteggendo un luogo sacro sommerso.</text:p>
        </text:list-item>
        <text:list-item>
          <text:p text:style-name="P493">Una strana creatura ibrida emerge dalle acque del fiume, cambiando forma tra l’acqua e la terra.</text:p>
        </text:list-item>
        <text:list-item>
          <text:p text:style-name="P493">Un culto segreto si riunisce vicino al delta del fiume, praticando rituali per controllare le inondazioni.</text:p>
        </text:list-item>
        <text:list-item>
          <text:p text:style-name="P493">Un’improvvisa siccità fa ritirare le acque del fiume, rivelando antiche rovine nascoste nel letto secco.</text:p>
        </text:list-item>
        <text:list-item>
          <text:p text:style-name="P493">Un carico di merci viene spinto a riva dalle acque, ma sembra essere maledetto.</text:p>
        </text:list-item>
        <text:list-item>
          <text:p text:style-name="P493">Un gruppo di lavoratori cerca di costruire una diga per controllare le acque, ma incontrano resistenza da creature misteriose.</text:p>
        </text:list-item>
        <text:list-item>
          <text:p text:style-name="P493">Un antico molo abbandonato rivela iscrizioni che indicano la presenza di un tesoro nascosto lungo il fiume.</text:p>
        </text:list-item>
        <text:list-item>
          <text:p text:style-name="P493">Un gruppo di contrabbandieri utilizza un’isola fluviale come nascondiglio, ma sono stati traditi da uno dei loro.</text:p>
        </text:list-item>
        <text:list-item>
          <text:p text:style-name="P493">Un ibis sacro vola sopra la barca dei giocatori, segno di buon auspicio o di pericolo imminente.</text:p>
        </text:list-item>
      </text:list>
      <text:h text:style-name="Heading_20_4" text:outline-level="4"><text:bookmark-start text:name="incontri-nelle-praterie-di-dajilia"/><text:span text:style-name="T1">Incontri nelle Praterie di Dajilia</text:span><text:bookmark-end text:name="incontri-nelle-praterie-di-dajilia"/></text:h>
      <text:list text:style-name="L391">
        <text:list-item>
          <text:p text:style-name="P494">Un branco di antilopi attraversa le praterie, ma si comporta in modo irregolare, come se inseguito da una creatura invisibile.</text:p>
        </text:list-item>
        <text:list-item>
          <text:p text:style-name="P494">Un pastore nomade cerca il suo bestiame scomparso, temendo che sia stato rubato o peggio.</text:p>
        </text:list-item>
        <text:list-item>
          <text:p text:style-name="P494">Un gruppo di briganti nomadi si muove silenziosamente tra l’erba alta, osservando i viaggiatori.</text:p>
        </text:list-item>
        <text:list-item>
          <text:p text:style-name="P494">Una mandria di bufali impazzisce all’improvviso, travolgendo qualsiasi cosa sul loro cammino.</text:p>
        </text:list-item>
        <text:list-item>
          <text:p text:style-name="P494">Un predatore misterioso sta attaccando il bestiame dei pastori, e nessuno riesce a identificarlo.</text:p>
        </text:list-item>
        <text:list-item>
          <text:p text:style-name="P494">Un’antica rovina emerge dalle erbacce, con simboli che nessuno riesce a decifrare.</text:p>
        </text:list-item>
        <text:list-item>
          <text:p text:style-name="P494">Una tempesta di polvere improvvisa avvolge la prateria, oscurando completamente la visibilità.</text:p>
        </text:list-item>
        <text:list-item>
          <text:p text:style-name="P494">Una carovana di mercanti attraversa le praterie, cercando di evitare tribù ostili.</text:p>
        </text:list-item>
        <text:list-item>
          <text:p text:style-name="P494">Un falco gigante sorvola le praterie, in cerca di prede, mentre i pastori cercano rifugio.</text:p>
        </text:list-item>
        <text:list-item>
          <text:p text:style-name="P494">Un pastore racconta storie di un mostro leggendario che caccia di notte, chiedendo protezione.</text:p>
        </text:list-item>
        <text:list-item>
          <text:p text:style-name="P494">Un gruppo di esploratori trova un campo abbandonato, con solo tracce di sangue e zoccoli intorno.</text:p>
        </text:list-item>
        <text:list-item>
          <text:p text:style-name="P494">Un predatore invisibile (forse uno spirito o una creatura magica) inizia a cacciare il gruppo, lasciando solo orme leggere.</text:p>
        </text:list-item>
        <text:list-item>
          <text:p text:style-name="P494">Un gruppo di nomadi si riunisce per una celebrazione sacra, ma sembra esserci un sinistro presagio.</text:p>
        </text:list-item>
        <text:list-item>
          <text:p text:style-name="P494">Un’antica stele emerge dal terreno dopo una frana, con incise antiche preghiere dimenticate.</text:p>
        </text:list-item>
        <text:list-item>
          <text:p text:style-name="P494">Una carovana di contrabbandieri viene inseguita da un gruppo di mercenari locali, cercando rifugio nelle praterie.</text:p>
        </text:list-item>
        <text:list-item>
          <text:p text:style-name="P494">Un’enorme statua in pietra sorge solitaria nel mezzo della prateria, coperta di graffiti e simboli di tribù.</text:p>
        </text:list-item>
        <text:list-item>
          <text:p text:style-name="P494">Un gruppo di aquile giganti attacca il bestiame, spingendo i pastori a richiedere aiuto ai viaggiatori.</text:p>
        </text:list-item>
        <text:list-item>
          <text:p text:style-name="P494">Un’antica leggenda narra di un portale nascosto tra le colline erbose, che appare solo durante la notte.</text:p>
        </text:list-item>
        <text:list-item>
          <text:p text:style-name="P494">Un gruppo di mercanti è stato rapito da una tribù locale, e il loro riscatto include strani oggetti rituali.</text:p>
        </text:list-item>
        <text:list-item>
          <text:p text:style-name="P494">Un gruppo di erboristi cerca una rara pianta che sboccia solo una volta ogni decennio nelle praterie.</text:p>
        </text:list-item>
      </text:list>
      <text:h text:style-name="Heading_20_4" text:outline-level="4"><text:bookmark-start text:name="incontri-nelle-foreste-di-linia-1"/><text:span text:style-name="T1">Incontri nelle Foreste di Linia</text:span><text:bookmark-end text:name="incontri-nelle-foreste-di-linia-1"/></text:h>
      <text:list text:style-name="L392">
        <text:list-item>
          <text:p text:style-name="P495">Un cervo di Linia, ferito da una freccia, corre verso il gruppo, inseguito da cacciatori locali.</text:p>
        </text:list-item>
        <text:list-item>
          <text:p text:style-name="P495">Una vecchia alchimista cerca ingredienti per una potente pozione curativa e chiede aiuto per trovare la rara felce d’oro.</text:p>
        </text:list-item>
        <text:list-item>
          <text:p text:style-name="P495">Un drago della foresta sorveglia una radura, impedendo a chiunque di avvicinarsi a un antico albero sacro.</text:p>
        </text:list-item>
        <text:list-item>
          <text:p text:style-name="P495">Un gruppo di taglialegna ha abbattuto per errore un albero sacro, e gli spiriti della foresta si vendicano.</text:p>
        </text:list-item>
        <text:list-item>
          <text:p text:style-name="P495">Una banda di bracconieri cattura animali sacri e sfida il gruppo a fermarli.</text:p>
        </text:list-item>
        <text:list-item>
          <text:p text:style-name="P495">Una radura circondata da funghi luminosi sembra portare a un altro piano dimensionale.</text:p>
        </text:list-item>
        <text:list-item>
          <text:p text:style-name="P495">Un lupo grigio ferito e isolato dal branco si avvicina ai giocatori in cerca di aiuto.</text:p>
        </text:list-item>
        <text:list-item>
          <text:p text:style-name="P495">Un’aquila reale sorvola la foresta e guida il gruppo verso una grotta nascosta, piena di tesori dimenticati.</text:p>
        </text:list-item>
        <text:list-item>
          <text:p text:style-name="P495">Un gruppo di guardie forestali chiede aiuto per rintracciare una banda di contrabbandieri che sfrutta il legname sacro.</text:p>
        </text:list-item>
        <text:list-item>
          <text:p text:style-name="P495">Un antico santuario abbandonato si rivela infestato da spiriti irrequieti, protettori della foresta.</text:p>
        </text:list-item>
        <text:list-item>
          <text:p text:style-name="P495">La felce d’oro fiorisce solo per poche ore, ma il suo fiore ha proprietà curative incredibili.</text:p>
        </text:list-item>
        <text:list-item>
          <text:p text:style-name="P495">Strane voci e risate provengono dalle ombre della foresta, facendo credere al gruppo di essere osservato.</text:p>
        </text:list-item>
        <text:list-item>
          <text:p text:style-name="P495">Una tempesta improvvisa costringe il gruppo a rifugiarsi in una capanna abbandonata, che sembra abitata da forze soprannaturali.</text:p>
        </text:list-item>
        <text:list-item>
          <text:p text:style-name="P495">Un cacciatore locale cerca la sua famiglia scomparsa, ma sospetta che siano stati rapiti da creature magiche.</text:p>
        </text:list-item>
        <text:list-item>
          <text:p text:style-name="P495">Un’antica battaglia tra druidi e creature della foresta sta per ripetersi, e il gruppo si trova nel mezzo del conflitto.</text:p>
        </text:list-item>
        <text:list-item>
          <text:p text:style-name="P495">Un’aquila reale porta un messaggio cifrato che deve essere consegnato a un druido recluso.</text:p>
        </text:list-item>
        <text:list-item>
          <text:p text:style-name="P495">Un gruppo di maghi sta cercando una pianta rara per un incantesimo, ma la pianta è sorvegliata da un drago feroce.</text:p>
        </text:list-item>
        <text:list-item>
          <text:p text:style-name="P495">Un branco di lupi attacca un villaggio ai margini della foresta, costringendo i contadini a cercare aiuto.</text:p>
        </text:list-item>
        <text:list-item>
          <text:p text:style-name="P495">Una torre abbandonata nel cuore della foresta nasconde un antico tomo di conoscenze dimenticate.</text:p>
        </text:list-item>
        <text:list-item>
          <text:p text:style-name="P495">Un gruppo di banditi si è nascosto nella foresta, usando la magia per tenere lontane le pattuglie regolari.</text:p>
        </text:list-item>
      </text:list>
      <text:h text:style-name="Heading_20_4" text:outline-level="4"><text:bookmark-start text:name="incontri-nelle-montagne-rashiane"/><text:span text:style-name="T1">Incontri nelle Montagne Rashiane</text:span><text:bookmark-end text:name="incontri-nelle-montagne-rashiane"/></text:h>
      <text:list text:style-name="L393">
        <text:list-item>
          <text:p text:style-name="P496">Un gruppo di minatori scopre una nuova vena d’oro, ma è infestata da golem di pietra che proteggono l’ingresso.</text:p>
        </text:list-item>
        <text:list-item>
          <text:p text:style-name="P496">Un frana improvvisa rivela un’antica rete di gallerie nascoste, ricche di antichi tesori ma infestate da creature sotterranee.</text:p>
        </text:list-item>
        <text:list-item>
          <text:p text:style-name="P496">Un’aquila delle vette rapisce un cucciolo di stambecco di ferro, causando caos tra i branchi montani.</text:p>
        </text:list-item>
        <text:list-item>
          <text:p text:style-name="P496">Un gruppo di mercanti viene sorpreso da una tormenta, bloccati su un passo montano insidioso.</text:p>
        </text:list-item>
        <text:list-item>
          <text:p text:style-name="P496">Un villaggio di montagna è minacciato da un drago di fuoco che si è svegliato dopo secoli di letargo.</text:p>
        </text:list-item>
        <text:list-item>
          <text:p text:style-name="P496">Un gruppo di mercenari ha costruito una fortezza di fortuna su una delle cime, da cui terrorizza i villaggi vicini.</text:p>
        </text:list-item>
        <text:list-item>
          <text:p text:style-name="P496">Un antico ponte sospeso tra le montagne si sta disintegrando, e il gruppo deve attraversarlo prima che crolli.</text:p>
        </text:list-item>
        <text:list-item>
          <text:p text:style-name="P496">Un gruppo di monaci vive in solitudine in un monastero di montagna, ma le loro antiche pratiche richiamano spiriti maligni.</text:p>
        </text:list-item>
        <text:list-item>
          <text:p text:style-name="P496">Una caverna nascosta ospita un piccolo lago sotterraneo, le cui acque hanno poteri magici, ma sono difese da un guardiano ancestrale.</text:p>
        </text:list-item>
        <text:list-item>
          <text:p text:style-name="P496">Un golem di pietra viene risvegliato accidentalmente dai minatori, causando disastri nei tunnel.</text:p>
        </text:list-item>
        <text:list-item>
          <text:p text:style-name="P496">Un gruppo di montanari offre di guidare il gruppo attraverso un passo sicuro in cambio di protezione da un nemico comune.</text:p>
        </text:list-item>
        <text:list-item>
          <text:p text:style-name="P496">Una strana luce brilla sulla cima di una montagna, ma nessuno che l’ha seguita è mai tornato per raccontarlo.</text:p>
        </text:list-item>
        <text:list-item>
          <text:p text:style-name="P496">Un gruppo di cavalieri imperiali è in cerca di un artefatto nascosto in una caverna, ma la strada è sorvegliata da spiriti della montagna.</text:p>
        </text:list-item>
        <text:list-item>
          <text:p text:style-name="P496">Un antico tempio dedicato a Tudeshkhast, il Saggio Volante del Destino, è stato riscoperto, ma è protetto da incantesimi letali.</text:p>
        </text:list-item>
        <text:list-item>
          <text:p text:style-name="P496">Un enorme grifone attacca chiunque si avvicini al suo nido, che contiene uova di valore inestimabile.</text:p>
        </text:list-item>
        <text:list-item>
          <text:p text:style-name="P496">Un’antica sorgente termale nascosta ha proprietà curative, ma è difesa da creature elementali.</text:p>
        </text:list-item>
        <text:list-item>
          <text:p text:style-name="P496">Un gruppo di banditi montani tende un’imboscata ai viaggiatori su una stretta strada, cercando di derubare chiunque passi.</text:p>
        </text:list-item>
        <text:list-item>
          <text:p text:style-name="P496">Strani canti echeggiano tra le vette, portando a credere che ci siano tribù dimenticate che vivono tra le montagne.</text:p>
        </text:list-item>
        <text:list-item>
          <text:p text:style-name="P496">Una valanga minaccia un intero villaggio, e solo l’intervento rapido dei giocatori può salvarlo.</text:p>
        </text:list-item>
        <text:list-item>
          <text:p text:style-name="P496">Un nobile locale è scomparso mentre cercava una reliquia nelle caverne delle montagne, e il gruppo viene incaricato di trovarlo.</text:p>
        </text:list-item>
      </text:list>
      <text:h text:style-name="Heading_20_3" text:outline-level="3"><text:bookmark-start text:name="condizioni-meteorologiche"/><text:span text:style-name="T1">Condizioni Meteorologiche</text:span><text:bookmark-end text:name="condizioni-meteorologiche"/></text:h>
      <text:list text:style-name="L394">
        <text:list-item>
          <text:p text:style-name="P497">Tempesta di sabbia feroce che dura tre giorni.</text:p>
        </text:list-item>
        <text:list-item>
          <text:p text:style-name="P497">Un’ondata di calore opprimente che riduce la visibilità e rallenta il movimento.</text:p>
        </text:list-item>
        <text:list-item>
          <text:p text:style-name="P497">Una pioggia di meteoriti minori che incendia piccole porzioni di foresta.</text:p>
        </text:list-item>
        <text:list-item>
          <text:p text:style-name="P497">Una pioggia improvvisa che allaga i campi coltivati.</text:p>
        </text:list-item>
        <text:list-item>
          <text:p text:style-name="P497">Nebbia magica che distorce la percezione del tempo e dello spazio.</text:p>
        </text:list-item>
        <text:list-item>
          <text:p text:style-name="P497">Grandine grossa come mele colpisce una regione montana.</text:p>
        </text:list-item>
        <text:list-item>
          <text:p text:style-name="P497">Un’aurora boreale incantata che appare nei cieli notturni.</text:p>
        </text:list-item>
        <text:list-item>
          <text:p text:style-name="P497">Vento potente che spinge le navi fuori rotta nel Marethar.</text:p>
        </text:list-item>
        <text:list-item>
          <text:p text:style-name="P497">Un fulmine colpisce un albero sacro, causando panico tra la popolazione locale.</text:p>
        </text:list-item>
        <text:list-item>
          <text:p text:style-name="P497">Temporale con piogge torrenziali che minaccia di inondare una città fluviale.</text:p>
        </text:list-item>
        <text:list-item>
          <text:p text:style-name="P497">Neve nera che cade nelle terre selvagge, generando inquietudine tra i locali.</text:p>
        </text:list-item>
        <text:list-item>
          <text:p text:style-name="P497">Tempesta elettrica con fulmini che inseguono i viandanti.</text:p>
        </text:list-item>
        <text:list-item>
          <text:p text:style-name="P497">Breve pioggia di cenere proveniente da un vulcano distante.</text:p>
        </text:list-item>
        <text:list-item>
          <text:p text:style-name="P497">Una quiete opprimente, priva di vento, che rende difficoltosa la respirazione.</text:p>
        </text:list-item>
        <text:list-item>
          <text:p text:style-name="P497">Tromba d’aria che travolge una carovana o un villaggio.</text:p>
        </text:list-item>
        <text:list-item>
          <text:p text:style-name="P497">Un uragano marittimo che minaccia di distruggere un’intera flotta.</text:p>
        </text:list-item>
        <text:list-item>
          <text:p text:style-name="P497">Pioggia leggera ma persistente che dura per settimane, inondando tutto.</text:p>
        </text:list-item>
        <text:list-item>
          <text:p text:style-name="P497">Una strana pioggia di pesci cade improvvisamente dal cielo.</text:p>
        </text:list-item>
        <text:list-item>
          <text:p text:style-name="P497">Nebbia fitta e innaturale che sembra avere una vita propria.</text:p>
        </text:list-item>
        <text:list-item>
          <text:p text:style-name="P497">Temporale di fuoco che si manifesta nei cieli sopra una città di montagna.</text:p>
        </text:list-item>
      </text:list>
      <text:h text:style-name="Heading_20_3" text:outline-level="3"><text:bookmark-start text:name="dicerie-e-pettegolezzi-tra-i-mercanti"/><text:span text:style-name="T1">Dicerie e Pettegolezzi tra i Mercanti</text:span><text:bookmark-end text:name="dicerie-e-pettegolezzi-tra-i-mercanti"/></text:h>
      <text:list text:style-name="L395">
        <text:list-item>
          <text:p text:style-name="P498">“Ho sentito che la Gilda dei Mercanti di Meshdad sta cercando un oggetto magico perduto.”</text:p>
        </text:list-item>
        <text:list-item>
          <text:p text:style-name="P498">“Si dice che un grosso carico di spezie sia scomparso nel deserto. Maledetto, pare.”</text:p>
        </text:list-item>
        <text:list-item>
          <text:p text:style-name="P498">“Qualcuno sta pagando fior di monete per liberarsi di un concorrente commerciale a Thalassia.”</text:p>
        </text:list-item>
        <text:list-item>
          <text:p text:style-name="P498">“Pare che un ricco nobile sia morto misteriosamente, e nessuno sa dove sia il suo oro.”</text:p>
        </text:list-item>
        <text:list-item>
          <text:p text:style-name="P498">“Ho sentito che i pirati della costa stanno contrabbandando armi magiche rare.”</text:p>
        </text:list-item>
        <text:list-item>
          <text:p text:style-name="P498">“Dicono che una nuova rotta commerciale per le isole sia piena di mostri marini.”</text:p>
        </text:list-item>
        <text:list-item>
          <text:p text:style-name="P498">“Un mercante di Dajilia è scomparso, ma le sue carovane continuano ad arrivare puntuali.”</text:p>
        </text:list-item>
        <text:list-item>
          <text:p text:style-name="P498">“Un pirata della Lega Rhithiana sta vendendo mappe di rovine sommerse.”</text:p>
        </text:list-item>
        <text:list-item>
          <text:p text:style-name="P498">“Si dice che un carico di perle proveniente da Lysandria sia maledetto. Nessuno lo compra.”</text:p>
        </text:list-item>
        <text:list-item>
          <text:p text:style-name="P498">“Una ricca vedova sta cercando mercenari per proteggere il suo ultimo convoglio di seta.”</text:p>
        </text:list-item>
        <text:list-item>
          <text:p text:style-name="P498">“Le rotte commerciali tra Rashia e Premia sono diventate insicure, forse è colpa dei banditi.”</text:p>
        </text:list-item>
        <text:list-item>
          <text:p text:style-name="P498">“Un gruppo di contrabbandieri sta trafficando artefatti proibiti dalle terre selvagge.”</text:p>
        </text:list-item>
        <text:list-item>
          <text:p text:style-name="P498">“I tessuti di Meshdad stanno crollando di prezzo, qualcuno sta sabotando le produzioni.”</text:p>
        </text:list-item>
        <text:list-item>
          <text:p text:style-name="P498">“Un’intera miniera d’oro è crollata nel Regno di Vallan, ma nessuno sa perché.”</text:p>
        </text:list-item>
        <text:list-item>
          <text:p text:style-name="P498">“Pare che ci sia una nuova via per trasportare le spezie senza passare da Rashia, ma è pericolosa.”</text:p>
        </text:list-item>
        <text:list-item>
          <text:p text:style-name="P498">“La Gilda dei Costruttori Navali di Lysandria sta costruendo qualcosa di grande e segreto.”</text:p>
        </text:list-item>
        <text:list-item>
          <text:p text:style-name="P498">“Un antico tempio è stato trovato sotto un mercato locale, e la gente ha paura di avvicinarsi.”</text:p>
        </text:list-item>
        <text:list-item>
          <text:p text:style-name="P498">“Un famoso mercante ha acquistato un’intera isola, ma nessuno sa cosa ci farà.”</text:p>
        </text:list-item>
        <text:list-item>
          <text:p text:style-name="P498">“Una nave fantasma piena di tesori è stata vista al largo delle coste, ma nessuno osa avvicinarsi.”</text:p>
        </text:list-item>
        <text:list-item>
          <text:p text:style-name="P498">“Si dice che un gruppo di mercanti stia pianificando un colpo di stato contro il re.”</text:p>
        </text:list-item>
      </text:list>
      <text:h text:style-name="Heading_20_3" text:outline-level="3"><text:bookmark-start text:name="conflitti-politici-imminenti"/><text:span text:style-name="T1">Conflitti Politici Imminenti</text:span><text:bookmark-end text:name="conflitti-politici-imminenti"/></text:h>
      <text:list text:style-name="L396">
        <text:list-item>
          <text:p text:style-name="P499">Due città-stato rivali stanno radunando eserciti per un imminente scontro navale.</text:p>
        </text:list-item>
        <text:list-item>
          <text:p text:style-name="P499">Un piccolo regno è sull’orlo di una guerra civile tra nobili e mercanti.</text:p>
        </text:list-item>
        <text:list-item>
          <text:p text:style-name="P499">Un’alleanza tra due nazioni viene minata da un assassinio segreto.</text:p>
        </text:list-item>
        <text:list-item>
          <text:p text:style-name="P499">I confini tra due regni vengono contestati a causa di un’antica mappa riemersa.</text:p>
        </text:list-item>
        <text:list-item>
          <text:p text:style-name="P499">Un nuovo sovrano sta consolidando il potere tramite matrimoni politici e trattati discutibili.</text:p>
        </text:list-item>
        <text:list-item>
          <text:p text:style-name="P499">Un importante erede viene accusato di tradimento, rischiando di destabilizzare l’intero regno.</text:p>
        </text:list-item>
        <text:list-item>
          <text:p text:style-name="P499">Un ribelle sta raccogliendo sostenitori nelle campagne, minacciando di marciare sulla capitale.</text:p>
        </text:list-item>
        <text:list-item>
          <text:p text:style-name="P499">Le tribù nomadi di Aridonia stanno organizzando incursioni coordinate contro le città di confine.</text:p>
        </text:list-item>
        <text:list-item>
          <text:p text:style-name="P499">I pirati stanno destabilizzando il commercio marittimo, rischiando di scatenare una guerra economica.</text:p>
        </text:list-item>
        <text:list-item>
          <text:p text:style-name="P499">Una fazione segreta all’interno della corte sta complottando per rovesciare il sovrano attuale.</text:p>
        </text:list-item>
        <text:list-item>
          <text:p text:style-name="P499">Un antico trattato militare sta per essere annullato, lasciando una nazione vulnerabile agli attacchi.</text:p>
        </text:list-item>
        <text:list-item>
          <text:p text:style-name="P499">Un’ambasciata rivale è accusata di complotto, e la città ospitante sta per dichiarare guerra.</text:p>
        </text:list-item>
        <text:list-item>
          <text:p text:style-name="P499">Una ribellione armata si sta preparando in segreto all’interno del consiglio di una grande città.</text:p>
        </text:list-item>
        <text:list-item>
          <text:p text:style-name="P499">Un regno minore si allea segretamente con una potenza straniera, minacciando di destabilizzare la regione.</text:p>
        </text:list-item>
        <text:list-item>
          <text:p text:style-name="P499">Il re di un importante regno è gravemente malato, e le fazioni di corte si preparano alla successione.</text:p>
        </text:list-item>
        <text:list-item>
          <text:p text:style-name="P499">Una potente gilda mercantile inizia a finanziare bande armate per proteggere i propri interessi.</text:p>
        </text:list-item>
        <text:list-item>
          <text:p text:style-name="P499">Un antico patto di non aggressione viene rotto e i confini tra due nazioni sono militarizzati.</text:p>
        </text:list-item>
        <text:list-item>
          <text:p text:style-name="P499">Un gruppo di sacerdoti estremisti cerca di influenzare il governo, spingendo per una guerra santa.</text:p>
        </text:list-item>
        <text:list-item>
          <text:p text:style-name="P499">Un nobile minore raccoglie un esercito per rivendicare un trono che sostiene essere legittimamente suo.</text:p>
        </text:list-item>
        <text:list-item>
          <text:p text:style-name="P499">Gli avamposti lungo il confine di una nazione vengono misteriosamente attaccati da forze sconosciute.</text:p>
        </text:list-item>
      </text:list>
      <text:h text:style-name="Heading_20_3" text:outline-level="3"><text:bookmark-start text:name="rituali-e-cerimonie-religiose"/><text:span text:style-name="T1">Rituali e Cerimonie Religiose</text:span><text:bookmark-end text:name="rituali-e-cerimonie-religiose"/></text:h>
      <text:list text:style-name="L397">
        <text:list-item>
          <text:p text:style-name="P500">Una grande celebrazione del solstizio è disturbata da una serie di cattivi presagi.</text:p>
        </text:list-item>
        <text:list-item>
          <text:p text:style-name="P500">Un antico rituale sacro richiede il sacrificio di una creatura mitica.</text:p>
        </text:list-item>
        <text:list-item>
          <text:p text:style-name="P500">Una cerimonia di incoronazione deve essere benedetta da un antico spirito prima di poter procedere.</text:p>
        </text:list-item>
        <text:list-item>
          <text:p text:style-name="P500">Il rito del raccolto viene interrotto da una banda di fanatici religiosi in cerca di una reliquia.</text:p>
        </text:list-item>
        <text:list-item>
          <text:p text:style-name="P500">Un rito per placare gli spiriti dei defunti viene sabotato da una setta rivale.</text:p>
        </text:list-item>
        <text:list-item>
          <text:p text:style-name="P500">Una festa di ringraziamento per una battaglia vinta si trasforma in un’oscura invocazione.</text:p>
        </text:list-item>
        <text:list-item>
          <text:p text:style-name="P500">Un raro allineamento astrale richiede una cerimonia che coinvolge tutte le principali divinità.</text:p>
        </text:list-item>
        <text:list-item>
          <text:p text:style-name="P500">Il culto di una nuova divinità eretica organizza una processione segreta nel cuore della notte.</text:p>
        </text:list-item>
        <text:list-item>
          <text:p text:style-name="P500">Una città si prepara per il grande rito di purificazione delle acque, ma strani fenomeni iniziano a manifestarsi.</text:p>
        </text:list-item>
        <text:list-item>
          <text:p text:style-name="P500">Il tempio principale di una grande città richiede una reliquia rara per completare una cerimonia sacra.</text:p>
        </text:list-item>
        <text:list-item>
          <text:p text:style-name="P500">Una divinità invia un messaggio ai suoi seguaci attraverso segni nel cielo, e la popolazione è divisa su come interpretarlo.</text:p>
        </text:list-item>
        <text:list-item>
          <text:p text:style-name="P500">Un matrimonio reale viene dichiarato maledetto a meno che un rito di purificazione non venga eseguito.</text:p>
        </text:list-item>
        <text:list-item>
          <text:p text:style-name="P500">Un antico rito di fertilità è in pericolo di fallire per la prima volta in secoli, minacciando i raccolti.</text:p>
        </text:list-item>
        <text:list-item>
          <text:p text:style-name="P500">Un gruppo di druidi esegue un rituale per proteggere la foresta sacra, ma qualcosa va terribilmente storto.</text:p>
        </text:list-item>
        <text:list-item>
          <text:p text:style-name="P500">Un oracolo annuncia una profezia legata a un rituale che deve essere eseguito in un luogo remoto.</text:p>
        </text:list-item>
        <text:list-item>
          <text:p text:style-name="P500">I giocatori sono invitati a partecipare a un rito per placare una divinità arrabbiata.</text:p>
        </text:list-item>
        <text:list-item>
          <text:p text:style-name="P500">Un’oscura setta cerca di completare un rituale proibito per risvegliare un antico male.</text:p>
        </text:list-item>
        <text:list-item>
          <text:p text:style-name="P500">Durante una cerimonia di passaggio, un giovane riceve una visione che sconvolge la comunità.</text:p>
        </text:list-item>
        <text:list-item>
          <text:p text:style-name="P500">Un tempio remoto chiede aiuto per completare una serie di riti che richiedono oggetti rari.</text:p>
        </text:list-item>
        <text:list-item>
          <text:p text:style-name="P500">Il leader di un culto eretico cerca di convincere la popolazione locale a unirsi a un grande rito di redenzione.</text:p>
        </text:list-item>
      </text:list>
      <text:h text:style-name="Heading_20_3" text:outline-level="3"><text:bookmark-start text:name="tesori-nascosti-e-artefatti-magici"/><text:span text:style-name="T1">Tesori Nascosti e Artefatti Magici</text:span><text:bookmark-end text:name="tesori-nascosti-e-artefatti-magici"/></text:h>
      <text:list text:style-name="L398">
        <text:list-item>
          <text:p text:style-name="P501">Una spada leggendaria, capace di controllare il vento, si dice sia sepolta in una tomba dimenticata.</text:p>
        </text:list-item>
        <text:list-item>
          <text:p text:style-name="P501">Un antico anello che dona l’invisibilità temporanea si trova in un forziere in fondo a un lago.</text:p>
        </text:list-item>
        <text:list-item>
          <text:p text:style-name="P501">Un amuleto in grado di proteggere da tutte le maledizioni viene cercato da numerose fazioni.</text:p>
        </text:list-item>
        <text:list-item>
          <text:p text:style-name="P501">Una pergamena contenente il segreto per evocare un drago giace nascosta in un vecchio monastero.</text:p>
        </text:list-item>
        <text:list-item>
          <text:p text:style-name="P501">Un bastone che permette di controllare le tempeste è celato in un’isola circondata da tempeste magiche.</text:p>
        </text:list-item>
        <text:list-item>
          <text:p text:style-name="P501">Un antico scudo incantato, in grado di respingere ogni tipo di attacco magico, è custodito in un tempio dimenticato.</text:p>
        </text:list-item>
        <text:list-item>
          <text:p text:style-name="P501">Una collana che dona il potere della preveggenza è scomparsa con il suo ultimo portatore.</text:p>
        </text:list-item>
        <text:list-item>
          <text:p text:style-name="P501">Una chiave mistica che apre un portale verso un regno dimenticato è custodita da una setta segreta.</text:p>
        </text:list-item>
        <text:list-item>
          <text:p text:style-name="P501">Un elmo che permette di leggere nella mente altrui è nascosto in una fortezza in rovina.</text:p>
        </text:list-item>
        <text:list-item>
          <text:p text:style-name="P501">Un’antica coppa che si dice doni l’immortalità a chi la beve giace sepolta in una caverna.</text:p>
        </text:list-item>
        <text:list-item>
          <text:p text:style-name="P501">Un pugnale capace di uccidere qualsiasi creatura, indipendentemente dalla sua resistenza, è scomparso nelle paludi.</text:p>
        </text:list-item>
        <text:list-item>
          <text:p text:style-name="P501">Un antico tomo che contiene incantesimi dimenticati è conservato in una biblioteca sotterranea.</text:p>
        </text:list-item>
        <text:list-item>
          <text:p text:style-name="P501">Una bussola magica che punta sempre verso il tesoro più vicino si trova nelle mani di un pirata morto.</text:p>
        </text:list-item>
        <text:list-item>
          <text:p text:style-name="P501">Un artefatto che può controllare il tempo per brevi periodi è perduto in una torre distrutta.</text:p>
        </text:list-item>
        <text:list-item>
          <text:p text:style-name="P501">Un libro degli incantesimi che dona a chi lo possiede conoscenze magiche illimitate è scomparso da un’accademia arcana.</text:p>
        </text:list-item>
        <text:list-item>
          <text:p text:style-name="P501">Un mantello che permette di trasformarsi in una bestia è nascosto in un covo di creature magiche.</text:p>
        </text:list-item>
        <text:list-item>
          <text:p text:style-name="P501">Una gemma incantata che può evocare un esercito di guerrieri spettrali è custodita in un sarcofago antico.</text:p>
        </text:list-item>
        <text:list-item>
          <text:p text:style-name="P501">Una corona che conferisce il comando su tutti gli esseri volanti è dispersa nelle terre selvagge.</text:p>
        </text:list-item>
        <text:list-item>
          <text:p text:style-name="P501">Un’antica campana capace di richiamare spiriti guardiani si trova nelle profondità di una montagna.</text:p>
        </text:list-item>
        <text:list-item>
          <text:p text:style-name="P501">Un medaglione che può risvegliare un drago addormentato è cercato disperatamente da diversi cacciatori di tesori.</text:p>
        </text:list-item>
      </text:list>
      <text:h text:style-name="Heading_20_3" text:outline-level="3"><text:bookmark-start text:name="naufragi-e-pericoli-marittimi"/><text:span text:style-name="T1">Naufragi e Pericoli Marittimi</text:span><text:bookmark-end text:name="naufragi-e-pericoli-marittimi"/></text:h>
      <text:list text:style-name="L399">
        <text:list-item>
          <text:p text:style-name="P502">Una nave pirata affonda durante una tempesta improvvisa, lasciando pochi sopravvissuti alla deriva.</text:p>
        </text:list-item>
        <text:list-item>
          <text:p text:style-name="P502">Un misterioso iceberg appare all’orizzonte, ma al suo interno sembra brillare una luce strana.</text:p>
        </text:list-item>
        <text:list-item>
          <text:p text:style-name="P502">Una corrente sottomarina inaspettata trascina la nave verso una serie di scogli appuntiti.</text:p>
        </text:list-item>
        <text:list-item>
          <text:p text:style-name="P502">Una nave fantasma si materializza nelle vicinanze, seguendo i giocatori da lontano.</text:p>
        </text:list-item>
        <text:list-item>
          <text:p text:style-name="P502">I marinai riportano la vista di una gigantesca ombra sotto le onde, forse un leviatano.</text:p>
        </text:list-item>
        <text:list-item>
          <text:p text:style-name="P502">Una misteriosa nebbia magica avvolge la nave, facendo sparire metà dell’equipaggio.</text:p>
        </text:list-item>
        <text:list-item>
          <text:p text:style-name="P502">Un antico relitto emerge dalle profondità del mare durante una tempesta.</text:p>
        </text:list-item>
        <text:list-item>
          <text:p text:style-name="P502">La nave colpisce un banco di coralli magici che fanno impazzire la bussola e il sestante.</text:p>
        </text:list-item>
        <text:list-item>
          <text:p text:style-name="P502">Una violenta tempesta si scatena all’improvviso, strappando le vele e danneggiando il timone.</text:p>
        </text:list-item>
        <text:list-item>
          <text:p text:style-name="P502">Una balena gigantesca si scontra con la nave, rischiando di farla affondare.</text:p>
        </text:list-item>
        <text:list-item>
          <text:p text:style-name="P502">Un grido lontano, quasi umano, proviene dall’acqua, attirando l’attenzione dell’equipaggio.</text:p>
        </text:list-item>
        <text:list-item>
          <text:p text:style-name="P502">Le correnti marine si invertono improvvisamente, trascinando la nave verso un’isola vulcanica.</text:p>
        </text:list-item>
        <text:list-item>
          <text:p text:style-name="P502">Una carica di barili esplosivi a bordo si muove durante una tempesta, mettendo in pericolo l’intero equipaggio.</text:p>
        </text:list-item>
        <text:list-item>
          <text:p text:style-name="P502">Una creatura tentacolare attacca improvvisamente la nave, cercando di trascinarla negli abissi.</text:p>
        </text:list-item>
        <text:list-item>
          <text:p text:style-name="P502">Una nave abbandonata viene avvistata alla deriva, apparentemente senza equipaggio.</text:p>
        </text:list-item>
        <text:list-item>
          <text:p text:style-name="P502">Gli uccelli marini scompaiono improvvisamente, presagio di una tempesta imminente.</text:p>
        </text:list-item>
        <text:list-item>
          <text:p text:style-name="P502">Un misterioso veliero nero segue la nave a distanza, senza mai avvicinarsi troppo.</text:p>
        </text:list-item>
        <text:list-item>
          <text:p text:style-name="P502">La nave si imbatte in una flotta di navi affondate, risucchiate da una voragine marina.</text:p>
        </text:list-item>
        <text:list-item>
          <text:p text:style-name="P502">Un’isola in lontananza sembra spostarsi lentamente, rivelando di essere una creatura marina gigante.</text:p>
        </text:list-item>
        <text:list-item>
          <text:p text:style-name="P502">Una sirena affascina l’equipaggio con il suo canto, conducendo la nave verso una scogliera.</text:p>
        </text:list-item>
      </text:list>
      <text:h text:style-name="Heading_20_3" text:outline-level="3"><text:bookmark-start text:name="esiti-di-trattative-diplomatiche"/><text:span text:style-name="T1">Esiti di Trattative Diplomatiche</text:span><text:bookmark-end text:name="esiti-di-trattative-diplomatiche"/></text:h>
      <text:list text:style-name="L400">
        <text:list-item>
          <text:p text:style-name="P503">Un trattato di pace viene firmato, ma una clausola nascosta rischia di scatenare una guerra.</text:p>
        </text:list-item>
        <text:list-item>
          <text:p text:style-name="P503">Le negoziazioni si interrompono bruscamente quando uno dei diplomatici viene misteriosamente avvelenato.</text:p>
        </text:list-item>
        <text:list-item>
          <text:p text:style-name="P503">La delegazione rivale si ritira senza preavviso, gettando dubbi sulla validità del trattato.</text:p>
        </text:list-item>
        <text:list-item>
          <text:p text:style-name="P503">Un trattato commerciale viene raggiunto, ma una delle nazioni non ha intenzione di rispettarlo.</text:p>
        </text:list-item>
        <text:list-item>
          <text:p text:style-name="P503">Una proposta di matrimonio reale sigla la pace, ma una fazione rivale trama per sabotarla.</text:p>
        </text:list-item>
        <text:list-item>
          <text:p text:style-name="P503">Le trattative si concludono con successo, ma una terza parte interferisce con un attacco a sorpresa.</text:p>
        </text:list-item>
        <text:list-item>
          <text:p text:style-name="P503">Un ambasciatore tradisce la sua nazione, rivelando segreti vitali al nemico durante le negoziazioni.</text:p>
        </text:list-item>
        <text:list-item>
          <text:p text:style-name="P503">Un patto militare viene siglato, ma il sovrano si pente subito dopo averlo sottoscritto.</text:p>
        </text:list-item>
        <text:list-item>
          <text:p text:style-name="P503">Il trattato di pace viene accettato, ma una clausola segreta prevede la cessione di terre sacre.</text:p>
        </text:list-item>
        <text:list-item>
          <text:p text:style-name="P503">Le negoziazioni falliscono a causa di vecchie rivalità e sospetti infondati.</text:p>
        </text:list-item>
        <text:list-item>
          <text:p text:style-name="P503">Un alleato insospettabile prende le parti di una fazione rivale all’ultimo minuto.</text:p>
        </text:list-item>
        <text:list-item>
          <text:p text:style-name="P503">Un patto viene firmato, ma si scopre che la delegazione rivale stava tramando un’invasione.</text:p>
        </text:list-item>
        <text:list-item>
          <text:p text:style-name="P503">Le trattative si concludono con una tregua temporanea, ma entrambe le parti pianificano già nuovi conflitti.</text:p>
        </text:list-item>
        <text:list-item>
          <text:p text:style-name="P503">Un trattato commerciale fallisce quando una risorsa chiave diventa improvvisamente rara.</text:p>
        </text:list-item>
        <text:list-item>
          <text:p text:style-name="P503">Un emissario diplomatico diserta e offre informazioni segrete a una fazione nemica.</text:p>
        </text:list-item>
        <text:list-item>
          <text:p text:style-name="P503">Il trattato di alleanza prevede un aiuto militare, ma i rinforzi non arrivano mai.</text:p>
        </text:list-item>
        <text:list-item>
          <text:p text:style-name="P503">Un matrimonio diplomatico viene cancellato quando si scopre che lo sposo è un impostore.</text:p>
        </text:list-item>
        <text:list-item>
          <text:p text:style-name="P503">La pace viene raggiunta, ma un’oscura profezia minaccia di mandare tutto in rovina.</text:p>
        </text:list-item>
        <text:list-item>
          <text:p text:style-name="P503">Una fazione diplomatica tradisce il proprio sovrano e prende il controllo delle trattative.</text:p>
        </text:list-item>
        <text:list-item>
          <text:p text:style-name="P503">Le trattative si concludono con successo, ma uno degli ambasciatori nasconde una grave minaccia.</text:p>
        </text:list-item>
      </text:list>
      <text:h text:style-name="Heading_20_3" text:outline-level="3"><text:bookmark-start text:name="minacce-delle-terre-selvagge"/>Minacce delle Terre Selvagge<text:bookmark-end text:name="minacce-delle-terre-selvagge"/></text:h>
      <text:list text:style-name="L401">
        <text:list-item>
          <text:p text:style-name="P504">Una tribù nomade sta saccheggiando villaggi remoti, cercando risorse scarse.</text:p>
        </text:list-item>
        <text:list-item>
          <text:p text:style-name="P504">Creature predatrici stanno migrando verso nuove aree a causa di una catastrofe naturale.</text:p>
        </text:list-item>
        <text:list-item>
          <text:p text:style-name="P504">Un antico spirito della foresta si è risvegliato e inizia a vendicarsi degli intrusi umani.</text:p>
        </text:list-item>
        <text:list-item>
          <text:p text:style-name="P504">Un drago si è stabilito in una valle fertile, bruciando le coltivazioni e le case vicine.</text:p>
        </text:list-item>
        <text:list-item>
          <text:p text:style-name="P504">Una malattia sconosciuta si diffonde tra gli animali selvatici, rendendoli aggressivi e pericolosi.</text:p>
        </text:list-item>
        <text:list-item>
          <text:p text:style-name="P504">Un gruppo di banditi ha preso il controllo di una parte della foresta e attacca chiunque osi attraversarla.</text:p>
        </text:list-item>
        <text:list-item>
          <text:p text:style-name="P504">Un culto oscuro si è rifugiato nelle terre selvagge, evocando creature spettrali per difendersi.</text:p>
        </text:list-item>
        <text:list-item>
          <text:p text:style-name="P504">Una bestia mitica che si pensava estinta riemerge dalle montagne, seminando il caos.</text:p>
        </text:list-item>
        <text:list-item>
          <text:p text:style-name="P504">Un gruppo di mercenari sta cacciando indiscriminatamente per ricavare pelli e trofei, disturbando l’equilibrio ecologico.</text:p>
        </text:list-item>
        <text:list-item>
          <text:p text:style-name="P504">Gli spiriti protettori di una foresta sono diventati ostili dopo che un antico luogo sacro è stato profanato.</text:p>
        </text:list-item>
        <text:list-item>
          <text:p text:style-name="P504">Un vasto sciame di insetti giganti inizia a devastare tutto ciò che incontra.</text:p>
        </text:list-item>
        <text:list-item>
          <text:p text:style-name="P504">I fiumi stanno lentamente prosciugandosi, e una misteriosa causa sembra provenire da una lontana sorgente sacra.</text:p>
        </text:list-item>
        <text:list-item>
          <text:p text:style-name="P504">Tribù locali organizzano razzie per raccogliere prigionieri destinati a misteriosi rituali.</text:p>
        </text:list-item>
        <text:list-item>
          <text:p text:style-name="P504">Una serie di misteriosi incendi sta distruggendo foreste e villaggi, connessi a un potere occulto.</text:p>
        </text:list-item>
        <text:list-item>
          <text:p text:style-name="P504">Un antico titano di pietra è stato risvegliato e vaga distruggendo tutto ciò che incontra.</text:p>
        </text:list-item>
        <text:list-item>
          <text:p text:style-name="P504">La fauna della regione sembra posseduta da una forza malevola, attaccando chiunque si avvicini.</text:p>
        </text:list-item>
        <text:list-item>
          <text:p text:style-name="P504">Una tribù indigena, mai avvistata prima, emerge dalla giungla reclamando i propri diritti sulle terre.</text:p>
        </text:list-item>
        <text:list-item>
          <text:p text:style-name="P504">Un branco di lupi mannari inizia ad attaccare villaggi rurali sotto la luna piena.</text:p>
        </text:list-item>
        <text:list-item>
          <text:p text:style-name="P504">Un antico artefatto è stato dissotterrato, scatenando maledizioni e apparizioni.</text:p>
        </text:list-item>
        <text:list-item>
          <text:p text:style-name="P504">Una banda di banditi è protetta da uno stregone che comanda spiriti animali come guardiani.</text:p>
        </text:list-item>
      </text:list>
      <text:h text:style-name="Heading_20_3" text:outline-level="3"><text:bookmark-start text:name="segreti-delle-antiche-rovine"/>Segreti delle Antiche Rovine<text:bookmark-end text:name="segreti-delle-antiche-rovine"/></text:h>
      <text:list text:style-name="L402">
        <text:list-item>
          <text:p text:style-name="P505">Un antico tempio nascosto sotto terra contiene affreschi che raccontano la caduta di un impero dimenticato.</text:p>
        </text:list-item>
        <text:list-item>
          <text:p text:style-name="P505">Un’enorme porta sigillata con simboli arcani può essere aperta solo durante un’eclissi solare.</text:p>
        </text:list-item>
        <text:list-item>
          <text:p text:style-name="P505">Una statua di pietra custodisce un’antica maledizione che ha trasformato tutti gli abitanti in pietra.</text:p>
        </text:list-item>
        <text:list-item>
          <text:p text:style-name="P505">Un labirinto sotto una città abbandonata contiene il teschio di una creatura mitica, sorvegliato da trappole mortali.</text:p>
        </text:list-item>
        <text:list-item>
          <text:p text:style-name="P505">Una sala di troni in rovina ospita lo spirito inquieto dell’ultimo re, che cerca vendetta per il suo tradimento.</text:p>
        </text:list-item>
        <text:list-item>
          <text:p text:style-name="P505">Un antico orologio di sabbia segnala il tempo rimanente prima che un portale dimenticato si riapra.</text:p>
        </text:list-item>
        <text:list-item>
          <text:p text:style-name="P505">In fondo a una tomba reale, un guerriero non morto custodisce un’arma sacra che non ha mai usato in vita.</text:p>
        </text:list-item>
        <text:list-item>
          <text:p text:style-name="P505">Una biblioteca sotterranea contiene antichi tomi di magia dimenticata, ma ogni libro è maledetto.</text:p>
        </text:list-item>
        <text:list-item>
          <text:p text:style-name="P505">Un antico monumento coperto di rune nasconde un portale verso un piano parallelo.</text:p>
        </text:list-item>
        <text:list-item>
          <text:p text:style-name="P505">Le rovine di una città sacra sommerse nel deserto emergono solo dopo una tempesta di sabbia.</text:p>
        </text:list-item>
        <text:list-item>
          <text:p text:style-name="P505">Un altare di pietra custodisce un’antica chiave che apre l’accesso a una fortezza nascosta nelle montagne.</text:p>
        </text:list-item>
        <text:list-item>
          <text:p text:style-name="P505">Una statua dorata rappresenta un antico eroe dimenticato e si dice che la sua anima sia imprigionata al suo interno.</text:p>
        </text:list-item>
        <text:list-item>
          <text:p text:style-name="P505">I resti di un golem distrutto si trovano nel cuore di una fortezza abbandonata, pronti per essere riassemblati.</text:p>
        </text:list-item>
        <text:list-item>
          <text:p text:style-name="P505">Un grande portale scolpito nella roccia conduce a una cripta sigillata, piena di trappole letali.</text:p>
        </text:list-item>
        <text:list-item>
          <text:p text:style-name="P505">Una fonte sacra si trova nelle profondità di una caverna, e si dice che possa riportare in vita i morti.</text:p>
        </text:list-item>
        <text:list-item>
          <text:p text:style-name="P505">Antichi specchi incantati, nascosti in una rovina, permettono di vedere attraverso il tempo.</text:p>
        </text:list-item>
        <text:list-item>
          <text:p text:style-name="P505">Sotto le rovine di un antico tempio, una mappa scolpita su una tavoletta di pietra indica la posizione di un tesoro leggendario.</text:p>
        </text:list-item>
        <text:list-item>
          <text:p text:style-name="P505">Un artefatto antico nascosto in una cripta è sorvegliato da spettri di sacerdoti millenari.</text:p>
        </text:list-item>
        <text:list-item>
          <text:p text:style-name="P505">Un sotterraneo invaso dalle radici contiene un’antica macchina magica che controlla il clima.</text:p>
        </text:list-item>
        <text:list-item>
          <text:p text:style-name="P505">Una stanza nascosta nelle rovine contiene pergamene che descrivono un potente rituale proibito.</text:p>
        </text:list-item>
      </text:list>
      <text:h text:style-name="Heading_20_3" text:outline-level="3"><text:bookmark-start text:name="patologie-e-maledizioni-esotiche"/>Patologie e Maledizioni Esotiche<text:bookmark-end text:name="patologie-e-maledizioni-esotiche"/></text:h>
      <text:list text:style-name="L403">
        <text:list-item>
          <text:p text:style-name="P506">Un morbo sconosciuto trasforma lentamente chi ne è affetto in pietra, iniziando dagli arti.</text:p>
        </text:list-item>
        <text:list-item>
          <text:p text:style-name="P506">Una maledizione antica provoca visioni notturne inquietanti e insonnia crescente fino alla pazzia.</text:p>
        </text:list-item>
        <text:list-item>
          <text:p text:style-name="P506">Una piaga di insetti parassiti invade il corpo delle vittime, controllandole come burattini.</text:p>
        </text:list-item>
        <text:list-item>
          <text:p text:style-name="P506">Un veleno esotico rende chi lo assume allergico alla magia, causando dolore ogni volta che viene lanciato un incantesimo.</text:p>
        </text:list-item>
        <text:list-item>
          <text:p text:style-name="P506">Una maledizione ancestrale fa invecchiare chi la subisce ogni volta che usa una parola specifica.</text:p>
        </text:list-item>
        <text:list-item>
          <text:p text:style-name="P506">Le vittime di un’antica malattia vedono il proprio riflesso deformato, facendoli dubitare della propria identità.</text:p>
        </text:list-item>
        <text:list-item>
          <text:p text:style-name="P506">Una piaga magica provoca mutazioni animali sulle vittime, come artigli o zanne, che causano dolore estremo.</text:p>
        </text:list-item>
        <text:list-item>
          <text:p text:style-name="P506">Una maledizione fa sì che chi la subisce dimentichi lentamente i propri cari e le proprie origini.</text:p>
        </text:list-item>
        <text:list-item>
          <text:p text:style-name="P506">Un’infezione magica trasforma il sangue in ghiaccio, rendendo ogni ferita estremamente pericolosa.</text:p>
        </text:list-item>
        <text:list-item>
          <text:p text:style-name="P506">Chi contrae una particolare maledizione diventa invisibile agli altri, ma incapace di interagire fisicamente con il mondo.</text:p>
        </text:list-item>
        <text:list-item>
          <text:p text:style-name="P506">Una malattia arcana provoca la comparsa di simboli magici sulla pelle, che bruciano lentamente il corpo.</text:p>
        </text:list-item>
        <text:list-item>
          <text:p text:style-name="P506">Una piaga misteriosa fa appassire ogni pianta toccata dalle vittime, privandole di energia vitale.</text:p>
        </text:list-item>
        <text:list-item>
          <text:p text:style-name="P506">Una maledizione fa apparire illusoriamente ai malcapitati che i loro compagni siano demoni o mostri.</text:p>
        </text:list-item>
        <text:list-item>
          <text:p text:style-name="P506">La malattia del “risveglio eterno” tiene i suoi malati sempre in uno stato di semi-coscienza, incapaci di dormire.</text:p>
        </text:list-item>
        <text:list-item>
          <text:p text:style-name="P506">Un incantesimo corrotto fa crescere radici dai piedi delle vittime, intrappolandole lentamente al suolo.</text:p>
        </text:list-item>
        <text:list-item>
          <text:p text:style-name="P506">Un morbo sconosciuto prosciuga la forza fisica, lasciando le vittime permanentemente deboli e fragili.</text:p>
        </text:list-item>
        <text:list-item>
          <text:p text:style-name="P506">La malattia del “doppio volto” fa sì che chi la contrae sviluppi una seconda personalità malvagia.</text:p>
        </text:list-item>
        <text:list-item>
          <text:p text:style-name="P506">Una maledizione maligna fa sì che la vittima sia sempre seguita da un’ombra, che agisce indipendentemente da essa.</text:p>
        </text:list-item>
        <text:list-item>
          <text:p text:style-name="P506">Una piaga invisibile si diffonde solo attraverso i sogni, contagiando chi dorme vicino ai malati.</text:p>
        </text:list-item>
        <text:list-item>
          <text:p text:style-name="P506">Un morbo antico trasforma gradualmente chi ne è colpito in cristallo.</text:p>
        </text:list-item>
      </text:list>
      <text:h text:style-name="Heading_20_3" text:outline-level="3"><text:bookmark-start text:name="rotte-commerciali-a-rischio"/>Rotte Commerciali a Rischio<text:bookmark-end text:name="rotte-commerciali-a-rischio"/></text:h>
      <text:list text:style-name="L404">
        <text:list-item>
          <text:p text:style-name="P507">Una banda di pirati si è stabilita su un’isola chiave lungo una rotta commerciale vitale.</text:p>
        </text:list-item>
        <text:list-item>
          <text:p text:style-name="P507">Una flotta navale rivale blocca il passaggio in un punto strategico, chiedendo pedaggi esorbitanti.</text:p>
        </text:list-item>
        <text:list-item>
          <text:p text:style-name="P507">Una strana nebbia magica fa sparire intere navi lungo una rotta marittima commerciale.</text:p>
        </text:list-item>
        <text:list-item>
          <text:p text:style-name="P507">Una città-stato ha chiuso le proprie frontiere, interrompendo una via terrestre cruciale per il commercio.</text:p>
        </text:list-item>
        <text:list-item>
          <text:p text:style-name="P507">Le montagne lungo una rotta commerciale sono ora popolate da bande di creature feroci.</text:p>
        </text:list-item>
        <text:list-item>
          <text:p text:style-name="P507">Una lunga siccità ha ridotto la produzione agricola, facendo aumentare i prezzi e creando tensioni tra i mercanti.</text:p>
        </text:list-item>
        <text:list-item>
          <text:p text:style-name="P507">Un antico ponte commerciale crolla improvvisamente, tagliando fuori l’accesso a una regione di commercio chiave.</text:p>
        </text:list-item>
        <text:list-item>
          <text:p text:style-name="P507">L’emergere di una bestia marina gigante ha reso pericolose le rotte attorno a una penisola.</text:p>
        </text:list-item>
        <text:list-item>
          <text:p text:style-name="P507">Un tratto di deserto attraversato da carovane commerciali è infestato da predoni su cammelli.</text:p>
        </text:list-item>
        <text:list-item>
          <text:p text:style-name="P507">Una zona di confine tra due nazioni rivali è diventata terreno di scontro per bande armate.</text:p>
        </text:list-item>
        <text:list-item>
          <text:p text:style-name="P507">La giungla ha invaso antiche strade commerciali, rendendole inaccessibili e pericolose.</text:p>
        </text:list-item>
        <text:list-item>
          <text:p text:style-name="P507">Una tribù ostile ha bloccato una gola montana strategica per il transito di carovane.</text:p>
        </text:list-item>
        <text:list-item>
          <text:p text:style-name="P507">Un gruppo di mercenari controlla una strada chiave, chiedendo tangenti per il passaggio.</text:p>
        </text:list-item>
        <text:list-item>
          <text:p text:style-name="P507">Tempeste improvvise hanno reso una rotta marittima inaffidabile, con molte navi affondate di recente.</text:p>
        </text:list-item>
        <text:list-item>
          <text:p text:style-name="P507">Un gruppo di nobili locali sta sabotando le rotte commerciali per indebolire una città rivale.</text:p>
        </text:list-item>
        <text:list-item>
          <text:p text:style-name="P507">Una serie di frane ha reso inagibile una delle principali strade verso una grande città commerciale.</text:p>
        </text:list-item>
        <text:list-item>
          <text:p text:style-name="P507">Una disputa tra due città-stato ha portato all’embargo di tutte le merci in transito lungo una rotta cruciale.</text:p>
        </text:list-item>
        <text:list-item>
          <text:p text:style-name="P507">Gli spiriti di una foresta sacra iniziano a sabotare le carovane commerciali che attraversano i loro territori.</text:p>
        </text:list-item>
        <text:list-item>
          <text:p text:style-name="P507">Un’antica maledizione riattivata da un tempio profanato ha reso pericolosi i viaggi lungo un antico cammino sacro.</text:p>
        </text:list-item>
        <text:list-item>
          <text:p text:style-name="P507">Un violento conflitto tra due nazioni ha bloccato i traffici commerciali su una rotta costiera vitale.</text:p>
        </text:list-item>
      </text:list>
      <text:h text:style-name="Heading_20_3" text:outline-level="3"><text:bookmark-start text:name="imboscate-e-attacchi-di-banditi"/>Imboscate e Attacchi di Banditi<text:bookmark-end text:name="imboscate-e-attacchi-di-banditi"/></text:h>
      <text:list text:style-name="L405">
        <text:list-item>
          <text:p text:style-name="P508">Un gruppo di banditi tende un’imboscata a una carovana di mercanti nella foresta.</text:p>
        </text:list-item>
        <text:list-item>
          <text:p text:style-name="P508">I banditi utilizzano illusioni magiche per camuffare i loro numeri e intimorire le vittime.</text:p>
        </text:list-item>
        <text:list-item>
          <text:p text:style-name="P508">Un gruppo di predoni a cavallo attacca di notte, colpendo rapidamente e fuggendo nel buio.</text:p>
        </text:list-item>
        <text:list-item>
          <text:p text:style-name="P508">I banditi costruiscono trappole lungo la strada, facendo crollare i ponti appena attraversati.</text:p>
        </text:list-item>
        <text:list-item>
          <text:p text:style-name="P508">Una banda di fuorilegge si nasconde in una gola, facendo cadere massi sugli ignari viaggiatori.</text:p>
        </text:list-item>
        <text:list-item>
          <text:p text:style-name="P508">Un gruppo di briganti attira le vittime in un falso rifugio per poi attaccarle nel sonno.</text:p>
        </text:list-item>
        <text:list-item>
          <text:p text:style-name="P508">I banditi assumono l’aspetto di guardie di città, ingannando i mercanti e rubando le loro merci.</text:p>
        </text:list-item>
        <text:list-item>
          <text:p text:style-name="P508">Un gruppo di ladri esperti tende una trappola durante una trattativa commerciale, scomparendo con il denaro.</text:p>
        </text:list-item>
        <text:list-item>
          <text:p text:style-name="P508">I predoni usano veleno per addormentare i viaggiatori prima di depredarli.</text:p>
        </text:list-item>
        <text:list-item>
          <text:p text:style-name="P508">I banditi incendiano i campi circostanti per costringere i viandanti a un passaggio obbligato.</text:p>
        </text:list-item>
        <text:list-item>
          <text:p text:style-name="P508">Un gruppo di ladri sottili ruba i rifornimenti di una carovana senza mai farsi vedere.</text:p>
        </text:list-item>
        <text:list-item>
          <text:p text:style-name="P508">I predoni bloccano le strade con alberi abbattuti, aspettando l’arrivo delle loro prede.</text:p>
        </text:list-item>
        <text:list-item>
          <text:p text:style-name="P508">I banditi sono al comando di un ex soldato esperto in strategie militari, rendendo le imboscate letali.</text:p>
        </text:list-item>
        <text:list-item>
          <text:p text:style-name="P508">La banda utilizza piccoli mammiferi incantati come spie, scoprendo la posizione delle carovane.</text:p>
        </text:list-item>
        <text:list-item>
          <text:p text:style-name="P508">Un gruppo di fuorilegge si fa passare per vittime di un’imboscata, attirando i viaggiatori per poi derubarli.</text:p>
        </text:list-item>
        <text:list-item>
          <text:p text:style-name="P508">I banditi hanno avvelenato i pozzi lungo la strada, costringendo i viaggiatori a cercare acqua altrove.</text:p>
        </text:list-item>
        <text:list-item>
          <text:p text:style-name="P508">I briganti hanno costruito false rovine per attirare gli esploratori e saccheggiarli.</text:p>
        </text:list-item>
        <text:list-item>
          <text:p text:style-name="P508">I ladri piazzano trappole magiche invisibili lungo la strada per immobilizzare chiunque passi.</text:p>
        </text:list-item>
        <text:list-item>
          <text:p text:style-name="P508">I predoni hanno assoldato un mago per creare illusori cancelli di città, intrappolando le carovane.</text:p>
        </text:list-item>
        <text:list-item>
          <text:p text:style-name="P508">Un gruppo di fuorilegge minaccia di bruciare i raccolti di una regione se non gli viene pagato un tributo.</text:p>
        </text:list-item>
      </text:list>
      <text:h text:style-name="Heading_20_3" text:outline-level="3"><text:bookmark-start text:name="complicazioni-nel-commercio-di-spezie"/>Complicazioni nel Commercio di Spezie<text:bookmark-end text:name="complicazioni-nel-commercio-di-spezie"/></text:h>
      <text:list text:style-name="L406">
        <text:list-item>
          <text:p text:style-name="P509">Un nuovo tipo di spezia dalle proprietà misteriose appare sul mercato, ma nessuno conosce la sua provenienza.</text:p>
        </text:list-item>
        <text:list-item>
          <text:p text:style-name="P509">Un carico di spezie viene contaminato da un veleno esotico, mettendo in pericolo i commercianti e gli acquirenti.</text:p>
        </text:list-item>
        <text:list-item>
          <text:p text:style-name="P509">Le spezie trasportate attraverso il deserto svaniscono misteriosamente durante il viaggio.</text:p>
        </text:list-item>
        <text:list-item>
          <text:p text:style-name="P509">Un’invasione di insetti rovina i raccolti di spezie, causando scarsità e tensioni tra le gilde.</text:p>
        </text:list-item>
        <text:list-item>
          <text:p text:style-name="P509">Una nuova tassa sulle spezie imposta da una città costiera provoca proteste tra i mercanti.</text:p>
        </text:list-item>
        <text:list-item>
          <text:p text:style-name="P509">Un pirata conquista una nave carica di spezie rare, chiedendo un riscatto astronomico.</text:p>
        </text:list-item>
        <text:list-item>
          <text:p text:style-name="P509">Un ricco mercante viene trovato morto, e il suo intero magazzino di spezie scompare durante la notte.</text:p>
        </text:list-item>
        <text:list-item>
          <text:p text:style-name="P509">Un tempio religioso proclama che una spezia sacra è stata profanata, scatenando il panico tra i devoti.</text:p>
        </text:list-item>
        <text:list-item>
          <text:p text:style-name="P509">Un gruppo di mercenari viene assoldato per scortare un carico di spezie, ma scompare nel nulla.</text:p>
        </text:list-item>
        <text:list-item>
          <text:p text:style-name="P509">Un grande incendio devasta una piantagione di spezie, causando una crisi economica.</text:p>
        </text:list-item>
        <text:list-item>
          <text:p text:style-name="P509">Un’intera carovana di spezie è avvelenata da una misteriosa maledizione.</text:p>
        </text:list-item>
        <text:list-item>
          <text:p text:style-name="P509">Un commerciante rivale diffonde false voci su una spezia che provoca malattie, rovinando la reputazione di un concorrente.</text:p>
        </text:list-item>
        <text:list-item>
          <text:p text:style-name="P509">Una spezia pregiata si trasforma in polvere durante un viaggio, senza spiegazione.</text:p>
        </text:list-item>
        <text:list-item>
          <text:p text:style-name="P509">Una nuova gilda mercantile tenta di monopolizzare il commercio delle spezie, scatenando una guerra commerciale.</text:p>
        </text:list-item>
        <text:list-item>
          <text:p text:style-name="P509">Le carovane che trasportano spezie vengono attaccate da misteriosi predoni del deserto che sembrano invulnerabili.</text:p>
        </text:list-item>
        <text:list-item>
          <text:p text:style-name="P509">Un raro tipo di spezia diventa estremamente popolare, ma nessuno riesce più a trovarla sul mercato.</text:p>
        </text:list-item>
        <text:list-item>
          <text:p text:style-name="P509">Un’infezione magica colpisce i raccolti di spezie, causando il fallimento di numerose piantagioni.</text:p>
        </text:list-item>
        <text:list-item>
          <text:p text:style-name="P509">Gli spiriti del deserto iniziano a sabotare le rotte delle carovane di spezie, incolpando i mercanti per aver profanato un’antica tomba.</text:p>
        </text:list-item>
        <text:list-item>
          <text:p text:style-name="P509">Una città-stato blocca l’accesso alle sue rotte commerciali, facendo salire alle stelle il prezzo delle spezie.</text:p>
        </text:list-item>
        <text:list-item>
          <text:p text:style-name="P509">La scoperta di un passaggio segreto per il trasporto di spezie causa un conflitto tra mercanti rivali.</text:p>
        </text:list-item>
      </text:list>
      <text:h text:style-name="Heading_20_3" text:outline-level="3"><text:bookmark-start text:name="visioni-e-profezie-oniriche"/>Visioni e Profezie Oniriche<text:bookmark-end text:name="visioni-e-profezie-oniriche"/></text:h>
      <text:list text:style-name="L407">
        <text:list-item>
          <text:p text:style-name="P510">Un sogno inquietante rivela un tempio in rovina in cui si nasconde un antico artefatto.</text:p>
        </text:list-item>
        <text:list-item>
          <text:p text:style-name="P510">In una visione, un antico sovrano chiede ai giocatori di riportare in vita il suo regno dimenticato.</text:p>
        </text:list-item>
        <text:list-item>
          <text:p text:style-name="P510">Una profezia onirica parla di un’immensa ombra che coprirà il sole, portando con sé una calamità.</text:p>
        </text:list-item>
        <text:list-item>
          <text:p text:style-name="P510">Nel sonno, una figura velata sussurra ai giocatori di evitare una città costiera, minacciata da un disastro imminente.</text:p>
        </text:list-item>
        <text:list-item>
          <text:p text:style-name="P510">Una visione mostra una guerra sanguinosa tra due grandi nazioni, con i giocatori al centro del conflitto.</text:p>
        </text:list-item>
        <text:list-item>
          <text:p text:style-name="P510">Un sogno rivela che uno dei compagni dei giocatori è in realtà un traditore, ma la verità è più complessa di quanto sembri.</text:p>
        </text:list-item>
        <text:list-item>
          <text:p text:style-name="P510">Durante una notte di riposo, i giocatori vedono un antico drago addormentato che sta per risvegliarsi, ma nessuno sa dove si trovi.</text:p>
        </text:list-item>
        <text:list-item>
          <text:p text:style-name="P510">Una figura celeste appare nei sogni dei giocatori, avvertendoli di una minaccia che proviene dal mare.</text:p>
        </text:list-item>
        <text:list-item>
          <text:p text:style-name="P510">In una profezia onirica, i giocatori vedono un artefatto sacro cadere nelle mani sbagliate, ma non riescono a capire chi sia il colpevole.</text:p>
        </text:list-item>
        <text:list-item>
          <text:p text:style-name="P510">Una visione mostra i giocatori mentre combattono contro una figura oscura in un luogo sconosciuto, ma non sanno come ci arriveranno.</text:p>
        </text:list-item>
        <text:list-item>
          <text:p text:style-name="P510">Un sogno mostra una città nascosta sotto il mare, piena di tesori dimenticati e minacce antiche.</text:p>
        </text:list-item>
        <text:list-item>
          <text:p text:style-name="P510">Un oracolo onirico mostra una mappa che conduce a una tomba segreta, ma la mappa cambia forma ogni volta che viene osservata.</text:p>
        </text:list-item>
        <text:list-item>
          <text:p text:style-name="P510">Una visione notturna mostra i giocatori invecchiare rapidamente mentre il tempo scorre in modo innaturale attorno a loro.</text:p>
        </text:list-item>
        <text:list-item>
          <text:p text:style-name="P510">Un antico albero appare nei sogni, e i suoi rami si estendono verso una terra lontana che nessuno ha mai visto.</text:p>
        </text:list-item>
        <text:list-item>
          <text:p text:style-name="P510">I giocatori sognano di essere intrappolati in un tempio di cristallo, con un misterioso nemico che li insegue senza tregua.</text:p>
        </text:list-item>
        <text:list-item>
          <text:p text:style-name="P510">Una figura incappucciata appare nei sogni, offrendo ai giocatori un oggetto magico in cambio di un misterioso compito.</text:p>
        </text:list-item>
        <text:list-item>
          <text:p text:style-name="P510">In una visione, una stella cadente segna il luogo in cui si trova una reliquia leggendaria, ma nessuno sa dove cercare.</text:p>
        </text:list-item>
        <text:list-item>
          <text:p text:style-name="P510">Un antico spirito appare nei sogni dei giocatori, implorando aiuto per spezzare una maledizione millenaria.</text:p>
        </text:list-item>
        <text:list-item>
          <text:p text:style-name="P510">Un sogno inquietante rivela una serie di simboli sconosciuti, che si ripetono in varie circostanze del mondo reale.</text:p>
        </text:list-item>
        <text:list-item>
          <text:p text:style-name="P510">In una profezia onirica, i giocatori vedono una terribile battaglia tra le forze del bene e del male, e devono scegliere da che parte stare.</text:p>
        </text:list-item>
      </text:list>
      <text:h text:style-name="Heading_20_3" text:outline-level="3"><text:bookmark-start text:name="incontri-con-sciamani-o-druidi"/>Incontri con Sciamani o Druidi<text:bookmark-end text:name="incontri-con-sciamani-o-druidi"/></text:h>
      <text:list text:style-name="L408">
        <text:list-item>
          <text:p text:style-name="P511">Uno sciamano errante offre ai giocatori una pozione misteriosa in cambio di un favore.</text:p>
        </text:list-item>
        <text:list-item>
          <text:p text:style-name="P511">Un druido avvisa i giocatori che la natura è furiosa a causa di un antico rito interrotto.</text:p>
        </text:list-item>
        <text:list-item>
          <text:p text:style-name="P511">Un gruppo di sciamani tiene un rito sacro in una foresta, e chiede ai giocatori di proteggerli durante la cerimonia.</text:p>
        </text:list-item>
        <text:list-item>
          <text:p text:style-name="P511">Un druido si manifesta sotto forma di un animale guida e conduce i giocatori verso un luogo sacro.</text:p>
        </text:list-item>
        <text:list-item>
          <text:p text:style-name="P511">Uno sciamano offre di curare un membro malato del gruppo, ma richiede un pagamento simbolico in cambio.</text:p>
        </text:list-item>
        <text:list-item>
          <text:p text:style-name="P511">Un druido si avvicina ai giocatori chiedendo aiuto per fermare un gruppo di cacciatori che stanno distruggendo un bosco sacro.</text:p>
        </text:list-item>
        <text:list-item>
          <text:p text:style-name="P511">Uno sciamano rivela un antico segreto sulla natura, che i giocatori possono usare a proprio vantaggio.</text:p>
        </text:list-item>
        <text:list-item>
          <text:p text:style-name="P511">Un druido incolpa i giocatori per aver disturbato un luogo sacro e li sfida a superare una prova per dimostrare la loro innocenza.</text:p>
        </text:list-item>
        <text:list-item>
          <text:p text:style-name="P511">Uno sciamano offre ai giocatori una visione del futuro, ma chiede un sacrificio personale in cambio.</text:p>
        </text:list-item>
        <text:list-item>
          <text:p text:style-name="P511">Un gruppo di druidi sta eseguendo un rituale di guarigione su un’antica creatura, ma necessitano di un ingrediente raro che i giocatori devono trovare.</text:p>
        </text:list-item>
        <text:list-item>
          <text:p text:style-name="P511">Uno sciamano è in fuga da un gruppo di cacciatori di streghe e chiede aiuto ai giocatori per nascondersi.</text:p>
        </text:list-item>
        <text:list-item>
          <text:p text:style-name="P511">Un druido misterioso offre ai giocatori una mappa che conduce a un luogo sacro, ma li avverte delle pericolose prove che li attendono.</text:p>
        </text:list-item>
        <text:list-item>
          <text:p text:style-name="P511">Uno sciamano offre ai giocatori una benedizione che li proteggerà dalle maledizioni, ma solo per un periodo limitato.</text:p>
        </text:list-item>
        <text:list-item>
          <text:p text:style-name="P511">Un druido cerca vendetta contro una fazione che ha distrutto parte del suo santuario e chiede ai giocatori di fargli giustizia.</text:p>
        </text:list-item>
        <text:list-item>
          <text:p text:style-name="P511">Uno sciamano si manifesta in sogno ai giocatori, avvertendoli di un imminente disastro naturale.</text:p>
        </text:list-item>
        <text:list-item>
          <text:p text:style-name="P511">Un druido chiede ai giocatori di riportare l’equilibrio in una foresta corrompendo una sorgente magica.</text:p>
        </text:list-item>
        <text:list-item>
          <text:p text:style-name="P511">Uno sciamano offre ai giocatori il potere di comunicare con gli spiriti, ma solo finché compiono un rituale ogni giorno.</text:p>
        </text:list-item>
        <text:list-item>
          <text:p text:style-name="P511">Un gruppo di druidi è in lotta con una tribù per il controllo di un antico albero sacro e chiede l’intervento dei giocatori.</text:p>
        </text:list-item>
        <text:list-item>
          <text:p text:style-name="P511">Uno sciamano rivela ai giocatori che uno di loro è maledetto e che solo un rito oscuro può spezzare la maledizione.</text:p>
        </text:list-item>
        <text:list-item>
          <text:p text:style-name="P511">Un druido avvisa i giocatori di una catastrofe imminente causata dalla disarmonia tra gli elementi e chiede loro di intervenire.</text:p>
        </text:list-item>
      </text:list>
      <text:h text:style-name="Heading_20_3" text:outline-level="3"><text:bookmark-start text:name="conseguenze-di-antichi-incantesimi"/>Conseguenze di Antichi Incantesimi<text:bookmark-end text:name="conseguenze-di-antichi-incantesimi"/></text:h>
      <text:list text:style-name="L409">
        <text:list-item>
          <text:p text:style-name="P512">Un antico incantesimo di protezione si spezza improvvisamente, rilasciando una creatura magica imprigionata da secoli.</text:p>
        </text:list-item>
        <text:list-item>
          <text:p text:style-name="P512">Un incantesimo di teletrasporto dimenticato attira i giocatori in una dimensione alternativa piena di pericoli.</text:p>
        </text:list-item>
        <text:list-item>
          <text:p text:style-name="P512">Un potente sigillo magico viene distrutto, provocando l’ira di un antico spirito elementale.</text:p>
        </text:list-item>
        <text:list-item>
          <text:p text:style-name="P512">Un’illusione magica svanisce, rivelando una città segreta dimenticata da secoli sotto il deserto.</text:p>
        </text:list-item>
        <text:list-item>
          <text:p text:style-name="P512">Un incantesimo di lunga durata fa invecchiare rapidamente chi lo lancia, consumandolo in pochi istanti</text:p>
        </text:list-item>
        <text:list-item>
          <text:p text:style-name="P512">Una potente barriera magica crolla, rilasciando una maledizione che inizia a diffondersi nella regione circostante.</text:p>
        </text:list-item>
        <text:list-item>
          <text:p text:style-name="P512">Un antico incantesimo di rianimazione fallisce, trasformando i morti in mostri assetati di sangue.</text:p>
        </text:list-item>
        <text:list-item>
          <text:p text:style-name="P512">Il tempo si distorce attorno a una città a causa di un incantesimo perduto, con persone che invecchiano e ringiovaniscono senza controllo.</text:p>
        </text:list-item>
        <text:list-item>
          <text:p text:style-name="P512">Un antico portale magico si attiva e inizia a risucchiare oggetti, persone e animali in un regno sconosciuto.</text:p>
        </text:list-item>
        <text:list-item>
          <text:p text:style-name="P512">Un’antica statua incantata prende vita, ma si rivolta contro i suoi stessi creatori.</text:p>
        </text:list-item>
        <text:list-item>
          <text:p text:style-name="P512">Un incantesimo di resurrezione fallisce, creando un legame inscindibile tra l’anima di un defunto e uno dei giocatori.</text:p>
        </text:list-item>
        <text:list-item>
          <text:p text:style-name="P512">Le parole di un antico incantesimo distruggono l’equilibrio magico di una regione, scatenando catastrofi naturali.</text:p>
        </text:list-item>
        <text:list-item>
          <text:p text:style-name="P512">Un potente amuleto magico si spezza, liberando un’entità malvagia che era stata sigillata all’interno.</text:p>
        </text:list-item>
        <text:list-item>
          <text:p text:style-name="P512">Un incantesimo dimenticato si attiva, trasformando l’acqua di un fiume in un liquido corrosivo.</text:p>
        </text:list-item>
        <text:list-item>
          <text:p text:style-name="P512">Un antico libro di incantesimi diventa incontrollabile, lanciando magie a caso ogni volta che viene aperto.</text:p>
        </text:list-item>
        <text:list-item>
          <text:p text:style-name="P512">Un portale per un piano di fuoco si apre improvvisamente, causando un’ondata di calore e la comparsa di elementali.</text:p>
        </text:list-item>
        <text:list-item>
          <text:p text:style-name="P512">Un incantesimo di invisibilità antico si rompe, rendendo visibili creature spettrali che avevano infestato una città.</text:p>
        </text:list-item>
        <text:list-item>
          <text:p text:style-name="P512">Un antico tempio levita nel cielo dopo che un potente incantesimo di gravità viene attivato.</text:p>
        </text:list-item>
        <text:list-item>
          <text:p text:style-name="P512">Un sigillo magico in una caverna si spezza, causando la comparsa di visioni inquietanti nel paesaggio circostante.</text:p>
        </text:list-item>
        <text:list-item>
          <text:p text:style-name="P512">Un antico incantesimo di controllo mentale si riattiva su una popolazione, costringendola a obbedire a un’antica volontà malvagia.</text:p>
        </text:list-item>
      </text:list>
      <text:h text:style-name="Heading_20_3" text:outline-level="3"><text:bookmark-start text:name="carovane-e-convogli-in-pericolo"/>Carovane e Convogli in Pericolo<text:bookmark-end text:name="carovane-e-convogli-in-pericolo"/></text:h>
      <text:list text:style-name="L410">
        <text:list-item>
          <text:p text:style-name="P513">Una carovana che trasporta spezie rare viene attaccata da bande di predoni armati di archibugi nascosti tra le dune.</text:p>
        </text:list-item>
        <text:list-item>
          <text:p text:style-name="P513">Un convoglio di grano è circondato da tribù ostili che vogliono saccheggiare le risorse, minacciando di distruggere le merci.</text:p>
        </text:list-item>
        <text:list-item>
          <text:p text:style-name="P513">Durante un temporale violento, una carovana perde il contatto con le sue guide, scomparendo tra le gole montane.</text:p>
        </text:list-item>
        <text:list-item>
          <text:p text:style-name="P513">Un convoglio che trasporta metalli preziosi viene sabotato da mercenari al soldo di un potente rivale commerciale.</text:p>
        </text:list-item>
        <text:list-item>
          <text:p text:style-name="P513">Il carico di una carovana si ammala misteriosamente, provocando febbri e allucinazioni tra i membri della spedizione.</text:p>
        </text:list-item>
        <text:list-item>
          <text:p text:style-name="P513">Una carovana di schiavi si ribella, causando caos e lasciando i mercanti vulnerabili agli attacchi esterni.</text:p>
        </text:list-item>
        <text:list-item>
          <text:p text:style-name="P513">Un gruppo di mercenari tenta di dirottare una carovana di armi appena forgiata, destinata a un signore della guerra locale.</text:p>
        </text:list-item>
        <text:list-item>
          <text:p text:style-name="P513">Un’imboscata di tribù nomadi, armate di archi e lance, coglie una carovana isolata in un passaggio desertico.</text:p>
        </text:list-item>
        <text:list-item>
          <text:p text:style-name="P513">Un convoglio navale carico di tessuti preziosi viene disperso da una tempesta, lasciando le navi preda di pirati.</text:p>
        </text:list-item>
        <text:list-item>
          <text:p text:style-name="P513">Un convoglio di cammelli carico di sale attraversa una regione minacciata da bande armate che usano vecchie tattiche di guerriglia.</text:p>
        </text:list-item>
        <text:list-item>
          <text:p text:style-name="P513">Un’antica via commerciale è infestata da creature mistiche che confondono e disorientano i viaggiatori.</text:p>
        </text:list-item>
        <text:list-item>
          <text:p text:style-name="P513">Una carovana carica di erbe medicinali rare deve attraversare una zona di quarantena istituita da una città-stato vicina.</text:p>
        </text:list-item>
        <text:list-item>
          <text:p text:style-name="P513">Un convoglio militare di rifornimenti per un esercito in guerra viene intercettato da forze ribelli che bloccano il passo montano.</text:p>
        </text:list-item>
        <text:list-item>
          <text:p text:style-name="P513">Gli spiriti protettori di una foresta sacra attaccano una carovana di legname, accusando i mercanti di profanazione.</text:p>
        </text:list-item>
        <text:list-item>
          <text:p text:style-name="P513">Una carovana che trasporta armi e polvere da sparo viene avvistata da una nave pirata, causando una caccia disperata.</text:p>
        </text:list-item>
        <text:list-item>
          <text:p text:style-name="P513">Un convoglio navale è bloccato da una flotta rivale che pretende un tributo prima di lasciar passare le navi.</text:p>
        </text:list-item>
        <text:list-item>
          <text:p text:style-name="P513">Un mercante in fuga con un carico d’oro rubato viene inseguito attraverso le colline da mercenari incaricati di riportarlo indietro.</text:p>
        </text:list-item>
        <text:list-item>
          <text:p text:style-name="P513">Un gruppo di predoni riesce a infiltrarsi in un convoglio commerciale, rubando lentamente i beni preziosi senza farsi notare.</text:p>
        </text:list-item>
        <text:list-item>
          <text:p text:style-name="P513">Una carovana sacra che trasporta reliquie religiose viene attaccata da fanatici di una setta eretica.</text:p>
        </text:list-item>
        <text:list-item>
          <text:p text:style-name="P513">I membri di un convoglio si ammalano improvvisamente e i superstiti iniziano a sospettare che una maledizione colpisca il loro carico.</text:p>
        </text:list-item>
      </text:list>
      <text:h text:style-name="Heading_20_3" text:outline-level="3"><text:bookmark-start text:name="risposte-divine-ai-riti-sacri"/>Risposte Divine ai Riti Sacri<text:bookmark-end text:name="risposte-divine-ai-riti-sacri"/></text:h>
      <text:list text:style-name="L411">
        <text:list-item>
          <text:p text:style-name="P514">Durante un rito per la pioggia, un’ondata di tempeste inonda le terre coltivate, segno dell’ira degli dèi.</text:p>
        </text:list-item>
        <text:list-item>
          <text:p text:style-name="P514">Un tempio crolla misteriosamente durante una cerimonia di purificazione, indicando un presagio oscuro.</text:p>
        </text:list-item>
        <text:list-item>
          <text:p text:style-name="P514">Un antico albero sacro fiorisce fuori stagione dopo una processione religiosa, portando speranza di abbondanza.</text:p>
        </text:list-item>
        <text:list-item>
          <text:p text:style-name="P514">Gli dèi inviano uno stormo di uccelli rari sopra un altare, segnale di favore per un sovrano appena incoronato.</text:p>
        </text:list-item>
        <text:list-item>
          <text:p text:style-name="P514">Una statua di una divinità versava lacrime durante un sacrificio, indicando l’imminente rovina della città.</text:p>
        </text:list-item>
        <text:list-item>
          <text:p text:style-name="P514">Un sacerdote viene posseduto da uno spirito divino durante un rito, profetizzando un grande cambiamento politico.</text:p>
        </text:list-item>
        <text:list-item>
          <text:p text:style-name="P514">Un fulmine colpisce l’altare durante un’offerta, devastando la città circostante e lasciando i fedeli nel terrore.</text:p>
        </text:list-item>
        <text:list-item>
          <text:p text:style-name="P514">Dopo un rituale fallito, la terra intorno a un villaggio sacro si spacca, liberando vapori tossici che minacciano la popolazione.</text:p>
        </text:list-item>
        <text:list-item>
          <text:p text:style-name="P514">Le acque di una fonte sacra si tingono di rosso durante una cerimonia, presagio di guerra e sangue imminente.</text:p>
        </text:list-item>
        <text:list-item>
          <text:p text:style-name="P514">Durante un festival dedicato al mare, un’enorme creatura marina emerge dalle acque e attacca la costa.</text:p>
        </text:list-item>
        <text:list-item>
          <text:p text:style-name="P514">Un giovane scelto come oracolo durante un rito riceve una visione d’apocalisse che gli dèi non intendono prevenire.</text:p>
        </text:list-item>
        <text:list-item>
          <text:p text:style-name="P514">Una serie di carestie colpisce una regione dopo che un sacrificio agli spiriti della terra viene interrotto.</text:p>
        </text:list-item>
        <text:list-item>
          <text:p text:style-name="P514">Le stelle cadenti segnano l’inizio di una nuova era secondo i sacerdoti, ma la popolazione teme un disastro.</text:p>
        </text:list-item>
        <text:list-item>
          <text:p text:style-name="P514">Una divinità si manifesta attraverso un animale sacro che si presenta durante un’offerta di ringraziamento.</text:p>
        </text:list-item>
        <text:list-item>
          <text:p text:style-name="P514">Gli dèi rispondono alla richiesta di guarigione trasformando un’intera città in pietra come punizione per i peccati dei suoi abitanti.</text:p>
        </text:list-item>
        <text:list-item>
          <text:p text:style-name="P514">Durante un rito per l’abbondanza, le acque di un fiume sacro si prosciugano misteriosamente, scatenando panico tra i fedeli.</text:p>
        </text:list-item>
        <text:list-item>
          <text:p text:style-name="P514">Gli spiriti protettori di un bosco sacro inviano segni minacciosi, avvertendo di un’invasione imminente.</text:p>
        </text:list-item>
        <text:list-item>
          <text:p text:style-name="P514">Un sacerdote annuncia che una maledizione è stata spezzata, ma il tempio subisce strani fenomeni poco dopo.</text:p>
        </text:list-item>
        <text:list-item>
          <text:p text:style-name="P514">Un nuovo culto eretico ottiene una risposta divina da un antico oracolo, predicendo la caduta del re.</text:p>
        </text:list-item>
        <text:list-item>
          <text:p text:style-name="P514">Gli dèi rispondono a una richiesta di vittoria in battaglia invocando una piaga che decima il nemico, ma lascia tracce di corruzione magica.</text:p>
        </text:list-item>
      </text:list>
      <text:h text:style-name="Heading_20_3" text:outline-level="3"><text:bookmark-start text:name="reazioni-degli-spiriti-ancestrali"/>Reazioni degli Spiriti Ancestrali<text:bookmark-end text:name="reazioni-degli-spiriti-ancestrali"/></text:h>
      <text:list text:style-name="L412">
        <text:list-item>
          <text:p text:style-name="P515">Gli spiriti degli antenati appaiono in sogno, avvertendo i giocatori di non fidarsi di un alleato.</text:p>
        </text:list-item>
        <text:list-item>
          <text:p text:style-name="P515">Un sito sacro profanato scatena la furia degli spiriti, che perseguitano i villaggi circostanti con apparizioni e disastri.</text:p>
        </text:list-item>
        <text:list-item>
          <text:p text:style-name="P515">Durante una preghiera al sepolcro di un grande eroe, lo spirito appare e sfida i giocatori a dimostrare il loro valore.</text:p>
        </text:list-item>
        <text:list-item>
          <text:p text:style-name="P515">Gli spiriti rivelano un’antica profezia dimenticata, ma la loro visione è criptica e difficile da interpretare.</text:p>
        </text:list-item>
        <text:list-item>
          <text:p text:style-name="P515">Un’offerta sacra viene ignorata dagli spiriti, che iniziano a maledire i raccolti di una regione.</text:p>
        </text:list-item>
        <text:list-item>
          <text:p text:style-name="P515">Gli spiriti appaiono durante una battaglia decisiva, influenzando il corso degli eventi con un intervento mistico.</text:p>
        </text:list-item>
        <text:list-item>
          <text:p text:style-name="P515">Un antico spirito si manifesta per proteggere una reliquia sacra, sfidando chiunque cerchi di rubarla.</text:p>
        </text:list-item>
        <text:list-item>
          <text:p text:style-name="P515">Gli antenati visitano in sogno i membri del gruppo, indicando il luogo di un antico tesoro, ma richiedono un tributo in cambio.</text:p>
        </text:list-item>
        <text:list-item>
          <text:p text:style-name="P515">Gli spiriti degli antichi sovrani si mostrano alla corte reale, avvertendo di un tradimento imminente.</text:p>
        </text:list-item>
        <text:list-item>
          <text:p text:style-name="P515">Uno spirito ancestrale benedice i giocatori per aver ripristinato l’onore perduto della sua discendenza.</text:p>
        </text:list-item>
        <text:list-item>
          <text:p text:style-name="P515">Una sepoltura disturbata fa risvegliare gli spiriti guerrieri, che iniziano a infestare le vicinanze.</text:p>
        </text:list-item>
        <text:list-item>
          <text:p text:style-name="P515">Gli spiriti appaiono durante una cerimonia, portando saggezza a chi osa sfidarli con domande profonde.</text:p>
        </text:list-item>
        <text:list-item>
          <text:p text:style-name="P515">Un antenato noto per essere stato traditore nella sua vita mortale si presenta per chiedere redenzione.</text:p>
        </text:list-item>
        <text:list-item>
          <text:p text:style-name="P515">I fantasmi di una battaglia dimenticata si mostrano ai giocatori, invitandoli a completare una missione lasciata incompiuta.</text:p>
        </text:list-item>
        <text:list-item>
          <text:p text:style-name="P515">Gli spiriti di una famiglia caduta in disgrazia appaiono per chiedere giustizia, offrendo aiuto in cambio.</text:p>
        </text:list-item>
        <text:list-item>
          <text:p text:style-name="P515">Durante un rito funebre, uno spirito ancestrale si manifesta per richiedere un sacrificio o minacciare disastri futuri.</text:p>
        </text:list-item>
        <text:list-item>
          <text:p text:style-name="P515">Gli spiriti appaiono in un tempio abbandonato, chiedendo aiuto per restaurare il loro luogo sacro.</text:p>
        </text:list-item>
        <text:list-item>
          <text:p text:style-name="P515">Un antenato dimenticato appare e rivela di essere stato maledetto per un crimine oscuro, richiedendo che la maledizione venga spezzata.</text:p>
        </text:list-item>
        <text:list-item>
          <text:p text:style-name="P515">Un albero sacro che ospita gli spiriti degli antenati comincia a seccarsi, preannunciando calamità per la terra circostante.</text:p>
        </text:list-item>
        <text:list-item>
          <text:p text:style-name="P515">Gli spiriti appaiono infuriati dopo che un discendente rinuncia al proprio retaggio, scatenando una serie di eventi misteriosi.</text:p>
        </text:list-item>
      </text:list>
      <text:h text:style-name="Heading_20_3" text:outline-level="3"><text:bookmark-start text:name="tradimenti-e-intrighi-di-corte"/>Tradimenti e Intrighi di Corte<text:bookmark-end text:name="tradimenti-e-intrighi-di-corte"/></text:h>
      <text:list text:style-name="L413">
        <text:list-item>
          <text:p text:style-name="P516">Un fidato consigliere viene accusato di tramare un colpo di stato, ma le prove sono scarse e forse fabbricate.</text:p>
        </text:list-item>
        <text:list-item>
          <text:p text:style-name="P516">Un cortigiano scompare misteriosamente dopo aver scoperto un segreto pericoloso riguardante il sovrano.</text:p>
        </text:list-item>
        <text:list-item>
          <text:p text:style-name="P516">Il capo delle guardie reali è in realtà un informatore segreto che lavora per una nazione nemica.</text:p>
        </text:list-item>
        <text:list-item>
          <text:p text:style-name="P516">Un membro della famiglia reale cerca di avvelenare il re per accelerare la propria ascesa al trono.</text:p>
        </text:list-item>
        <text:list-item>
          <text:p text:style-name="P516">Una dama di corte viene sorpresa a passare informazioni riservate a una potente gilda mercantile.</text:p>
        </text:list-item>
        <text:list-item>
          <text:p text:style-name="P516">Un ambasciatore straniero corrompe un ministro per influenzare le politiche del sovrano.</text:p>
        </text:list-item>
        <text:list-item>
          <text:p text:style-name="P516">Un matrimonio diplomatico viene sabotato da un assassino sconosciuto, che cerca di incolpare una fazione rivale.</text:p>
        </text:list-item>
        <text:list-item>
          <text:p text:style-name="P516">Un nuovo arrivato alla corte diventa improvvisamente il favorito del re, ma nessuno sa cosa nasconde il suo passato.</text:p>
        </text:list-item>
        <text:list-item>
          <text:p text:style-name="P516">Un tradimento nella guardia reale porta a un tentativo di rapimento del principe ereditario.</text:p>
        </text:list-item>
        <text:list-item>
          <text:p text:style-name="P516">I cortigiani più potenti complottano per sostituire il sovrano con un parente più malleabile.</text:p>
        </text:list-item>
        <text:list-item>
          <text:p text:style-name="P516">Una serie di duelli segreti si verificano tra nobili rivali per decidere chi controllerà una regione chiave del regno.</text:p>
        </text:list-item>
        <text:list-item>
          <text:p text:style-name="P516">Un membro della corte si allea segretamente con pirati locali, promettendo loro un passaggio sicuro in cambio di ricchezze.</text:p>
        </text:list-item>
        <text:list-item>
          <text:p text:style-name="P516">Una lettera segreta viene intercettata, rivelando che un complotto sta per scoppiare alla corte durante una festa importante.</text:p>
        </text:list-item>
        <text:list-item>
          <text:p text:style-name="P516">Un ricco nobile inizia a finanziare ribelli per destabilizzare la corte e ottenere maggiore potere politico.</text:p>
        </text:list-item>
        <text:list-item>
          <text:p text:style-name="P516">Una fazione religiosa all’interno della corte cerca di influenzare il re, spingendolo a dichiarare una guerra sacra.</text:p>
        </text:list-item>
        <text:list-item>
          <text:p text:style-name="P516">Un artefatto sacro viene rubato dal palazzo reale, e le accuse volano tra i membri della famiglia nobile.</text:p>
        </text:list-item>
        <text:list-item>
          <text:p text:style-name="P516">Un vecchio alleato della corona viene arrestato con l’accusa di alto tradimento, ma si sospetta che sia solo una pedina in un gioco più grande.</text:p>
        </text:list-item>
        <text:list-item>
          <text:p text:style-name="P516">Un comandante militare trama per impadronirsi del potere, organizzando silenziosamente le truppe per un colpo di stato.</text:p>
        </text:list-item>
        <text:list-item>
          <text:p text:style-name="P516">Una fazione della corte sta raccogliendo sostenitori per deporre il sovrano attuale in favore di un pretendente esiliato.</text:p>
        </text:list-item>
        <text:list-item>
          <text:p text:style-name="P516">Un potente mago di corte viene scoperto a praticare riti proibiti, e si teme che abbia usato la magia per influenzare il re.</text:p>
        </text:list-item>
      </text:list>
      <text:h text:style-name="Heading_20_3" text:outline-level="3"><text:bookmark-start text:name="esplorazione-delle-isole-sconosciute"/>Esplorazione delle Isole Sconosciute<text:bookmark-end text:name="esplorazione-delle-isole-sconosciute"/></text:h>
      <text:list text:style-name="L414">
        <text:list-item>
          <text:p text:style-name="P517">Un’isola emersa di recente è coperta da antiche rovine, ma gli abitanti locali dicono che sia maledetta.</text:p>
        </text:list-item>
        <text:list-item>
          <text:p text:style-name="P517">Un vulcano attivo domina un’isola, emettendo strani vapori che sembrano distorcere la realtà circostante.</text:p>
        </text:list-item>
        <text:list-item>
          <text:p text:style-name="P517">Una tribù sconosciuta e ostile attacca i visitatori con armi di bronzo incantate, mai viste prima.</text:p>
        </text:list-item>
        <text:list-item>
          <text:p text:style-name="P517">Gli esploratori trovano una città abbandonata sulle rive di un’isola, ma tutto sembra essere stato lasciato in fretta.</text:p>
        </text:list-item>
        <text:list-item>
          <text:p text:style-name="P517">Un vasto labirinto sotterraneo si trova sotto l’isola, ma è infestato da creature marine mutanti.</text:p>
        </text:list-item>
        <text:list-item>
          <text:p text:style-name="P517">Gli abitanti di una piccola isola sono insolitamente amichevoli, ma sembrano nascondere un oscuro segreto.</text:p>
        </text:list-item>
        <text:list-item>
          <text:p text:style-name="P517">Su un’isola solitaria si trova una fonte che si dice possa guarire qualsiasi malattia, ma è protetta da una bestia leggendaria.</text:p>
        </text:list-item>
        <text:list-item>
          <text:p text:style-name="P517">Gli esploratori trovano su una spiaggia un’antica nave arenata, la cui ciurma sembra essere scomparsa senza lasciare traccia.</text:p>
        </text:list-item>
        <text:list-item>
          <text:p text:style-name="P517">Un’isola è coperta da una foresta di alberi giganti, i cui frutti contengono potenti proprietà alchemiche.</text:p>
        </text:list-item>
        <text:list-item>
          <text:p text:style-name="P517">Un’isola sembra essere abitata da un’unica figura misteriosa che afferma di essere immortale.</text:p>
        </text:list-item>
        <text:list-item>
          <text:p text:style-name="P517">Gli spiriti ancestrali di un’isola sacra appaiono di notte, guidando gli esploratori verso un antico santuario nascosto.</text:p>
        </text:list-item>
        <text:list-item>
          <text:p text:style-name="P517">Le rovine di un antico tempio sommerso emergono periodicamente dall’acqua, ma solo per poche ore prima di scomparire di nuovo.</text:p>
        </text:list-item>
        <text:list-item>
          <text:p text:style-name="P517">Un’isola appare e scompare misteriosamente dalle mappe, come se fluttuasse tra le dimensioni.</text:p>
        </text:list-item>
        <text:list-item>
          <text:p text:style-name="P517">Una malattia sconosciuta colpisce chiunque metta piede sull’isola, e solo gli sciamani locali sembrano possedere la cura.</text:p>
        </text:list-item>
        <text:list-item>
          <text:p text:style-name="P517">Gli esploratori scoprono un’antica ziggurat al centro dell’isola, protetta da trappole letali e custodi spettrali.</text:p>
        </text:list-item>
        <text:list-item>
          <text:p text:style-name="P517">Su un’isola coperta da fitte giungle, vive una civiltà isolata che adora un colossale serpente marino.</text:p>
        </text:list-item>
        <text:list-item>
          <text:p text:style-name="P517">Un’isola disabitata è infestata da creature giganti, retaggio di un antico esperimento magico.</text:p>
        </text:list-item>
        <text:list-item>
          <text:p text:style-name="P517">Le grotte sotterranee di un’isola custodiscono un cristallo che emette una luce mistica, attirando a sé strane creature marine.</text:p>
        </text:list-item>
        <text:list-item>
          <text:p text:style-name="P517">Un misterioso canto proveniente dall’isola fa perdere la rotta ai marinai, che finiscono per naufragare contro gli scogli.</text:p>
        </text:list-item>
        <text:list-item>
          <text:p text:style-name="P517">Una tribù indigena accoglie gli esploratori come salvatori profetizzati, ma li costringe a compiere un rituale per evitare una calamità.</text:p>
        </text:list-item>
      </text:list>
      <text:h text:style-name="Heading_20_3" text:outline-level="3"><text:bookmark-start text:name="conseguenze-di-rivalità-tribali"/>Conseguenze di Rivalità Tribali<text:bookmark-end text:name="conseguenze-di-rivalità-tribali"/></text:h>
      <text:list text:style-name="L415">
        <text:list-item>
          <text:p text:style-name="P518">Due tribù nomadi entrano in conflitto per il controllo di un’oasi sacra, e il commercio lungo le rotte desertiche viene interrotto.</text:p>
        </text:list-item>
        <text:list-item>
          <text:p text:style-name="P518">Una faida tra due clan rivali degenera in un massacro durante un festival religioso, con ripercussioni politiche nelle città vicine.</text:p>
        </text:list-item>
        <text:list-item>
          <text:p text:style-name="P518">Un potente capo tribù viene ucciso in un duello rituale, e la sua tribù chiede vendetta su larga scala.</text:p>
        </text:list-item>
        <text:list-item>
          <text:p text:style-name="P518">I commercianti che attraversano il territorio di una tribù sono costretti a scegliere da che parte stare, con conseguenze su future relazioni commerciali.</text:p>
        </text:list-item>
        <text:list-item>
          <text:p text:style-name="P518">Un matrimonio tra due tribù rivali finisce in tragedia, riaccendendo vecchi rancori e portando a saccheggi nelle terre di confine.</text:p>
        </text:list-item>
        <text:list-item>
          <text:p text:style-name="P518">I capi tribù di una regione organizzano un incontro di pace, ma vengono traditi da un assassino sconosciuto, che riaccende la guerra.</text:p>
        </text:list-item>
        <text:list-item>
          <text:p text:style-name="P518">Una tribù viene annientata da una rivale, ma gli spiriti degli antenati massacrati tornano per vendicarsi, infestando i territori sacri.</text:p>
        </text:list-item>
        <text:list-item>
          <text:p text:style-name="P518">Un antico artefatto, rubato durante una razzia tra tribù, scatena una maledizione su entrambe le fazioni.</text:p>
        </text:list-item>
        <text:list-item>
          <text:p text:style-name="P518">Un grande raduno tra le tribù finisce con uno scontro armato, e ora nessuna via commerciale è sicura.</text:p>
        </text:list-item>
        <text:list-item>
          <text:p text:style-name="P518">Una tribù vince una battaglia decisiva contro una rivale, e reclama l’accesso esclusivo a un’importante risorsa naturale.</text:p>
        </text:list-item>
        <text:list-item>
          <text:p text:style-name="P518">Una tribù sottomessa a una potenza straniera si ribella e organizza un’imboscata a un convoglio diplomatico, scatenando un conflitto più ampio.</text:p>
        </text:list-item>
        <text:list-item>
          <text:p text:style-name="P518">Una faida tribale si estende alle città-stato vicine, costringendole a intervenire o a schierarsi con una delle fazioni.</text:p>
        </text:list-item>
        <text:list-item>
          <text:p text:style-name="P518">Un duello rituale tra i campioni di due tribù viene manipolato da una terza fazione che cerca di prendere il controllo della regione.</text:p>
        </text:list-item>
        <text:list-item>
          <text:p text:style-name="P518">La tribù perdente di una guerra nomade si ritira nelle montagne, ma continua a lanciare incursioni notturne contro i vincitori.</text:p>
        </text:list-item>
        <text:list-item>
          <text:p text:style-name="P518">Un’insolita alleanza tra due tribù rivali costringe i giocatori a mediare una tregua tra altre fazioni.</text:p>
        </text:list-item>
        <text:list-item>
          <text:p text:style-name="P518">Gli anziani di una tribù chiedono l’intervento dei giocatori per recuperare un oggetto sacro rubato dai loro rivali.</text:p>
        </text:list-item>
        <text:list-item>
          <text:p text:style-name="P518">Le rivalità tra tribù causano la chiusura di un importante passaggio montano, isolando una città-stato che dipende dalle carovane.</text:p>
        </text:list-item>
        <text:list-item>
          <text:p text:style-name="P518">Un gruppo di mercenari viene assunto da una tribù per eliminare i capi della tribù rivale, ma i mercenari tradiscono entrambe le parti.</text:p>
        </text:list-item>
        <text:list-item>
          <text:p text:style-name="P518">Una tribù nomade si allea con forze straniere, portando le fazioni locali a sospettare di tradimenti e alleanze segrete.</text:p>
        </text:list-item>
        <text:list-item>
          <text:p text:style-name="P518">Una tribù viene spinta sull’orlo dell’estinzione da una faida, ma una profezia dice che solo un sacrificio umano potrà porre fine al conflitto.</text:p>
        </text:list-item>
      </text:list>
      <text:h text:style-name="Heading_20_3" text:outline-level="3"><text:bookmark-start text:name="complicazioni-nelle-guerre-dassedio"/><text:span text:style-name="T1">Complicazioni nelle Guerre d’Assedio</text:span><text:bookmark-end text:name="complicazioni-nelle-guerre-dassedio"/></text:h>
      <text:list text:style-name="L416">
        <text:list-item>
          <text:p text:style-name="P519">Un’imponente fortezza viene rifornita segretamente da un passaggio sotterraneo sconosciuto agli assedianti.</text:p>
        </text:list-item>
        <text:list-item>
          <text:p text:style-name="P519">I macchinari da assedio si guastano durante un attacco critico, costringendo gli assedianti a una ritirata strategica.</text:p>
        </text:list-item>
        <text:list-item>
          <text:p text:style-name="P519">Un traditore all’interno della fortezza sabota le riserve d’acqua, ma viene scoperto prima di portare a termine il suo piano.</text:p>
        </text:list-item>
        <text:list-item>
          <text:p text:style-name="P519">Gli assediati lanciano attacchi notturni sorprendendo le truppe nemiche addormentate, rovesciando le sorti della battaglia.</text:p>
        </text:list-item>
        <text:list-item>
          <text:p text:style-name="P519">Una potente arma d’assedio esplode accidentalmente, danneggiando gravemente le linee d’attacco degli assedianti.</text:p>
        </text:list-item>
        <text:list-item>
          <text:p text:style-name="P519">Un messaggio segreto viene inviato dagli assediati, chiedendo rinforzi a una nazione rivale che si sta preparando ad intervenire.</text:p>
        </text:list-item>
        <text:list-item>
          <text:p text:style-name="P519">Gli assedianti trovano un passaggio nascosto nella fortezza, ma è infestato da creature magiche che difendono i corridoi sotterranei.</text:p>
        </text:list-item>
        <text:list-item>
          <text:p text:style-name="P519">Un potente incantesimo difensivo attivato dagli assediati distrugge parte delle macchine da guerra nemiche.</text:p>
        </text:list-item>
        <text:list-item>
          <text:p text:style-name="P519">Le scorte di cibo all’interno della fortezza sono infestate da parassiti, causando fame e malattie tra i difensori.</text:p>
        </text:list-item>
        <text:list-item>
          <text:p text:style-name="P519">Un assalto su larga scala viene lanciato durante una tempesta, causando confusione e disorientamento tra entrambe le fazioni.</text:p>
        </text:list-item>
        <text:list-item>
          <text:p text:style-name="P519">Gli assediati scoprono una riserva segreta di polvere da sparo, che utilizzano per contrattaccare in modo devastante.</text:p>
        </text:list-item>
        <text:list-item>
          <text:p text:style-name="P519">Gli assedianti vengono attaccati da una tribù nomade che difende la fortezza per motivi religiosi.</text:p>
        </text:list-item>
        <text:list-item>
          <text:p text:style-name="P519">Un traditore tra gli assedianti inizia a passare informazioni vitali agli assediati, sabotando l’assedio dall’interno.</text:p>
        </text:list-item>
        <text:list-item>
          <text:p text:style-name="P519">Un gruppo di ribelli all’interno della città assediata si allea con gli assedianti, cercando di aprire i cancelli durante la notte.</text:p>
        </text:list-item>
        <text:list-item>
          <text:p text:style-name="P519">Gli assediati invocano una tempesta magica che colpisce gli assedianti, causando disastri nelle linee di rifornimento.</text:p>
        </text:list-item>
        <text:list-item>
          <text:p text:style-name="P519">Una flotta di soccorso arriva inaspettatamente via mare, spezzando l’assedio e costringendo le forze attaccanti a ritirarsi.</text:p>
        </text:list-item>
        <text:list-item>
          <text:p text:style-name="P519">Una serie di trappole mortali attende gli assedianti all’interno della fortezza, rallentando la loro avanzata decisiva.</text:p>
        </text:list-item>
        <text:list-item>
          <text:p text:style-name="P519">Un’infiltrazione furtiva all’interno della fortezza fallisce miseramente, esponendo la rete di spie degli assedianti.</text:p>
        </text:list-item>
        <text:list-item>
          <text:p text:style-name="P519">Una carovana carica di medicinali per gli assedianti viene intercettata, causando il diffondersi di malattie tra le truppe.</text:p>
        </text:list-item>
        <text:list-item>
          <text:p text:style-name="P519">La popolazione civile all’interno della città assediata si ribella contro i propri governanti, costringendo i difensori a dividere le loro forze.</text:p>
        </text:list-item>
      </text:list>
      <text:h text:style-name="Heading_20_3" text:outline-level="3"><text:bookmark-start text:name="accordi-segreti-tra-nobili"/><text:span text:style-name="T1">Accordi Segreti tra Nobili</text:span><text:bookmark-end text:name="accordi-segreti-tra-nobili"/></text:h>
      <text:list text:style-name="L417">
        <text:list-item>
          <text:p text:style-name="P520">Due nobili rivali si incontrano in segreto per stringere un patto, unendo le loro casate contro una terza fazione.</text:p>
        </text:list-item>
        <text:list-item>
          <text:p text:style-name="P520">Un matrimonio politico viene negoziato in segreto per garantire un’alleanza vantaggiosa tra due potenti famiglie.</text:p>
        </text:list-item>
        <text:list-item>
          <text:p text:style-name="P520">Un patto tra nobili e un ordine religioso viene siglato per ottenere favori divini in cambio di terre e risorse.</text:p>
        </text:list-item>
        <text:list-item>
          <text:p text:style-name="P520">Due casate nobiliari si accordano per scambiarsi prigionieri di alto rango, mantenendo le trattative segrete dal sovrano.</text:p>
        </text:list-item>
        <text:list-item>
          <text:p text:style-name="P520">Un gruppo di nobili congiura per assassinare il re, pianificando di spartirsi il regno dopo la sua morte.</text:p>
        </text:list-item>
        <text:list-item>
          <text:p text:style-name="P520">Un ricco signore della guerra finanzia segretamente la ribellione di una provincia in cambio di fedeltà futura.</text:p>
        </text:list-item>
        <text:list-item>
          <text:p text:style-name="P520">Un nobile tradisce la sua alleanza in cambio di un carico d’oro offerto da una città-stato rivale.</text:p>
        </text:list-item>
        <text:list-item>
          <text:p text:style-name="P520">Due nobili siglano un patto di neutralità, promettendosi di non intervenire in una guerra imminente per mantenere i propri territori.</text:p>
        </text:list-item>
        <text:list-item>
          <text:p text:style-name="P520">Un membro della corte reale viene segretamente corrotto da un nobile, ottenendo il favore del sovrano in cambio di concessioni terriere.</text:p>
        </text:list-item>
        <text:list-item>
          <text:p text:style-name="P520">Un nobile stringe un patto con i pirati locali per garantire che le rotte marittime del suo rivale vengano sistematicamente saccheggiate.</text:p>
        </text:list-item>
        <text:list-item>
          <text:p text:style-name="P520">Una famiglia nobile, in crisi economica, vende segretamente armi e risorse a una nazione nemica.</text:p>
        </text:list-item>
        <text:list-item>
          <text:p text:style-name="P520">Un gruppo di nobili trama per liberare un prigioniero di guerra in cambio di informazioni su un nemico comune.</text:p>
        </text:list-item>
        <text:list-item>
          <text:p text:style-name="P520">Una giovane nobile organizza in segreto la fuga di un prigioniero politico con cui ha stretto una relazione proibita.</text:p>
        </text:list-item>
        <text:list-item>
          <text:p text:style-name="P520">Due nobili organizzano un accordo segreto per spartirsi il controllo dei villaggi e delle miniere in una regione contesa.</text:p>
        </text:list-item>
        <text:list-item>
          <text:p text:style-name="P520">Un patto clandestino viene stipulato per assassinare un comandante militare che sta diventando troppo potente.</text:p>
        </text:list-item>
        <text:list-item>
          <text:p text:style-name="P520">Un nobile sfrutta un accordo con un gruppo di mercenari per sabotare le operazioni militari di un alleato rivale.</text:p>
        </text:list-item>
        <text:list-item>
          <text:p text:style-name="P520">Un piano di matrimonio tra due famiglie viene segretamente sabotato da un nobile geloso, che invia assassini per impedire l’unione.</text:p>
        </text:list-item>
        <text:list-item>
          <text:p text:style-name="P520">Un potente generale si accorda con un nobile rivale, tradendo il suo sovrano per ottenere il controllo di un importante castello.</text:p>
        </text:list-item>
        <text:list-item>
          <text:p text:style-name="P520">Due nobili sfruttano un patto segreto per accusare un terzo rivale di tradimento, ottenendo così le sue terre.</text:p>
        </text:list-item>
        <text:list-item>
          <text:p text:style-name="P520">Un’alleanza segreta tra nobili e mercanti viene scoperta, rivelando un piano per controllare il commercio di una risorsa chiave.</text:p>
        </text:list-item>
      </text:list>
      <text:h text:style-name="Heading_20_3" text:outline-level="3"><text:bookmark-start text:name="incontri-nei-mercati-di-marethar"/><text:span text:style-name="T1">Incontri nei Mercati di Marethar</text:span><text:bookmark-end text:name="incontri-nei-mercati-di-marethar"/></text:h>
      <text:list text:style-name="L418">
        <text:list-item>
          <text:p text:style-name="P521">Un mercante di spezie propone un affare insolitamente vantaggioso, ma dietro c’è un trucco nascosto.</text:p>
        </text:list-item>
        <text:list-item>
          <text:p text:style-name="P521">Un venditore di reliquie sacre espone una strana maschera antica che sembra reagire alla presenza dei giocatori.</text:p>
        </text:list-item>
        <text:list-item>
          <text:p text:style-name="P521">Un giovane apprendista artigiano chiede aiuto ai giocatori per smascherare il suo maestro, che ha venduto armi difettose a un signore della guerra.</text:p>
        </text:list-item>
        <text:list-item>
          <text:p text:style-name="P521">Un nobile mascherato sta acquistando in gran segreto una mappa di una rotta commerciale perduta.</text:p>
        </text:list-item>
        <text:list-item>
          <text:p text:style-name="P521">Una corporazione mercantile si sta espandendo aggressivamente, spazzando via i piccoli venditori dal mercato.</text:p>
        </text:list-item>
        <text:list-item>
          <text:p text:style-name="P521">Una nave straniera appena attraccata porta mercanti di terre lontane con merci mai viste prima.</text:p>
        </text:list-item>
        <text:list-item>
          <text:p text:style-name="P521">Un trafficante d’arte sacra è in fuga dopo aver venduto un falso manufatto religioso a un tempio locale.</text:p>
        </text:list-item>
        <text:list-item>
          <text:p text:style-name="P521">Un misterioso alchimista vende pozioni che promettono salute e longevità, ma sembrano avere effetti collaterali inaspettati.</text:p>
        </text:list-item>
        <text:list-item>
          <text:p text:style-name="P521">Un bardo locale cerca disperatamente di vendere una strana pergamena antica, dicendo di voler fuggire dalla città.</text:p>
        </text:list-item>
        <text:list-item>
          <text:p text:style-name="P521">Una rissa esplode in mezzo al mercato quando un furfante cerca di rubare un raro cristallo magico da un banco di venditori itineranti.</text:p>
        </text:list-item>
        <text:list-item>
          <text:p text:style-name="P521">Un mercante di animali esotici espone una creatura sconosciuta, dicendo che viene da un’isola inesplorata oltre il Marethar.</text:p>
        </text:list-item>
        <text:list-item>
          <text:p text:style-name="P521">Un gruppo di gilde mercantili organizza una gara di compravendita per decidere chi controllerà i prezzi delle merci rare in città.</text:p>
        </text:list-item>
        <text:list-item>
          <text:p text:style-name="P521">Un vecchio marinaio vende strani artefatti trovati durante i suoi viaggi in terre lontane, ognuno con una storia oscura.</text:p>
        </text:list-item>
        <text:list-item>
          <text:p text:style-name="P521">Una banda di ladri si infiltra nel mercato, derubando silenziosamente le bancarelle mentre una truppa di acrobati distrae la folla.</text:p>
        </text:list-item>
        <text:list-item>
          <text:p text:style-name="P521">Una spia di una città-stato rivale usa il mercato per scambiare informazioni vitali su rotte commerciali con mercenari.</text:p>
        </text:list-item>
        <text:list-item>
          <text:p text:style-name="P521">Un mercante offre ai giocatori un raro amuleto magico, ma viene inseguito da uomini armati per un debito non pagato.</text:p>
        </text:list-item>
        <text:list-item>
          <text:p text:style-name="P521">Una carovana appena arrivata dalla regione desertica di Aridonia porta strane merci incantate, ma il prezzo è incredibilmente alto.</text:p>
        </text:list-item>
        <text:list-item>
          <text:p text:style-name="P521">Una vecchia mendicante nel mercato racconta storie su una città scomparsa sotto il mare, offrendo una mappa logora in cambio di cibo.</text:p>
        </text:list-item>
        <text:list-item>
          <text:p text:style-name="P521">Un gruppo di sacerdoti discute furiosamente con un mercante accusato di vendere talismani sacri rubati da un tempio.</text:p>
        </text:list-item>
        <text:list-item>
          <text:p text:style-name="P521">Un alchimista propone ai giocatori uno scambio rischioso: pozioni per risolvere un enigma antico in cambio di un ingrediente raro.</text:p>
        </text:list-item>
      </text:list>
      <text:h text:style-name="Heading_20_3" text:outline-level="3"><text:bookmark-start text:name="oggetti-perduti-nelle-terre-selvagge"/><text:span text:style-name="T1">Oggetti Perduti nelle Terre Selvagge</text:span><text:bookmark-end text:name="oggetti-perduti-nelle-terre-selvagge"/></text:h>
      <text:list text:style-name="L419">
        <text:list-item>
          <text:p text:style-name="P522">Una lama rituale antica, infusa con magia dimenticata, giace nel cuore di una foresta infestata.</text:p>
        </text:list-item>
        <text:list-item>
          <text:p text:style-name="P522">Un’armatura dorata risalente all’epoca dei primi re di Marethar è nascosta in una caverna, protetta da creature leggendarie.</text:p>
        </text:list-item>
        <text:list-item>
          <text:p text:style-name="P522">Un medaglione appartenuto a un potente druido scomparso si trova sotto le rovine di un antico cerchio di pietre.</text:p>
        </text:list-item>
        <text:list-item>
          <text:p text:style-name="P522">Un’ampolla contenente una pozione che garantisce visioni del futuro è sepolta tra le dune del deserto.</text:p>
        </text:list-item>
        <text:list-item>
          <text:p text:style-name="P522">Un libro di incantesimi proibiti, perduto da un mago eretico, è custodito da un gruppo di nomadi che non ne conoscono il valore.</text:p>
        </text:list-item>
        <text:list-item>
          <text:p text:style-name="P522">Una mappa tracciata su pelle animale che mostra una via segreta verso una città sotterranea è stata dimenticata in una tomba isolata.</text:p>
        </text:list-item>
        <text:list-item>
          <text:p text:style-name="P522">Una strana bussola magica, capace di condurre chiunque verso il tesoro più grande nei paraggi, si trova nelle mani di un vagabondo solitario.</text:p>
        </text:list-item>
        <text:list-item>
          <text:p text:style-name="P522">Un arco incantato che non manca mai il bersaglio, appartenuto a un mitico cacciatore, è abbandonato in un tempio nascosto.</text:p>
        </text:list-item>
        <text:list-item>
          <text:p text:style-name="P522">Un tamburo cerimoniale, usato per invocare spiriti ancestrali, è protetto da un gruppo di sciamani ostili in una palude remota.</text:p>
        </text:list-item>
        <text:list-item>
          <text:p text:style-name="P522">Un antico gioiello che si dice contenere l’anima di una principessa di un regno perduto è nascosto tra le rovine di un palazzo sommerso.</text:p>
        </text:list-item>
        <text:list-item>
          <text:p text:style-name="P522">Un elmo forgiato con il fuoco di un vulcano dormiente si trova in una caverna sorvegliata da un drago di fuoco leggendario.</text:p>
        </text:list-item>
        <text:list-item>
          <text:p text:style-name="P522">Una spada spezzata, l’arma di un eroe dimenticato, è sepolta sotto una roccia sacra in una vallata remota.</text:p>
        </text:list-item>
        <text:list-item>
          <text:p text:style-name="P522">Un pugnale intriso di veleno magico si trova nell’antica tomba di un assassino che nessuno ha mai osato profanare.</text:p>
        </text:list-item>
        <text:list-item>
          <text:p text:style-name="P522">Una corona d’oro massiccio, indossata dall’ultimo re di una civiltà scomparsa, è incastonata in un’altura abbandonata.</text:p>
        </text:list-item>
        <text:list-item>
          <text:p text:style-name="P522">Una pietra filosofale dimenticata da un alchimista pazzo, capace di trasformare qualsiasi metallo in oro, giace nascosta in una grotta sommersa.</text:p>
        </text:list-item>
        <text:list-item>
          <text:p text:style-name="P522">Un’antica pergamena incisa con un incantesimo per evocare tempeste è conservata in una biblioteca dimenticata sotto le sabbie del deserto.</text:p>
        </text:list-item>
        <text:list-item>
          <text:p text:style-name="P522">Uno scettro reale, simbolo di un antico impero marittimo, è disperso tra le rovine di un faro collassato.</text:p>
        </text:list-item>
        <text:list-item>
          <text:p text:style-name="P522">Un talismano di protezione, forgiato da un antico ordine di monaci guerrieri, è incastonato in una statua all’interno di una foresta oscura.</text:p>
        </text:list-item>
        <text:list-item>
          <text:p text:style-name="P522">Una chiave magica che apre una porta verso una dimensione alternativa è nascosta tra le radici di un albero secolare.</text:p>
        </text:list-item>
        <text:list-item>
          <text:p text:style-name="P522">Un antico sigillo in grado di controllare un esercito di golem giace abbandonato in una fortezza montana.</text:p>
        </text:list-item>
      </text:list>
      <text:h text:style-name="Heading_20_3" text:outline-level="3"><text:bookmark-start text:name="incontri-nelle-paludi-di-meshdad-1"/><text:span text:style-name="T1">Incontri nelle Paludi di Meshdad</text:span><text:bookmark-end text:name="incontri-nelle-paludi-di-meshdad-1"/></text:h>
      <text:list text:style-name="L420">
        <text:list-item>
          <text:p text:style-name="P523">Una banda di contrabbandieri sta nascondendo merci di valore tra le acque melmose, ma si sono persi nei labirinti di canneti.</text:p>
        </text:list-item>
        <text:list-item>
          <text:p text:style-name="P523">Un misterioso uomo in nero si avvicina ai giocatori, offrendo informazioni segrete in cambio di un favore rischioso.</text:p>
        </text:list-item>
        <text:list-item>
          <text:p text:style-name="P523">Una strana nebbia magica si alza improvvisamente, confondendo i viaggiatori e facendo svanire le luci delle torce.</text:p>
        </text:list-item>
        <text:list-item>
          <text:p text:style-name="P523">Un gruppo di mercanti itineranti è bloccato su una zattera, assaliti da creature anfibie provenienti dal fondo della palude.</text:p>
        </text:list-item>
        <text:list-item>
          <text:p text:style-name="P523">Un’antica torre di guardia emerge dall’acqua solo durante la bassa marea, rivelando misteriosi simboli su di essa.</text:p>
        </text:list-item>
        <text:list-item>
          <text:p text:style-name="P523">I resti di un convoglio naufragato si trovano tra le mangrovie, con i corpi scomparsi e strane tracce lasciate nel fango.</text:p>
        </text:list-item>
        <text:list-item>
          <text:p text:style-name="P523">Un pescatore locale racconta di aver visto delle luci misteriose danzare sopra l’acqua di notte, ma nessuno gli crede.</text:p>
        </text:list-item>
        <text:list-item>
          <text:p text:style-name="P523">Un eremita vive su una piccola isola al centro della palude, e custodisce un antico segreto legato alla magia dimenticata.</text:p>
        </text:list-item>
        <text:list-item>
          <text:p text:style-name="P523">Una barca fantasma attraversa silenziosa le acque, i suoi rematori scheletrici pronti a colpire chiunque osi avvicinarsi.</text:p>
        </text:list-item>
        <text:list-item>
          <text:p text:style-name="P523">Un drago palustre dalle squame nere terrorizza i villaggi sulle rive della palude, bruciando raccolti e prosciugando risorse.</text:p>
        </text:list-item>
        <text:list-item>
          <text:p text:style-name="P523">Un gruppo di sciamani della palude è impegnato in un rito oscuro, evocando spiriti dall’acqua torbida.</text:p>
        </text:list-item>
        <text:list-item>
          <text:p text:style-name="P523">I giocatori trovano una fitta rete di trappole per animali disseminata lungo il bordo della palude, ma non c’è traccia del cacciatore.</text:p>
        </text:list-item>
        <text:list-item>
          <text:p text:style-name="P523">Un gigantesco serpente d’acqua attacca le imbarcazioni che attraversano la palude, facendole scomparire senza lasciare traccia.</text:p>
        </text:list-item>
        <text:list-item>
          <text:p text:style-name="P523">Un misterioso tempio sommerso riappare con l’abbassarsi delle acque, ma la sua entrata è protetta da un incantesimo dimenticato.</text:p>
        </text:list-item>
        <text:list-item>
          <text:p text:style-name="P523">Un gruppo di ladri sta cercando di recuperare un carico rubato, nascosto in un luogo paludoso, ma si sono persi e chiedono aiuto.</text:p>
        </text:list-item>
        <text:list-item>
          <text:p text:style-name="P523">Un potente sciamano della palude avverte i giocatori di non disturbare i morti che riposano sotto le acque, pena l’ira degli spiriti.</text:p>
        </text:list-item>
        <text:list-item>
          <text:p text:style-name="P523">Una mandria di bufali selvatici attraversa le acque basse della palude, creando caos tra i viaggiatori.</text:p>
        </text:list-item>
        <text:list-item>
          <text:p text:style-name="P523">Una giovane viene avvistata vagare tra le acque, ma scompare ogni volta che qualcuno cerca di avvicinarsi.</text:p>
        </text:list-item>
        <text:list-item>
          <text:p text:style-name="P523">Strani canti echeggiano tra le canne della palude, provenienti da un misterioso coro invisibile.</text:p>
        </text:list-item>
        <text:list-item>
          <text:p text:style-name="P523">Un gruppo di creature anfibie semi-intelligenti offre alleanza ai giocatori, ma solo se aiuteranno a sbarazzarsi di invasori umani.</text:p>
        </text:list-item>
      </text:list>
      <text:h text:style-name="Heading_20_3" text:outline-level="3"><text:bookmark-start text:name="rinvenimenti-di-creature-leggendarie"/><text:span text:style-name="T1">Rinvenimenti di Creature Leggendarie</text:span><text:bookmark-end text:name="rinvenimenti-di-creature-leggendarie"/></text:h>
      <text:list text:style-name="L421">
        <text:list-item>
          <text:p text:style-name="P524">Una fenice sorvola una catena montuosa, ma ogni volta che rinasce, causa incendi devastanti nelle foreste circostanti.</text:p>
        </text:list-item>
        <text:list-item>
          <text:p text:style-name="P524">Un leviatano emerge dalle acque del Marethar, distruggendo le navi che incrociano la sua rotta senza motivo apparente.</text:p>
        </text:list-item>
        <text:list-item>
          <text:p text:style-name="P524">Un colossale serpente del deserto, venerato come dio dalle tribù nomadi, si muove lentamente sotto le dune, provocando terremoti.</text:p>
        </text:list-item>
        <text:list-item>
          <text:p text:style-name="P524">Un drago di ghiaccio, un tempo dormiente, si risveglia nelle cime più alte delle montagne, portando con sé un inverno eterno.</text:p>
        </text:list-item>
        <text:list-item>
          <text:p text:style-name="P524">Un gruppo di esploratori riferisce di aver avvistato un grifone d’oro tra le rovine di un tempio dimenticato.</text:p>
        </text:list-item>
        <text:list-item>
          <text:p text:style-name="P524">Un basilisco si aggira nelle foreste oscure, trasformando in pietra chiunque incroci il suo sguardo, rendendo le vie commerciali pericolose.</text:p>
        </text:list-item>
        <text:list-item>
          <text:p text:style-name="P524">Un gigantesco rocc sorvola i mari, catturando navi e trascinandole nelle sue terre montuose per divorare l’equipaggio.</text:p>
        </text:list-item>
        <text:list-item>
          <text:p text:style-name="P524">Una manticora è avvistata presso le rive di un fiume, attaccando i villaggi limitrofi e divorando il bestiame.</text:p>
        </text:list-item>
        <text:list-item>
          <text:p text:style-name="P524">Un unicorno leggendario viene avvistato nelle foreste sacre, ma chiunque tenti di seguirlo sparisce misteriosamente.</text:p>
        </text:list-item>
        <text:list-item>
          <text:p text:style-name="P524">Un gruppo di fauni rivela la presenza di una driade leggendaria che vive in un bosco incantato, ma proteggerla ha un costo.</text:p>
        </text:list-item>
        <text:list-item>
          <text:p text:style-name="P524">Un ciclope viene risvegliato da antiche rovine, e ora attacca qualunque viaggiatore osi entrare nel suo territorio.</text:p>
        </text:list-item>
        <text:list-item>
          <text:p text:style-name="P524">Un lupo leggendario, di dimensioni gigantesche, comincia a cacciare nelle pianure di Vallan, causando paura e panico tra le tribù locali.</text:p>
        </text:list-item>
        <text:list-item>
          <text:p text:style-name="P524">Un golem di pietra millenario si risveglia in una valle remota, difendendo strenuamente le rovine di una città scomparsa.</text:p>
        </text:list-item>
        <text:list-item>
          <text:p text:style-name="P524">Un enorme kraken emerge dalle acque durante una tempesta, terrorizzando i pescatori e distruggendo le coste di Thalassia.</text:p>
        </text:list-item>
        <text:list-item>
          <text:p text:style-name="P524">Un pegaso si mostra improvvisamente ai giocatori, portando un messaggio divino, ma solo a coloro che riescono a guadagnarsi la sua fiducia.</text:p>
        </text:list-item>
        <text:list-item>
          <text:p text:style-name="P524">Un’idra dalle molte teste emerge da una palude antica, divorando chiunque si avventuri troppo vicino ai suoi domini.</text:p>
        </text:list-item>
        <text:list-item>
          <text:p text:style-name="P524">Un minotauro emerge da un antico labirinto sotterraneo, reclamando un sacrificio umano per placare la sua furia.</text:p>
        </text:list-item>
        <text:list-item>
          <text:p text:style-name="P524">Un gigante di fuoco è avvistato sui pendii di un vulcano, risvegliato dai sussurri di un’antica profezia.</text:p>
        </text:list-item>
        <text:list-item>
          <text:p text:style-name="P524">Un drago antico, ormai creduto morto da secoli, riappare nelle regioni montuose, scatenando il caos tra i villaggi.</text:p>
        </text:list-item>
        <text:list-item>
          <text:p text:style-name="P524">Una mandria di centauri furiosi galoppa tra le colline, attaccando indiscriminatamente chiunque osi entrare nel loro territorio.</text:p>
        </text:list-item>
      </text:list>
      <text:h text:style-name="Heading_20_3" text:outline-level="3"><text:bookmark-start text:name="esiti-di-incantesimi-alchemici"/><text:span text:style-name="T1">Esiti di Incantesimi Alchemici</text:span><text:bookmark-end text:name="esiti-di-incantesimi-alchemici"/></text:h>
      <text:list text:style-name="L422">
        <text:list-item>
          <text:p text:style-name="P525">Una pozione di invisibilità ha effetti indesiderati, rendendo visibili solo alcune parti del corpo del bevitore.</text:p>
        </text:list-item>
        <text:list-item>
          <text:p text:style-name="P525">Una miscela esplosiva alchemica causa una detonazione improvvisa, facendo emergere strane piante dai detriti.</text:p>
        </text:list-item>
        <text:list-item>
          <text:p text:style-name="P525">Una pozione curativa trasforma temporaneamente il bevitore in una creatura marina, ma gli effetti si prolungano oltre il previsto.</text:p>
        </text:list-item>
        <text:list-item>
          <text:p text:style-name="P525">Un elisir di forza straordinaria rende il consumatore incredibilmente potente, ma lo lascia debole e vulnerabile il giorno successivo.</text:p>
        </text:list-item>
        <text:list-item>
          <text:p text:style-name="P525">Un tentativo di trasmutare il piombo in oro fallisce, creando al suo posto una sostanza instabile che si dissolve a contatto con l’aria.</text:p>
        </text:list-item>
        <text:list-item>
          <text:p text:style-name="P525">Un’alchimia difettosa crea un liquido appiccicoso che attrae creature insettoidi giganti dal profondo delle terre selvagge.</text:p>
        </text:list-item>
        <text:list-item>
          <text:p text:style-name="P525">Un elisir di lunga vita accelera inavvertitamente il metabolismo, causando invecchiamento accelerato invece di longevità.</text:p>
        </text:list-item>
        <text:list-item>
          <text:p text:style-name="P525">Un unguento alchemico per la guarigione guarisce le ferite, ma lascia strane cicatrici runiche incise sulla pelle del paziente.</text:p>
        </text:list-item>
        <text:list-item>
          <text:p text:style-name="P525">Una sostanza alchemica usata per resistere al fuoco trasforma invece il bevitore in una torcia vivente per qualche minuto.</text:p>
        </text:list-item>
        <text:list-item>
          <text:p text:style-name="P525">Una polvere alchemica destinata a rendere solido il liquido trasforma invece tutto ciò che tocca in sabbia.</text:p>
        </text:list-item>
        <text:list-item>
          <text:p text:style-name="P525">Un filtro d’amore produce un effetto opposto, provocando una rabbia incontrollabile in chi lo beve.</text:p>
        </text:list-item>
        <text:list-item>
          <text:p text:style-name="P525">Un tonico per la visione notturna funziona perfettamente, ma rende il bevitore cieco alla luce del sole per tutto il giorno.</text:p>
        </text:list-item>
        <text:list-item>
          <text:p text:style-name="P525">Una pozione per respirare sott’acqua si rivela difettosa e si esaurisce a metà immersione, lasciando il bevitore in pericolo.</text:p>
        </text:list-item>
        <text:list-item>
          <text:p text:style-name="P525">Un tentativo di creare una pietra filosofale produce una sostanza che attrae i morti viventi nella regione.</text:p>
        </text:list-item>
        <text:list-item>
          <text:p text:style-name="P525">Un filtro per aumentare l’intelligenza sovraccarica temporaneamente la mente del bevitore, facendogli avere visioni confuse del futuro.</text:p>
        </text:list-item>
        <text:list-item>
          <text:p text:style-name="P525">Una pozione per far crescere le piante fa invece crescere in maniera incontrollabile i peli del bevitore.</text:p>
        </text:list-item>
        <text:list-item>
          <text:p text:style-name="P525">Un tentativo di creare una potente arma alchemica finisce per incantare gli oggetti circostanti, animandoli.</text:p>
        </text:list-item>
        <text:list-item>
          <text:p text:style-name="P525">Un veleno alchemico miscelato male esplode in una nuvola di fumo verde, trasformando casualmente piante e animali nei paraggi.</text:p>
        </text:list-item>
        <text:list-item>
          <text:p text:style-name="P525">Un intruglio per potenziare le capacità fisiche del bevitore lo rende inarrestabile per un breve periodo, ma lo lascia esausto e privo di forze.</text:p>
        </text:list-item>
        <text:list-item>
          <text:p text:style-name="P525">Una pozione che promette l’immortalità non funziona come previsto, ma blocca l’invecchiamento del bevitore in una forma deforme.</text:p>
        </text:list-item>
      </text:list>
      <text:h text:style-name="Heading_20_3" text:outline-level="3"><text:bookmark-start text:name="comportamenti-imprevisti-di-creature-magiche"/><text:span text:style-name="T1">Comportamenti Imprevisti di Creature Magiche</text:span><text:bookmark-end text:name="comportamenti-imprevisti-di-creature-magiche"/></text:h>
      <text:list text:style-name="L423">
        <text:list-item>
          <text:p text:style-name="P526">Un drago di fuoco normalmente solitario si avvicina ai villaggi, cercando rifugio dagli esseri umani senza spiegazione apparente.</text:p>
        </text:list-item>
        <text:list-item>
          <text:p text:style-name="P526">Un golem, programmato per difendere una torre, si allontana dalla sua postazione e inizia a scavare misteriosamente nella foresta vicina.</text:p>
        </text:list-item>
        <text:list-item>
          <text:p text:style-name="P526">Un unicorno appare in un villaggio, ma invece di evitare gli esseri umani, sembra cercare un bambino nato da poco.</text:p>
        </text:list-item>
        <text:list-item>
          <text:p text:style-name="P526">Un elementale d’acqua diventa estremamente aggressivo quando la luna è piena, attaccando qualsiasi creatura si avvicini a una fonte d’acqua.</text:p>
        </text:list-item>
        <text:list-item>
          <text:p text:style-name="P526">Un grifone che sorveglia un antico tempio si mostra insolitamente amichevole e offre aiuto ai viaggiatori, sebbene nessuno capisca perché.</text:p>
        </text:list-item>
        <text:list-item>
          <text:p text:style-name="P526">Una mandria di centauri ha iniziato a costruire misteriosi cerchi di pietra nelle colline, e nessuno conosce il loro scopo.</text:p>
        </text:list-item>
        <text:list-item>
          <text:p text:style-name="P526">Un basilisco, che normalmente terrorizzava le terre, sembra impaurito da qualcosa e si ritira nelle caverne più profonde.</text:p>
        </text:list-item>
        <text:list-item>
          <text:p text:style-name="P526">Un ciclope inizia a dipingere simboli sacri sulle pareti della sua caverna, sostenendo di aver avuto visioni divine.</text:p>
        </text:list-item>
        <text:list-item>
          <text:p text:style-name="P526">Un pegaso viene avvistato su una spiaggia, senza mai spiccare il volo, osservando il mare come se stesse aspettando qualcosa.</text:p>
        </text:list-item>
        <text:list-item>
          <text:p text:style-name="P526">Una manticora, invece di attaccare, segue un gruppo di esploratori, apparendo più curiosa che ostile.</text:p>
        </text:list-item>
        <text:list-item>
          <text:p text:style-name="P526">Un kraken si avvicina alle coste, lasciando intatte le navi e i porti, ma scavando trincee sotto l’acqua come se cercasse qualcosa.</text:p>
        </text:list-item>
        <text:list-item>
          <text:p text:style-name="P526">Un lupo mannaro, normalmente fuori controllo nelle notti di luna piena, cerca disperatamente di proteggere un villaggio da altre creature magiche.</text:p>
        </text:list-item>
        <text:list-item>
          <text:p text:style-name="P526">Una sirena, solitamente ingannevole e letale, si rivela essere custode di una reliquia perduta, ma è indecisa se fidarsi degli esseri umani.</text:p>
        </text:list-item>
        <text:list-item>
          <text:p text:style-name="P526">Un drago delle paludi inizia a rilasciare fumi che rendono le piante circostanti giganti e pericolosamente aggressive.</text:p>
        </text:list-item>
        <text:list-item>
          <text:p text:style-name="P526">Un gruppo di fauni normalmente festaioli inizia a recitare misteriosi canti funebri, lamentandosi della fine di qualcosa di sconosciuto.</text:p>
        </text:list-item>
        <text:list-item>
          <text:p text:style-name="P526">Una creatura marina gigante si spiaggia volontariamente, rivelando sul suo dorso una strana incisione antica.</text:p>
        </text:list-item>
        <text:list-item>
          <text:p text:style-name="P526">Un branco di lupi leggendari, noti per essere cacciatori letali, comincia invece a proteggere un antico monumento nelle terre selvagge.</text:p>
        </text:list-item>
        <text:list-item>
          <text:p text:style-name="P526">Un drago di sabbia appare nel deserto, scavando tunnel e liberando antiche rovine nascoste sotto la sabbia.</text:p>
        </text:list-item>
        <text:list-item>
          <text:p text:style-name="P526">Un’entità elementale del fuoco si manifesta tra le montagne, ma non brucia nulla, comportandosi come una guida silenziosa.</text:p>
        </text:list-item>
        <text:list-item>
          <text:p text:style-name="P526">Un gigantesco serpente delle caverne, solitamente territoriale, guida un gruppo di viaggiatori fuori da una grotta infestata senza mai attaccarli.</text:p>
        </text:list-item>
      </text:list>
      <text:h text:style-name="Heading_20_3" text:outline-level="3"><text:bookmark-start text:name="affari-oscuri-nelle-gilde-segrete"/><text:span text:style-name="T1">Affari Oscuri nelle Gilde Segrete</text:span><text:bookmark-end text:name="affari-oscuri-nelle-gilde-segrete"/></text:h>
      <text:list text:style-name="L424">
        <text:list-item>
          <text:p text:style-name="P527">Una gilda di mercanti usa segretamente una flotta di pirati per sbarazzarsi dei concorrenti durante le spedizioni marittime.</text:p>
        </text:list-item>
        <text:list-item>
          <text:p text:style-name="P527">Una gilda di alchimisti sperimenta con sostanze proibite, causando misteriose esplosioni nei magazzini cittadini.</text:p>
        </text:list-item>
        <text:list-item>
          <text:p text:style-name="P527">Un gruppo di mercenari ingaggiati da una gilda segreta organizza una serie di omicidi politici per destabilizzare il governo locale.</text:p>
        </text:list-item>
        <text:list-item>
          <text:p text:style-name="P527">Una gilda di costruttori navali introduce misteriosamente nelle sue navi materiali provenienti da fonti oscure, senza alcuna registrazione nei conti ufficiali.</text:p>
        </text:list-item>
        <text:list-item>
          <text:p text:style-name="P527">Un alchimista di una gilda segreta sta sviluppando una pozione che può controllare la volontà delle persone e vuole testarla sui membri di una corte reale.</text:p>
        </text:list-item>
        <text:list-item>
          <text:p text:style-name="P527">Un’organizzazione clandestina di assassini si allea con una gilda di mercanti per sabotare le rotte commerciali dei rivali.</text:p>
        </text:list-item>
        <text:list-item>
          <text:p text:style-name="P527">Una gilda di minatori scava illegalmente nelle montagne sacre di una tribù, scatenando l’ira degli spiriti locali.</text:p>
        </text:list-item>
        <text:list-item>
          <text:p text:style-name="P527">Una gilda di ladri scambia regolarmente antichi manufatti rubati con una nazione straniera, passando le merci come reliquie religiose.</text:p>
        </text:list-item>
        <text:list-item>
          <text:p text:style-name="P527">Una gilda di mercanti di spezie vende segretamente droghe magiche potenti ai nobili, manipolando i loro comportamenti durante le trattative.</text:p>
        </text:list-item>
        <text:list-item>
          <text:p text:style-name="P527">Un gruppo segreto di maghi all’interno di una gilda commercia informazioni riservate sulle difese cittadine a potenze nemiche.</text:p>
        </text:list-item>
        <text:list-item>
          <text:p text:style-name="P527">Una gilda di costruttori sta sabotando i progetti di difesa della città per arricchirsi attraverso lavori di riparazione e ricostruzione.</text:p>
        </text:list-item>
        <text:list-item>
          <text:p text:style-name="P527">Un gruppo di contrabbandieri all’interno di una gilda di artigiani sta vendendo armi di qualità superiore agli avversari della loro città.</text:p>
        </text:list-item>
        <text:list-item>
          <text:p text:style-name="P527">Una gilda alchemica produce potenti veleni e li vende segretamente ai nobili per usarli durante i banchetti e le cerimonie.</text:p>
        </text:list-item>
        <text:list-item>
          <text:p text:style-name="P527">Una gilda di mercanti usa schiavi come manodopera segreta per mantenere i costi bassi, e chiunque scopra il loro segreto sparisce misteriosamente.</text:p>
        </text:list-item>
        <text:list-item>
          <text:p text:style-name="P527">Un’organizzazione clandestina legata a una gilda di guerrieri sta trafficando in creature mitiche da utilizzare come armi biologiche contro i nemici.</text:p>
        </text:list-item>
        <text:list-item>
          <text:p text:style-name="P527">Un gruppo di alchimisti produce armi magiche difettose che si attivano solo dopo mesi, causando distruzione casuale nei territori rivali.</text:p>
        </text:list-item>
        <text:list-item>
          <text:p text:style-name="P527">Una gilda di costruttori navali ha installato dispositivi di spionaggio magico su tutte le navi costruite per il sovrano, monitorando ogni loro mossa.</text:p>
        </text:list-item>
        <text:list-item>
          <text:p text:style-name="P527">Un’associazione segreta all’interno di una gilda religiosa sta utilizzando donazioni per finanziare una guerra sotterranea tra fazioni rivali.</text:p>
        </text:list-item>
        <text:list-item>
          <text:p text:style-name="P527">Una gilda di ladri sta tramando di svaligiare il tesoro reale durante una cerimonia religiosa, sfruttando il caos generato da un rituale sacro.</text:p>
        </text:list-item>
        <text:list-item>
          <text:p text:style-name="P527">Un ordine di assassini di una gilda segreta ha ricevuto il compito di eliminare uno dei membri più influenti del consiglio cittadino, per mano di un rivale polit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arethar</dc:title>
    <dc:description/>
    <dc:subject/>
    <meta:keyword/>
    <meta:initial-creator>Orizzonti GDR</meta:initial-creator>
    <dc:creator>Orizzonti GDR</dc:creator>
    <meta:creation-date>2025-07-08T07:55:58Z</meta:creation-date>
    <dc:date>2025-07-08T07:55:58Z</dc:date>
    <meta:user-defined meta:name="subtitle" meta:value-type="string">Ambientazione Gunpowder MedFantasy</meta:user-defined>
  </office:meta>
</office:document-meta>
</file>